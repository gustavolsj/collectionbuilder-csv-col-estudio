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194cm"/>
    </style:style>
    <style:style style:name="co2" style:family="table-column">
      <style:table-column-properties fo:break-before="auto" style:column-width="6.627cm"/>
    </style:style>
    <style:style style:name="co3" style:family="table-column">
      <style:table-column-properties fo:break-before="auto" style:column-width="0.988cm"/>
    </style:style>
    <style:style style:name="co4" style:family="table-column">
      <style:table-column-properties fo:break-before="auto" style:column-width="3.604cm"/>
    </style:style>
    <style:style style:name="co5" style:family="table-column">
      <style:table-column-properties fo:break-before="auto" style:column-width="13.192cm"/>
    </style:style>
    <style:style style:name="co6" style:family="table-column">
      <style:table-column-properties fo:break-before="auto" style:column-width="1.642cm"/>
    </style:style>
    <style:style style:name="co7" style:family="table-column">
      <style:table-column-properties fo:break-before="auto" style:column-width="57.997cm"/>
    </style:style>
    <style:style style:name="co8" style:family="table-column">
      <style:table-column-properties fo:break-before="auto" style:column-width="2.923cm"/>
    </style:style>
    <style:style style:name="co9" style:family="table-column">
      <style:table-column-properties fo:break-before="auto" style:column-width="16.434cm"/>
    </style:style>
    <style:style style:name="co10" style:family="table-column">
      <style:table-column-properties fo:break-before="auto" style:column-width="15.289cm"/>
    </style:style>
    <style:style style:name="co11" style:family="table-column">
      <style:table-column-properties fo:break-before="auto" style:column-width="1.942cm"/>
    </style:style>
    <style:style style:name="co12" style:family="table-column">
      <style:table-column-properties fo:break-before="auto" style:column-width="2.242cm"/>
    </style:style>
    <style:style style:name="co13" style:family="table-column">
      <style:table-column-properties fo:break-before="auto" style:column-width="3.249cm"/>
    </style:style>
    <style:style style:name="co14" style:family="table-column">
      <style:table-column-properties fo:break-before="auto" style:column-width="2.759cm"/>
    </style:style>
    <style:style style:name="co15" style:family="table-column">
      <style:table-column-properties fo:break-before="auto" style:column-width="1.371cm"/>
    </style:style>
    <style:style style:name="co16" style:family="table-column">
      <style:table-column-properties fo:break-before="auto" style:column-width="1.806cm"/>
    </style:style>
    <style:style style:name="co17" style:family="table-column">
      <style:table-column-properties fo:break-before="auto" style:column-width="2.868cm"/>
    </style:style>
    <style:style style:name="co18" style:family="table-column">
      <style:table-column-properties fo:break-before="auto" style:column-width="1.178cm"/>
    </style:style>
    <style:style style:name="co19" style:family="table-column">
      <style:table-column-properties fo:break-before="auto" style:column-width="2.977cm"/>
    </style:style>
    <style:style style:name="co20" style:family="table-column">
      <style:table-column-properties fo:break-before="auto" style:column-width="2.023cm"/>
    </style:style>
    <style:style style:name="co21" style:family="table-column">
      <style:table-column-properties fo:break-before="auto" style:column-width="1.723cm"/>
    </style:style>
    <style:style style:name="co22" style:family="table-column">
      <style:table-column-properties fo:break-before="auto" style:column-width="1.452cm"/>
    </style:style>
    <style:style style:name="co23" style:family="table-column">
      <style:table-column-properties fo:break-before="auto" style:column-width="3.768cm"/>
    </style:style>
    <style:style style:name="co24" style:family="table-column">
      <style:table-column-properties fo:break-before="auto" style:column-width="5.129cm"/>
    </style:style>
    <style:style style:name="co25" style:family="table-column">
      <style:table-column-properties fo:break-before="auto" style:column-width="6.763cm"/>
    </style:style>
    <style:style style:name="co26" style:family="table-column">
      <style:table-column-properties fo:break-before="auto" style:column-width="6.9cm"/>
    </style:style>
    <style:style style:name="co27" style:family="table-column">
      <style:table-column-properties fo:break-before="auto" style:column-width="2.623cm"/>
    </style:style>
    <style:style style:name="co28" style:family="table-column">
      <style:table-column-properties fo:break-before="auto" style:column-width="9.924cm"/>
    </style:style>
    <style:style style:name="co29" style:family="table-column">
      <style:table-column-properties fo:break-before="auto" style:column-width="1.588cm"/>
    </style:style>
    <style:style style:name="co30" style:family="table-column">
      <style:table-column-properties fo:break-before="auto" style:column-width="2.078cm"/>
    </style:style>
    <style:style style:name="co31" style:family="table-column">
      <style:table-column-properties fo:break-before="auto" style:column-width="2.732cm"/>
    </style:style>
    <style:style style:name="co32" style:family="table-column">
      <style:table-column-properties fo:break-before="auto" style:column-width="2.051cm"/>
    </style:style>
    <style:style style:name="co3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null-year="1950"/>
      <table:table table:name="demo-reposito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column table:style-name="co19"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1" table:default-cell-style-name="Default"/>
        <table:table-row table:style-name="ro1">
          <table:table-cell office:value-type="string" calcext:value-type="string">
            <text:p>objectid</text:p>
          </table:table-cell>
          <table:table-cell office:value-type="string" calcext:value-type="string">
            <text:p>title</text:p>
          </table:table-cell>
          <table:table-cell office:value-type="string" calcext:value-type="string">
            <text:p>date</text:p>
          </table:table-cell>
          <table:table-cell office:value-type="string" calcext:value-type="string">
            <text:p>date-is-approximate?</text:p>
          </table:table-cell>
          <table:table-cell office:value-type="string" calcext:value-type="string">
            <text:p>creator</text:p>
          </table:table-cell>
          <table:table-cell office:value-type="string" calcext:value-type="string">
            <text:p>recipient</text:p>
          </table:table-cell>
          <table:table-cell office:value-type="string" calcext:value-type="string">
            <text:p>description</text:p>
          </table:table-cell>
          <table:table-cell office:value-type="string" calcext:value-type="string">
            <text:p>item_information</text:p>
          </table:table-cell>
          <table:table-cell office:value-type="string" calcext:value-type="string">
            <text:p>subject</text:p>
          </table:table-cell>
          <table:table-cell office:value-type="string" calcext:value-type="string">
            <text:p>loc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related_publication</text:p>
          </table:table-cell>
          <table:table-cell office:value-type="string" calcext:value-type="string">
            <text:p>publisher-digital</text:p>
          </table:table-cell>
          <table:table-cell office:value-type="string" calcext:value-type="string">
            <text:p>source</text:p>
          </table:table-cell>
          <table:table-cell office:value-type="string" calcext:value-type="string">
            <text:p>findingaid</text:p>
          </table:table-cell>
          <table:table-cell office:value-type="string" calcext:value-type="string">
            <text:p>original-identifier</text:p>
          </table:table-cell>
          <table:table-cell office:value-type="string" calcext:value-type="string">
            <text:p>rights</text:p>
          </table:table-cell>
          <table:table-cell office:value-type="string" calcext:value-type="string">
            <text:p>rightsstatement</text:p>
          </table:table-cell>
          <table:table-cell office:value-type="string" calcext:value-type="string">
            <text:p>type</text:p>
          </table:table-cell>
          <table:table-cell office:value-type="string" calcext:value-type="string">
            <text:p>format</text:p>
          </table:table-cell>
          <table:table-cell office:value-type="string" calcext:value-type="string">
            <text:p>language</text:p>
          </table:table-cell>
          <table:table-cell office:value-type="string" calcext:value-type="string">
            <text:p>relation</text:p>
          </table:table-cell>
          <table:table-cell office:value-type="string" calcext:value-type="string">
            <text:p>filename</text:p>
          </table:table-cell>
          <table:table-cell office:value-type="string" calcext:value-type="string">
            <text:p>identifier</text:p>
          </table:table-cell>
          <table:table-cell office:value-type="string" calcext:value-type="string">
            <text:p>display_template</text:p>
          </table:table-cell>
          <table:table-cell office:value-type="string" calcext:value-type="string">
            <text:p>object_location</text:p>
          </table:table-cell>
          <table:table-cell office:value-type="string" calcext:value-type="string">
            <text:p>image_small</text:p>
          </table:table-cell>
          <table:table-cell office:value-type="string" calcext:value-type="string">
            <text:p>image_thumb</text:p>
          </table:table-cell>
          <table:table-cell office:value-type="string" calcext:value-type="string">
            <text:p>image_alt_text</text:p>
          </table:table-cell>
          <table:table-cell office:value-type="string" calcext:value-type="string">
            <text:p>object_transcript</text:p>
          </table:table-cell>
          <table:table-cell office:value-type="string" calcext:value-type="string">
            <text:p>proceso</text:p>
          </table:table-cell>
          <table:table-cell office:value-type="string" calcext:value-type="string">
            <text:p>soporte</text:p>
          </table:table-cell>
          <table:table-cell office:value-type="string" calcext:value-type="string">
            <text:p>iluminacion</text:p>
          </table:table-cell>
          <table:table-cell office:value-type="string" calcext:value-type="string">
            <text:p>tono</text:p>
          </table:table-cell>
          <table:table-cell office:value-type="string" calcext:value-type="string">
            <text:p>tipologia</text:p>
          </table:table-cell>
          <table:table-cell office:value-type="string" calcext:value-type="string">
            <text:p>polaridad</text:p>
          </table:table-cell>
        </table:table-row>
        <table:table-row table:style-name="ro1">
          <table:table-cell office:value-type="string" calcext:value-type="string">
            <text:p>demo_006</text:p>
          </table:table-cell>
          <table:table-cell office:value-type="string" calcext:value-type="string">
            <text:p>Ferrotipo</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estudio de un hombre afroamericano de finales del siglo XIX, capturado mediante la técnica del ferrotipo. El sujeto viste una camisa blanca de pechera plisada y una chaqueta oscura, posando contra un fondo de cortinajes, una composición típica de los estudios fotográficos populares de la época de la Reconstrucción en Estados Unidos. La expresión es digna y serena, reflejando el auge de la autorrepresentación fotográfica entre la población afroamericana tras la Guerra de Secesión.</text:p>
          </table:table-cell>
          <table:table-cell/>
          <table:table-cell office:value-type="string" calcext:value-type="string">
            <text:p>Ferrotipo; Afroamericano; Siglo XIX</text:p>
          </table:table-cell>
          <table:table-cell office:value-type="string" calcext:value-type="string">
            <text:p>Estados Unidos (Probablemente región del Atlántico Medio)</text:p>
          </table:table-cell>
          <table:table-cell office:value-type="float" office:value="38.8951" calcext:value-type="float">
            <text:p>38.8951</text:p>
          </table:table-cell>
          <table:table-cell office:value-type="float" office:value="-77.0364" calcext:value-type="float">
            <text:p>-77.03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6.jpg</text:p>
          </table:table-cell>
          <table:table-cell office:value-type="string" calcext:value-type="string">
            <text:p>9blbkr</text:p>
          </table:table-cell>
          <table:table-cell office:value-type="string" calcext:value-type="string">
            <text:p>image</text:p>
          </table:table-cell>
          <table:table-cell office:value-type="string" calcext:value-type="string">
            <text:p>/objects/demo_006.jpg</text:p>
          </table:table-cell>
          <table:table-cell office:value-type="string" calcext:value-type="string">
            <text:p>/objects/small/demo_006_sm.jpg</text:p>
          </table:table-cell>
          <table:table-cell office:value-type="string" calcext:value-type="string">
            <text:p>/objects/thumbs/demo_006_th.jpg</text:p>
          </table:table-cell>
          <table:table-cell table:number-columns-repeated="2"/>
          <table:table-cell office:value-type="string" calcext:value-type="string">
            <text:p>Colodión húme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07</text:p>
          </table:table-cell>
          <table:table-cell office:value-type="string" calcext:value-type="string">
            <text:p>Ferrotip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Retrato de estudio de un hombre afroamericano de pie, apoyado en un pedestal con una planta en maceta, vistiendo un traje formal de tres piezas y un sombrero tipo hongo (bowler). La imagen es un ejemplo destacado de la autorrepresentación y la búsqueda de respetabilidad de la comunidad afroamericana durante las décadas posteriores a la Guerra de Secesión en Estados Unidos.</text:p>
          </table:table-cell>
          <table:table-cell/>
          <table:table-cell office:value-type="string" calcext:value-type="string">
            <text:p>Ferrotipo; Cultura Afroamericana; Moda victoriana</text:p>
          </table:table-cell>
          <table:table-cell office:value-type="string" calcext:value-type="string">
            <text:p>Noreste de Estados Unidos (probablemente Philadelphia o New York)</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7.jpg</text:p>
          </table:table-cell>
          <table:table-cell office:value-type="string" calcext:value-type="string">
            <text:p>8n12lc</text:p>
          </table:table-cell>
          <table:table-cell office:value-type="string" calcext:value-type="string">
            <text:p>image</text:p>
          </table:table-cell>
          <table:table-cell office:value-type="string" calcext:value-type="string">
            <text:p>/objects/demo_007.jpg</text:p>
          </table:table-cell>
          <table:table-cell office:value-type="string" calcext:value-type="string">
            <text:p>/objects/small/demo_007_sm.jpg</text:p>
          </table:table-cell>
          <table:table-cell office:value-type="string" calcext:value-type="string">
            <text:p>/objects/thumbs/demo_007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08</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Un retrato de estudio de mediados del siglo XIX que muestra a una niña sentada, capturada mediante el proceso de daguerrotipo. La niña viste un vestido de cuadros con escote amplio y mangas cortas, típico de la moda infantil de la época, y se encuentra enmarcada en un estuche protector de cuero con un tapete de latón dorado y un forro interno de seda o terciopelo rojo.</text:p>
          </table:table-cell>
          <table:table-cell/>
          <table:table-cell office:value-type="string" calcext:value-type="string">
            <text:p>Daguerrotipo; Moda victoriana; Retrato infantil</text:p>
          </table:table-cell>
          <table:table-cell office:value-type="string" calcext:value-type="string">
            <text:p>Estados Unidos (probablemente Nueva York o Boston)</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8.jpg</text:p>
          </table:table-cell>
          <table:table-cell office:value-type="string" calcext:value-type="string">
            <text:p>d26ayp</text:p>
          </table:table-cell>
          <table:table-cell office:value-type="string" calcext:value-type="string">
            <text:p>image</text:p>
          </table:table-cell>
          <table:table-cell office:value-type="string" calcext:value-type="string">
            <text:p>/objects/demo_008.jpg</text:p>
          </table:table-cell>
          <table:table-cell office:value-type="string" calcext:value-type="string">
            <text:p>/objects/small/demo_008_sm.jpg</text:p>
          </table:table-cell>
          <table:table-cell office:value-type="string" calcext:value-type="string">
            <text:p>/objects/thumbs/demo_008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09</text:p>
          </table:table-cell>
          <table:table-cell office:value-type="string" calcext:value-type="string">
            <text:p>Millard Fillmore</text:p>
          </table:table-cell>
          <table:table-cell office:value-type="float" office:value="1850" calcext:value-type="float">
            <text:p>1850</text:p>
          </table:table-cell>
          <table:table-cell/>
          <table:table-cell office:value-type="string" calcext:value-type="string">
            <text:p>Estudio de Mathew Brady</text:p>
          </table:table-cell>
          <table:table-cell/>
          <table:table-cell office:value-type="string" calcext:value-type="string">
            <text:p>Retrato de estudio en formato daguerrotipo de Millard Fillmore, el decimotercer presidente de los Estados Unidos, posando junto a su primera esposa, Abigail Powers Fillmore. La pareja está capturada en una pose formal típica de mediados del siglo XIX, con Abigail colocando su mano sobre el hombro de su esposo, un gesto de afecto común en los retratos matrimoniales de la época.</text:p>
          </table:table-cell>
          <table:table-cell/>
          <table:table-cell office:value-type="string" calcext:value-type="string">
            <text:p>Millard Fillmore; Daguerrotipo; Retrato Presidencial</text:p>
          </table:table-cell>
          <table:table-cell office:value-type="string" calcext:value-type="string">
            <text:p>Washington D.C., Estados Unidos</text:p>
          </table:table-cell>
          <table:table-cell office:value-type="float" office:value="38.897667" calcext:value-type="float">
            <text:p>38.897667</text:p>
          </table:table-cell>
          <table:table-cell office:value-type="float" office:value="-77.03655" calcext:value-type="float">
            <text:p>-77.036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9.jpg</text:p>
          </table:table-cell>
          <table:table-cell office:value-type="string" calcext:value-type="string">
            <text:p>vt2b5v</text:p>
          </table:table-cell>
          <table:table-cell office:value-type="string" calcext:value-type="string">
            <text:p>image</text:p>
          </table:table-cell>
          <table:table-cell office:value-type="string" calcext:value-type="string">
            <text:p>/objects/demo_009.jpg</text:p>
          </table:table-cell>
          <table:table-cell office:value-type="string" calcext:value-type="string">
            <text:p>/objects/small/demo_009_sm.jpg</text:p>
          </table:table-cell>
          <table:table-cell office:value-type="string" calcext:value-type="string">
            <text:p>/objects/thumbs/demo_009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0</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 (Atribuido a un estudio profesional)</text:p>
          </table:table-cell>
          <table:table-cell/>
          <table:table-cell office:value-type="string" calcext:value-type="string">
            <text:p>Retrato de estudio de medio cuerpo que muestra a un joven con vestimenta formal de mediados del siglo XIX. El sujeto presenta un peinado romántico con volumen lateral, vistiendo una chaqueta oscura sobre un chaleco con una cadena de reloj visible y un lazo de cuello estrecho. La imagen está contenida en un marco elíptico dentro de un paspartú de latón dorado ornamentado, característico de los estuches de daguerrotipos de la época.</text:p>
          </table:table-cell>
          <table:table-cell/>
          <table:table-cell office:value-type="string" calcext:value-type="string">
            <text:p>Daguerrotipo; Retrato decimonónico; Moda masculina victoriana</text:p>
          </table:table-cell>
          <table:table-cell office:value-type="string" calcext:value-type="string">
            <text:p>Noreste de los Estados Unidos (probablemente Boston o Nueva York)</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0.jpg</text:p>
          </table:table-cell>
          <table:table-cell office:value-type="string" calcext:value-type="string">
            <text:p>s3h2k4</text:p>
          </table:table-cell>
          <table:table-cell office:value-type="string" calcext:value-type="string">
            <text:p>image</text:p>
          </table:table-cell>
          <table:table-cell office:value-type="string" calcext:value-type="string">
            <text:p>/objects/demo_010.jpg</text:p>
          </table:table-cell>
          <table:table-cell office:value-type="string" calcext:value-type="string">
            <text:p>/objects/small/demo_010_sm.jpg</text:p>
          </table:table-cell>
          <table:table-cell office:value-type="string" calcext:value-type="string">
            <text:p>/objects/thumbs/demo_010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11</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Retrato de medio cuerpo de un hombre de mediana edad que utiliza gafas de montura circular y luce una barba de estilo Shenandoah (sin bigote). El sujeto viste un atuendo formal compuesto por una chaqueta oscura, chaleco y un lazo ancho al cuello. La imagen se presenta en un estuche de apertura lateral típico de la época, con un forro de terciopelo rojo gofrado que muestra un elaborado diseño de pavo real y motivos florales.</text:p>
          </table:table-cell>
          <table:table-cell/>
          <table:table-cell office:value-type="string" calcext:value-type="string">
            <text:p>Daguerrotipo; Retrato de estudio; Moda victoriana</text:p>
          </table:table-cell>
          <table:table-cell office:value-type="string" calcext:value-type="string">
            <text:p>Estados Unidos (Probablemente Nueva York o Massachusett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1.jpg</text:p>
          </table:table-cell>
          <table:table-cell office:value-type="string" calcext:value-type="string">
            <text:p>tr6yk5</text:p>
          </table:table-cell>
          <table:table-cell office:value-type="string" calcext:value-type="string">
            <text:p>image</text:p>
          </table:table-cell>
          <table:table-cell office:value-type="string" calcext:value-type="string">
            <text:p>/objects/demo_011.jpg</text:p>
          </table:table-cell>
          <table:table-cell office:value-type="string" calcext:value-type="string">
            <text:p>/objects/small/demo_011_sm.jpg</text:p>
          </table:table-cell>
          <table:table-cell office:value-type="string" calcext:value-type="string">
            <text:p>/objects/thumbs/demo_011_th.jpg</text:p>
          </table:table-cell>
          <table:table-cell table:number-columns-repeated="2"/>
          <table:table-cell office:value-type="string" calcext:value-type="string">
            <text:p>Daguerrotip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2</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Josiah Johnson Hawes</text:p>
          </table:table-cell>
          <table:table-cell/>
          <table:table-cell office:value-type="string" calcext:value-type="string">
            <text:p>Vista interior de una estancia doméstica de mediados del siglo XIX capturada mediante la técnica del daguerrotipo. La escena muestra una cómoda con libros y una lámpara, una mesa lateral con mantel blanco, sillas de madera y un retrato de Benjamin Franklin colgado en la pared, lo que refleja el gusto estético y la cultura material de la clase media estadounidense de la época.</text:p>
          </table:table-cell>
          <table:table-cell/>
          <table:table-cell office:value-type="string" calcext:value-type="string">
            <text:p>Daguerrotipo; Interior doméstico; Siglo XIX</text:p>
          </table:table-cell>
          <table:table-cell office:value-type="string" calcext:value-type="string">
            <text:p>Boston, Massachusett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2.jpg</text:p>
          </table:table-cell>
          <table:table-cell office:value-type="string" calcext:value-type="string">
            <text:p>8g5xx</text:p>
          </table:table-cell>
          <table:table-cell office:value-type="string" calcext:value-type="string">
            <text:p>image</text:p>
          </table:table-cell>
          <table:table-cell office:value-type="string" calcext:value-type="string">
            <text:p>/objects/demo_012.jpg</text:p>
          </table:table-cell>
          <table:table-cell office:value-type="string" calcext:value-type="string">
            <text:p>/objects/small/demo_012_sm.jpg</text:p>
          </table:table-cell>
          <table:table-cell office:value-type="string" calcext:value-type="string">
            <text:p>/objects/thumbs/demo_012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3</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 (Estudio fotográfico estadounidense)</text:p>
          </table:table-cell>
          <table:table-cell/>
          <table:table-cell office:value-type="string" calcext:value-type="string">
            <text:p>Retrato de estudio de medio cuerpo de un hombre adulto no identificado junto a un niño/a pequeño, capturado mediante la técnica del daguerrotipo. La imagen presenta una coloración manual aplicada posteriormente (colorete) en las mejillas de ambos sujetos para proporcionar una apariencia más saludable y realista, así como un sutil realce de pigmento dorado en el collar del niño, una práctica común en la retratística de mediados del siglo XIX.</text:p>
          </table:table-cell>
          <table:table-cell/>
          <table:table-cell office:value-type="string" calcext:value-type="string">
            <text:p>Daguerrotipo; Moda Victoriana; Retrato familiar</text:p>
          </table:table-cell>
          <table:table-cell office:value-type="string" calcext:value-type="string">
            <text:p>Noreste de Estados Unidos (Probablemente Nueva York o Boston)</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3.jpg</text:p>
          </table:table-cell>
          <table:table-cell office:value-type="string" calcext:value-type="string">
            <text:p>z2rq3q</text:p>
          </table:table-cell>
          <table:table-cell office:value-type="string" calcext:value-type="string">
            <text:p>image</text:p>
          </table:table-cell>
          <table:table-cell office:value-type="string" calcext:value-type="string">
            <text:p>/objects/demo_013.jpg</text:p>
          </table:table-cell>
          <table:table-cell office:value-type="string" calcext:value-type="string">
            <text:p>/objects/small/demo_013_sm.jpg</text:p>
          </table:table-cell>
          <table:table-cell office:value-type="string" calcext:value-type="string">
            <text:p>/objects/thumbs/demo_013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4</text:p>
          </table:table-cell>
          <table:table-cell office:value-type="string" calcext:value-type="string">
            <text:p>Daguerrotipo</text:p>
          </table:table-cell>
          <table:table-cell office:value-type="float" office:value="1855" calcext:value-type="float">
            <text:p>1855</text:p>
          </table:table-cell>
          <table:table-cell/>
          <table:table-cell office:value-type="string" calcext:value-type="string">
            <text:p>Anónimo</text:p>
          </table:table-cell>
          <table:table-cell/>
          <table:table-cell office:value-type="string" calcext:value-type="string">
            <text:p>Retrato de estudio de un infante de la época victoriana media, presentado en un estuche decorativo. El sujeto viste una túnica de patrón a cuadros (plaid) con cintas en los hombros, prenda característica de la vestimenta infantil de mediados del siglo XIX que no distinguía géneros a edades tempranas. La imagen muestra un sutil retoque manual con pigmento rosa en las mejillas.</text:p>
          </table:table-cell>
          <table:table-cell/>
          <table:table-cell office:value-type="string" calcext:value-type="string">
            <text:p>Daguerrotipo; Moda victoriana; Retrato infantil</text:p>
          </table:table-cell>
          <table:table-cell office:value-type="string" calcext:value-type="string">
            <text:p>Noreste de los Estados Unidos (Nueva York o Filadelfia)</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4.jpg</text:p>
          </table:table-cell>
          <table:table-cell office:value-type="string" calcext:value-type="string">
            <text:p>k8y2p9</text:p>
          </table:table-cell>
          <table:table-cell office:value-type="string" calcext:value-type="string">
            <text:p>image</text:p>
          </table:table-cell>
          <table:table-cell office:value-type="string" calcext:value-type="string">
            <text:p>/objects/demo_014.jpg</text:p>
          </table:table-cell>
          <table:table-cell office:value-type="string" calcext:value-type="string">
            <text:p>/objects/small/demo_014_sm.jpg</text:p>
          </table:table-cell>
          <table:table-cell office:value-type="string" calcext:value-type="string">
            <text:p>/objects/thumbs/demo_014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5</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Un daguerrotipo del siglo XIX que captura una escena industrial temprana, destacando una chimenea de ladrillo o piedra de gran altura en el centro de la composición. La estructura está rodeada por edificios de fábricas o molinos construidos en piedra y madera, típicos de la Revolución Industrial. En la base de la chimenea se distingue un grupo de trabajadores y andamios, lo que sugiere que la planta podría estar en proceso de construcción o expansión.</text:p>
          </table:table-cell>
          <table:table-cell/>
          <table:table-cell office:value-type="string" calcext:value-type="string">
            <text:p>Daguerrotipo; Revolución Industrial; Arquitectura fabril</text:p>
          </table:table-cell>
          <table:table-cell office:value-type="string" calcext:value-type="string">
            <text:p>Noreste de Estados Unidos (posiblemente Massachusetts o Pensilvania)</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5.jpg</text:p>
          </table:table-cell>
          <table:table-cell office:value-type="string" calcext:value-type="string">
            <text:p>fz1zbw</text:p>
          </table:table-cell>
          <table:table-cell office:value-type="string" calcext:value-type="string">
            <text:p>image</text:p>
          </table:table-cell>
          <table:table-cell office:value-type="string" calcext:value-type="string">
            <text:p>/objects/demo_015.jpg</text:p>
          </table:table-cell>
          <table:table-cell office:value-type="string" calcext:value-type="string">
            <text:p>/objects/small/demo_015_sm.jpg</text:p>
          </table:table-cell>
          <table:table-cell office:value-type="string" calcext:value-type="string">
            <text:p>/objects/thumbs/demo_015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16</text:p>
          </table:table-cell>
          <table:table-cell office:value-type="string" calcext:value-type="string">
            <text:p>Ambrotipo</text:p>
          </table:table-cell>
          <table:table-cell office:value-type="float" office:value="1855" calcext:value-type="float">
            <text:p>1855</text:p>
          </table:table-cell>
          <table:table-cell/>
          <table:table-cell office:value-type="string" calcext:value-type="string">
            <text:p>Anónimo</text:p>
          </table:table-cell>
          <table:table-cell/>
          <table:table-cell office:value-type="string" calcext:value-type="string">
            <text:p>Retrato de exterior de una residencia rural de mediados del siglo XIX, capturando una casa de dos plantas de estilo neoclásico o italianizante temprano con porche frontal. Frente a la casa se observa un carruaje tirado por un caballo y árboles caducifolios sin follaje, lo que sugiere una toma realizada en invierno o principios de primavera. La imagen está contenida en un estuche de lujo con un marco de latón ornamentado típico de los procesos fotográficos iniciales.</text:p>
          </table:table-cell>
          <table:table-cell/>
          <table:table-cell office:value-type="string" calcext:value-type="string">
            <text:p>Ambrotipo; Arquitectura vernácula; Siglo XIX</text:p>
          </table:table-cell>
          <table:table-cell office:value-type="string" calcext:value-type="string">
            <text:p>Noreste de Estados Unidos (posiblemente Massachusetts o Nueva York)</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6.jpg</text:p>
          </table:table-cell>
          <table:table-cell office:value-type="string" calcext:value-type="string">
            <text:p>zrhwo8</text:p>
          </table:table-cell>
          <table:table-cell office:value-type="string" calcext:value-type="string">
            <text:p>image</text:p>
          </table:table-cell>
          <table:table-cell office:value-type="string" calcext:value-type="string">
            <text:p>/objects/demo_016.jpg</text:p>
          </table:table-cell>
          <table:table-cell office:value-type="string" calcext:value-type="string">
            <text:p>/objects/small/demo_016_sm.jpg</text:p>
          </table:table-cell>
          <table:table-cell office:value-type="string" calcext:value-type="string">
            <text:p>/objects/thumbs/demo_01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7</text:p>
          </table:table-cell>
          <table:table-cell office:value-type="string" calcext:value-type="string">
            <text:p>Ambrotipo</text:p>
          </table:table-cell>
          <table:table-cell office:value-type="float" office:value="1854" calcext:value-type="float">
            <text:p>1854</text:p>
          </table:table-cell>
          <table:table-cell/>
          <table:table-cell office:value-type="string" calcext:value-type="string">
            <text:p>Isaac A. Rehn</text:p>
          </table:table-cell>
          <table:table-cell/>
          <table:table-cell office:value-type="string" calcext:value-type="string">
            <text:p>Retrato de estudio de medio cuerpo de un hombre joven de mediados del siglo XIX. La imagen es un ambrotipo, un proceso de colodión húmedo sobre vidrio que produce un positivo directo. El sujeto viste una indumentaria formal compuesta por una chaqueta oscura, chaleco y una corbata de lazo ancha, destacando un estilo de vello facial tipo 'beard curtain' o barba de collar, muy popular en la época. La fotografía está contenida en un estuche de madera o cuero con un marco protector de latón dorado (preservador) profusamente decorado.</text:p>
          </table:table-cell>
          <table:table-cell/>
          <table:table-cell office:value-type="string" calcext:value-type="string">
            <text:p>Ambrotipo; Retrato decimonónico; Isaac A. Rehn</text:p>
          </table:table-cell>
          <table:table-cell office:value-type="string" calcext:value-type="string">
            <text:p>Philadelphia, Pensilvania, EE. UU.</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7.jpg</text:p>
          </table:table-cell>
          <table:table-cell office:value-type="string" calcext:value-type="string">
            <text:p>chr578</text:p>
          </table:table-cell>
          <table:table-cell office:value-type="string" calcext:value-type="string">
            <text:p>image</text:p>
          </table:table-cell>
          <table:table-cell office:value-type="string" calcext:value-type="string">
            <text:p>/objects/demo_017.jpg</text:p>
          </table:table-cell>
          <table:table-cell office:value-type="string" calcext:value-type="string">
            <text:p>/objects/small/demo_017_sm.jpg</text:p>
          </table:table-cell>
          <table:table-cell office:value-type="string" calcext:value-type="string">
            <text:p>/objects/thumbs/demo_017_th.jpg</text:p>
          </table:table-cell>
          <table:table-cell table:number-columns-repeated="2"/>
          <table:table-cell office:value-type="string" calcext:value-type="string">
            <text:p>Daguerrotip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1</text:p>
          </table:table-cell>
          <table:table-cell office:value-type="string" calcext:value-type="string">
            <text:p>Cabinet Card</text:p>
          </table:table-cell>
          <table:table-cell office:value-type="float" office:value="1895" calcext:value-type="float">
            <text:p>1895</text:p>
          </table:table-cell>
          <table:table-cell/>
          <table:table-cell office:value-type="string" calcext:value-type="string">
            <text:p>George H. Younge</text:p>
          </table:table-cell>
          <table:table-cell/>
          <table:table-cell office:value-type="string" calcext:value-type="string">
            <text:p>Un retrato de estudio de medio busto que muestra a un hombre joven de la era victoriana tardía. El sujeto luce un peinado corto y ondulado, está afeitado y viste ropa formal que incluye un cuello de palomita (wing collar), una corbata tipo Ascot o plastrón con un alfiler de corbata, y un saco oscuro con un pañuelo de bolsillo visible. La imagen es un 'cabinet card' clásico con el nombre del fotógrafo y la ubicación impresos en la base.</text:p>
          </table:table-cell>
          <table:table-cell/>
          <table:table-cell office:value-type="string" calcext:value-type="string">
            <text:p>Cabinet Card; Retrato Victoriano; Utica NY</text:p>
          </table:table-cell>
          <table:table-cell office:value-type="string" calcext:value-type="string">
            <text:p>Franklin Square, Utica, Nueva York, Estados Unidos</text:p>
          </table:table-cell>
          <table:table-cell office:value-type="float" office:value="43.1026" calcext:value-type="float">
            <text:p>43.1026</text:p>
          </table:table-cell>
          <table:table-cell office:value-type="float" office:value="-75.2288" calcext:value-type="float">
            <text:p>-75.22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1.jpg</text:p>
          </table:table-cell>
          <table:table-cell office:value-type="string" calcext:value-type="string">
            <text:p>9s9vm</text:p>
          </table:table-cell>
          <table:table-cell office:value-type="string" calcext:value-type="string">
            <text:p>image</text:p>
          </table:table-cell>
          <table:table-cell office:value-type="string" calcext:value-type="string">
            <text:p>/objects/impresion_001.jpg</text:p>
          </table:table-cell>
          <table:table-cell office:value-type="string" calcext:value-type="string">
            <text:p>/objects/small/impresion_001_sm.jpg</text:p>
          </table:table-cell>
          <table:table-cell office:value-type="string" calcext:value-type="string">
            <text:p>/objects/thumbs/impresion_001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2</text:p>
          </table:table-cell>
          <table:table-cell office:value-type="string" calcext:value-type="string">
            <text:p>Carte-de-visite</text:p>
          </table:table-cell>
          <table:table-cell office:value-type="float" office:value="1862" calcext:value-type="float">
            <text:p>1862</text:p>
          </table:table-cell>
          <table:table-cell/>
          <table:table-cell office:value-type="string" calcext:value-type="string">
            <text:p>Anónimo</text:p>
          </table:table-cell>
          <table:table-cell/>
          <table:table-cell office:value-type="string" calcext:value-type="string">
            <text:p>Retrato de estudio de una mujer joven en formato carte-de-visite (CdV), capturado durante la década de 1860. La figura aparece sentada, luciendo un vestido de algodón o seda con un patrón de motas blancas (polka dots), característico de la moda de mediados del siglo XIX. Complementa su atuendo con mangas abullonadas, un cuello alto con un camafeo central, collares de cuentas y un tocado de encaje oscuro sobre el cabello partido al medio.</text:p>
          </table:table-cell>
          <table:table-cell/>
          <table:table-cell office:value-type="string" calcext:value-type="string">
            <text:p>Carte-de-visite; Moda victoriana; Albúmina</text:p>
          </table:table-cell>
          <table:table-cell office:value-type="string" calcext:value-type="string">
            <text:p>Estados Unidos o Europa Occidental (entorno urbano)</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2.jpg</text:p>
          </table:table-cell>
          <table:table-cell office:value-type="string" calcext:value-type="string">
            <text:p>eg892x</text:p>
          </table:table-cell>
          <table:table-cell office:value-type="string" calcext:value-type="string">
            <text:p>image</text:p>
          </table:table-cell>
          <table:table-cell office:value-type="string" calcext:value-type="string">
            <text:p>/objects/impresion_002.jpg</text:p>
          </table:table-cell>
          <table:table-cell office:value-type="string" calcext:value-type="string">
            <text:p>/objects/small/impresion_002_sm.jpg</text:p>
          </table:table-cell>
          <table:table-cell office:value-type="string" calcext:value-type="string">
            <text:p>/objects/thumbs/impresion_002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3</text:p>
          </table:table-cell>
          <table:table-cell office:value-type="string" calcext:value-type="string">
            <text:p>Sullivan Bros</text:p>
          </table:table-cell>
          <table:table-cell office:value-type="float" office:value="1895" calcext:value-type="float">
            <text:p>1895</text:p>
          </table:table-cell>
          <table:table-cell/>
          <table:table-cell office:value-type="string" calcext:value-type="string">
            <text:p>Sullivan Bros.</text:p>
          </table:table-cell>
          <table:table-cell/>
          <table:table-cell office:value-type="string" calcext:value-type="string">
            <text:p>Retrato de estudio de cuerpo entero de un niño pequeño, capturado por el estudio fotográfico Sullivan Bros en Hudson, Nueva York. El sujeto posa en una actitud formal junto a un pedestal de piedra ornamental de estilo neoclásico. Viste un traje oscuro de tres piezas típico de la época, con una chaqueta decorada con lorzas o pliegues verticales, pantalones cortos tipo 'knickerbockers' y botas altas oscuras.</text:p>
          </table:table-cell>
          <table:table-cell/>
          <table:table-cell office:value-type="string" calcext:value-type="string">
            <text:p>Sullivan Bros; Hudson New York; Cabinet Card</text:p>
          </table:table-cell>
          <table:table-cell office:value-type="string" calcext:value-type="string">
            <text:p>425 Warren Street, Hudson, Nueva York, EE. UU.</text:p>
          </table:table-cell>
          <table:table-cell office:value-type="float" office:value="42.2526" calcext:value-type="float">
            <text:p>42.2526</text:p>
          </table:table-cell>
          <table:table-cell office:value-type="float" office:value="-73.7882" calcext:value-type="float">
            <text:p>-73.788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3.jpg</text:p>
          </table:table-cell>
          <table:table-cell office:value-type="string" calcext:value-type="string">
            <text:p>saj8qd</text:p>
          </table:table-cell>
          <table:table-cell office:value-type="string" calcext:value-type="string">
            <text:p>image</text:p>
          </table:table-cell>
          <table:table-cell office:value-type="string" calcext:value-type="string">
            <text:p>/objects/impresion_003.jpg</text:p>
          </table:table-cell>
          <table:table-cell office:value-type="string" calcext:value-type="string">
            <text:p>/objects/small/impresion_003_sm.jpg</text:p>
          </table:table-cell>
          <table:table-cell office:value-type="string" calcext:value-type="string">
            <text:p>/objects/thumbs/impresion_00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4</text:p>
          </table:table-cell>
          <table:table-cell office:value-type="string" calcext:value-type="string">
            <text:p>Tarjeta de gabinete</text:p>
          </table:table-cell>
          <table:table-cell office:value-type="float" office:value="1885" calcext:value-type="float">
            <text:p>1885</text:p>
          </table:table-cell>
          <table:table-cell/>
          <table:table-cell office:value-type="string" calcext:value-type="string">
            <text:p>Charles L. Thomas</text:p>
          </table:table-cell>
          <table:table-cell/>
          <table:table-cell office:value-type="string" calcext:value-type="string">
            <text:p>Retrato de estudio de un hombre de mediana edad posando de pie junto a una silla decorativa. Se trata de una tarjeta de gabinete (cabinet card) clásica de finales del siglo XIX, con el sello del fotógrafo Thomas, ubicado en la intersección de las calles Main y Market en Ottumwa, Iowa.</text:p>
          </table:table-cell>
          <table:table-cell/>
          <table:table-cell office:value-type="string" calcext:value-type="string">
            <text:p>Tarjeta de gabinete; Retrato victoriano; Moda masculina 1890</text:p>
          </table:table-cell>
          <table:table-cell office:value-type="string" calcext:value-type="string">
            <text:p>Esquina de las calles Main y Market, Ottumwa, Iowa, Estados Unidos</text:p>
          </table:table-cell>
          <table:table-cell office:value-type="float" office:value="41.0198" calcext:value-type="float">
            <text:p>41.0198</text:p>
          </table:table-cell>
          <table:table-cell office:value-type="float" office:value="-92.4115" calcext:value-type="float">
            <text:p>-92.41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4.jpg</text:p>
          </table:table-cell>
          <table:table-cell office:value-type="string" calcext:value-type="string">
            <text:p>ki9sl</text:p>
          </table:table-cell>
          <table:table-cell office:value-type="string" calcext:value-type="string">
            <text:p>image</text:p>
          </table:table-cell>
          <table:table-cell office:value-type="string" calcext:value-type="string">
            <text:p>/objects/impresion_004.jpg</text:p>
          </table:table-cell>
          <table:table-cell office:value-type="string" calcext:value-type="string">
            <text:p>/objects/small/impresion_004_sm.jpg</text:p>
          </table:table-cell>
          <table:table-cell office:value-type="string" calcext:value-type="string">
            <text:p>/objects/thumbs/impresion_004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5</text:p>
          </table:table-cell>
          <table:table-cell office:value-type="string" calcext:value-type="string">
            <text:p>Estereoscopía</text:p>
          </table:table-cell>
          <table:table-cell office:value-type="float" office:value="1901" calcext:value-type="float">
            <text:p>1901</text:p>
          </table:table-cell>
          <table:table-cell/>
          <table:table-cell office:value-type="string" calcext:value-type="string">
            <text:p>Underwood &amp; Underwood</text:p>
          </table:table-cell>
          <table:table-cell/>
          <table:table-cell office:value-type="string" calcext:value-type="string">
            <text:p>Vista estereoscópica que captura una barca tradicional de carga, conocida como 'barque du Léman', navegando en el Lago Lemán (Lago Ginebra) durante el atardecer cerca de Montreux, Suiza. La imagen muestra la silueta característica de las velas latinas y el perfil de los Alpes en el horizonte.</text:p>
          </table:table-cell>
          <table:table-cell/>
          <table:table-cell office:value-type="string" calcext:value-type="string">
            <text:p>Estereoscopía; Lago Lemán; Navegación</text:p>
          </table:table-cell>
          <table:table-cell office:value-type="string" calcext:value-type="string">
            <text:p>Montreux, Suiza</text:p>
          </table:table-cell>
          <table:table-cell office:value-type="float" office:value="46.4312" calcext:value-type="float">
            <text:p>46.4312</text:p>
          </table:table-cell>
          <table:table-cell office:value-type="float" office:value="6.9107" calcext:value-type="float">
            <text:p>6.91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5.jpg</text:p>
          </table:table-cell>
          <table:table-cell office:value-type="string" calcext:value-type="string">
            <text:p>engknb</text:p>
          </table:table-cell>
          <table:table-cell office:value-type="string" calcext:value-type="string">
            <text:p>image</text:p>
          </table:table-cell>
          <table:table-cell office:value-type="string" calcext:value-type="string">
            <text:p>/objects/impresion_005.jpg</text:p>
          </table:table-cell>
          <table:table-cell office:value-type="string" calcext:value-type="string">
            <text:p>/objects/small/impresion_005_sm.jpg</text:p>
          </table:table-cell>
          <table:table-cell office:value-type="string" calcext:value-type="string">
            <text:p>/objects/thumbs/impresion_005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6</text:p>
          </table:table-cell>
          <table:table-cell office:value-type="string" calcext:value-type="string">
            <text:p>Polaroid</text:p>
          </table:table-cell>
          <table:table-cell office:value-type="float" office:value="1975" calcext:value-type="float">
            <text:p>1975</text:p>
          </table:table-cell>
          <table:table-cell/>
          <table:table-cell office:value-type="string" calcext:value-type="string">
            <text:p>Anónimo (Fotógrafo de catálogo o galerista)</text:p>
          </table:table-cell>
          <table:table-cell/>
          <table:table-cell office:value-type="string" calcext:value-type="string">
            <text:p>Fotografía instantánea que registra una obra de arte enmarcada representando dos cebras en un estilo gráfico minimalista, una de pie y otra descansando. La imagen parece ser un registro de inventario o catálogo, evidenciado por las anotaciones manuscritas '117' y '20x30' en el margen inferior blanco, típicos de un proceso de documentación de galería o estudio artístico.</text:p>
          </table:table-cell>
          <table:table-cell/>
          <table:table-cell office:value-type="string" calcext:value-type="string">
            <text:p>Polaroid; Arte animalista; Registro de inventario</text:p>
          </table:table-cell>
          <table:table-cell office:value-type="string" calcext:value-type="string">
            <text:p>Estados Unidos (Probablemente Cambridge, Massachusetts)</text:p>
          </table:table-cell>
          <table:table-cell office:value-type="float" office:value="42.3736" calcext:value-type="float">
            <text:p>42.3736</text:p>
          </table:table-cell>
          <table:table-cell office:value-type="float" office:value="-71.1097" calcext:value-type="float">
            <text:p>-71.109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6.jpg</text:p>
          </table:table-cell>
          <table:table-cell office:value-type="string" calcext:value-type="string">
            <text:p>l0ptx</text:p>
          </table:table-cell>
          <table:table-cell office:value-type="string" calcext:value-type="string">
            <text:p>image</text:p>
          </table:table-cell>
          <table:table-cell office:value-type="string" calcext:value-type="string">
            <text:p>/objects/impresion_006.jpg</text:p>
          </table:table-cell>
          <table:table-cell office:value-type="string" calcext:value-type="string">
            <text:p>/objects/small/impresion_006_sm.jpg</text:p>
          </table:table-cell>
          <table:table-cell office:value-type="string" calcext:value-type="string">
            <text:p>/objects/thumbs/impresion_00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7</text:p>
          </table:table-cell>
          <table:table-cell office:value-type="string" calcext:value-type="string">
            <text:p>Ebanistería</text:p>
          </table:table-cell>
          <table:table-cell office:value-type="float" office:value="1975" calcext:value-type="float">
            <text:p>1975</text:p>
          </table:table-cell>
          <table:table-cell/>
          <table:table-cell office:value-type="string" calcext:value-type="string">
            <text:p>Anónimo (Departamento de Fotografía del Museo)</text:p>
          </table:table-cell>
          <table:table-cell/>
          <table:table-cell office:value-type="string" calcext:value-type="string">
            <text:p>Primer plano detallado de una columna o poste de madera tallada a mano, caracterizado por un diseño ornamental de hojas de acanto y un fondo de textura punteada ('stippled background'). La pieza muestra la pátina oscura y el acabado refinado propio de la ebanistería de estilo Federal o Neoclásico. La fotografía, por su encuadre y formato, parece ser un registro documental de conservación para un catálogo de mobiliario histórico o una colección de artes decorativas.</text:p>
          </table:table-cell>
          <table:table-cell/>
          <table:table-cell office:value-type="string" calcext:value-type="string">
            <text:p>Ebanistería; Hoja de acanto; Estilo Federal</text:p>
          </table:table-cell>
          <table:table-cell office:value-type="string" calcext:value-type="string">
            <text:p>Metropolitan Museum of Art, Nueva York, Estados Unidos</text:p>
          </table:table-cell>
          <table:table-cell office:value-type="float" office:value="40.7794" calcext:value-type="float">
            <text:p>40.7794</text:p>
          </table:table-cell>
          <table:table-cell office:value-type="float" office:value="-73.9632" calcext:value-type="float">
            <text:p>-73.96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7.jpg</text:p>
          </table:table-cell>
          <table:table-cell office:value-type="string" calcext:value-type="string">
            <text:p>e3d2n</text:p>
          </table:table-cell>
          <table:table-cell office:value-type="string" calcext:value-type="string">
            <text:p>image</text:p>
          </table:table-cell>
          <table:table-cell office:value-type="string" calcext:value-type="string">
            <text:p>/objects/impresion_007.jpg</text:p>
          </table:table-cell>
          <table:table-cell office:value-type="string" calcext:value-type="string">
            <text:p>/objects/small/impresion_007_sm.jpg</text:p>
          </table:table-cell>
          <table:table-cell office:value-type="string" calcext:value-type="string">
            <text:p>/objects/thumbs/impresion_00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8</text:p>
          </table:table-cell>
          <table:table-cell office:value-type="string" calcext:value-type="string">
            <text:p>Fotografía vernácula</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Fotografía vernácula de una mujer de edad avanzada posando al aire libre frente a un arbusto de coníferas. La imagen es un ejemplo clásico de la fotografía doméstica de mediados del siglo XX, capturada en un formato cuadrado con una notable degradación cromática hacia los tonos magentas debido a la inestabilidad de los tintes químicos originales.</text:p>
          </table:table-cell>
          <table:table-cell/>
          <table:table-cell office:value-type="string" calcext:value-type="string">
            <text:p>Fotografía vernácula; Kodak Instamatic; Degradación cromática; Retrato doméstico</text:p>
          </table:table-cell>
          <table:table-cell office:value-type="string" calcext:value-type="string">
            <text:p>Estados Unidos (Región Noreste o Medio Oeste)</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8.jpg</text:p>
          </table:table-cell>
          <table:table-cell office:value-type="string" calcext:value-type="string">
            <text:p>u1fn0l</text:p>
          </table:table-cell>
          <table:table-cell office:value-type="string" calcext:value-type="string">
            <text:p>image</text:p>
          </table:table-cell>
          <table:table-cell office:value-type="string" calcext:value-type="string">
            <text:p>/objects/impresion_008.jpg</text:p>
          </table:table-cell>
          <table:table-cell office:value-type="string" calcext:value-type="string">
            <text:p>/objects/small/impresion_008_sm.jpg</text:p>
          </table:table-cell>
          <table:table-cell office:value-type="string" calcext:value-type="string">
            <text:p>/objects/thumbs/impresion_008_th.jpg</text:p>
          </table:table-cell>
          <table:table-cell table:number-columns-repeated="2"/>
          <table:table-cell office:value-type="string" calcext:value-type="string">
            <text:p>Copia fotográfica sobre pape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9</text:p>
          </table:table-cell>
          <table:table-cell office:value-type="string" calcext:value-type="string">
            <text:p>Carrusel</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Fotografía a color de una niña pequeña con cabello rubio ondulado montada en un caballo de carrusel. La niña viste un vestido sin mangas con estampado floral, característico de finales de la década de 1960. El carrusel muestra caballos de madera tallados con detalles ornamentales y una estructura superior iluminada por bombillas incandescentes. La composición y el formato cuadrado sugieren una captura familiar típica de la clase media estadounidense de la posguerra.</text:p>
          </table:table-cell>
          <table:table-cell/>
          <table:table-cell office:value-type="string" calcext:value-type="string">
            <text:p>Carrusel; Kodak Instamatic; Moda infantil</text:p>
          </table:table-cell>
          <table:table-cell office:value-type="string" calcext:value-type="string">
            <text:p>Estados Unidos (Parque de atracciones regional)</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9.jpg</text:p>
          </table:table-cell>
          <table:table-cell office:value-type="string" calcext:value-type="string">
            <text:p>3di1q</text:p>
          </table:table-cell>
          <table:table-cell office:value-type="string" calcext:value-type="string">
            <text:p>image</text:p>
          </table:table-cell>
          <table:table-cell office:value-type="string" calcext:value-type="string">
            <text:p>/objects/impresion_009.jpg</text:p>
          </table:table-cell>
          <table:table-cell office:value-type="string" calcext:value-type="string">
            <text:p>/objects/small/impresion_009_sm.jpg</text:p>
          </table:table-cell>
          <table:table-cell office:value-type="string" calcext:value-type="string">
            <text:p>/objects/thumbs/impresion_00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10</text:p>
          </table:table-cell>
          <table:table-cell office:value-type="string" calcext:value-type="string">
            <text:p>Escena doméstic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Una escena íntima de la vida cotidiana que captura a una mujer mayor con su nieta en un entorno doméstico. La imagen es un testimonio de la fotografía vernácula de finales de la década de 1970, destacando la moda y la decoración de interiores típica de la clase media de la época.</text:p>
          </table:table-cell>
          <table:table-cell/>
          <table:table-cell office:value-type="string" calcext:value-type="string">
            <text:p>Escena doméstica; Retrato familiar; Años 1970</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0.jpg</text:p>
          </table:table-cell>
          <table:table-cell office:value-type="string" calcext:value-type="string">
            <text:p>tu41gg</text:p>
          </table:table-cell>
          <table:table-cell office:value-type="string" calcext:value-type="string">
            <text:p>image</text:p>
          </table:table-cell>
          <table:table-cell office:value-type="string" calcext:value-type="string">
            <text:p>/objects/impresion_010.jpg</text:p>
          </table:table-cell>
          <table:table-cell office:value-type="string" calcext:value-type="string">
            <text:p>/objects/small/impresion_010_sm.jpg</text:p>
          </table:table-cell>
          <table:table-cell office:value-type="string" calcext:value-type="string">
            <text:p>/objects/thumbs/impresion_01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1</text:p>
          </table:table-cell>
          <table:table-cell office:value-type="string" calcext:value-type="string">
            <text:p>Arquitectura de Nantucket</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Fotografía instantánea que captura una vivienda de estilo colonial en Nantucket, Massachusetts. La estructura presenta un revestimiento de tejas de cedro grisáceas, ventanas de guillotina de múltiples paneles y una cerca blanca de estacas, elementos icónicos de la arquitectura costera de Nueva Inglaterra. La inscripción manuscrita '6 WEYMOUTH' identifica la ubicación de la propiedad.</text:p>
          </table:table-cell>
          <table:table-cell/>
          <table:table-cell office:value-type="string" calcext:value-type="string">
            <text:p>Arquitectura de Nantucket; Polaroid; Nueva Inglaterra</text:p>
          </table:table-cell>
          <table:table-cell office:value-type="string" calcext:value-type="string">
            <text:p>6 Weymouth Street, Nantucket, Massachusetts, EE. UU.</text:p>
          </table:table-cell>
          <table:table-cell office:value-type="float" office:value="41.277833" calcext:value-type="float">
            <text:p>41.277833</text:p>
          </table:table-cell>
          <table:table-cell office:value-type="float" office:value="-70.098744" calcext:value-type="float">
            <text:p>-70.0987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1.jpg</text:p>
          </table:table-cell>
          <table:table-cell office:value-type="string" calcext:value-type="string">
            <text:p>a843sb</text:p>
          </table:table-cell>
          <table:table-cell office:value-type="string" calcext:value-type="string">
            <text:p>image</text:p>
          </table:table-cell>
          <table:table-cell office:value-type="string" calcext:value-type="string">
            <text:p>/objects/impresion_011.jpg</text:p>
          </table:table-cell>
          <table:table-cell office:value-type="string" calcext:value-type="string">
            <text:p>/objects/small/impresion_011_sm.jpg</text:p>
          </table:table-cell>
          <table:table-cell office:value-type="string" calcext:value-type="string">
            <text:p>/objects/thumbs/impresion_011_th.jpg</text:p>
          </table:table-cell>
          <table:table-cell table:number-columns-repeated="2"/>
          <table:table-cell office:value-type="string" calcext:value-type="string">
            <text:p>Película instantánea de tipo integra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2</text:p>
          </table:table-cell>
          <table:table-cell office:value-type="string" calcext:value-type="string">
            <text:p>Presa de Mount Morris</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Vista panorámica de la Presa de Mount Morris situada sobre el río Genesee, en el extremo norte del Parque Estatal Letchworth, Nueva York. La imagen muestra la imponente estructura de hormigón de tipo gravedad y las paredes escarpadas del desfiladero, caracterizadas por estratos sedimentarios visibles de lutita y arenisca, típicos del 'Gran Cañón del Este'.</text:p>
          </table:table-cell>
          <table:table-cell/>
          <table:table-cell office:value-type="string" calcext:value-type="string">
            <text:p>Presa de Mount Morris; Río Genesee; Parque Estatal Letchworth</text:p>
          </table:table-cell>
          <table:table-cell office:value-type="string" calcext:value-type="string">
            <text:p>Mount Morris, Nueva York, Estados Unidos</text:p>
          </table:table-cell>
          <table:table-cell office:value-type="float" office:value="42.7325" calcext:value-type="float">
            <text:p>42.7325</text:p>
          </table:table-cell>
          <table:table-cell office:value-type="float" office:value="-77.9161" calcext:value-type="float">
            <text:p>-77.916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2.jpg</text:p>
          </table:table-cell>
          <table:table-cell office:value-type="string" calcext:value-type="string">
            <text:p>f6rhg</text:p>
          </table:table-cell>
          <table:table-cell office:value-type="string" calcext:value-type="string">
            <text:p>image</text:p>
          </table:table-cell>
          <table:table-cell office:value-type="string" calcext:value-type="string">
            <text:p>/objects/impresion_012.jpg</text:p>
          </table:table-cell>
          <table:table-cell office:value-type="string" calcext:value-type="string">
            <text:p>/objects/small/impresion_012_sm.jpg</text:p>
          </table:table-cell>
          <table:table-cell office:value-type="string" calcext:value-type="string">
            <text:p>/objects/thumbs/impresion_01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3</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Coover Studio</text:p>
          </table:table-cell>
          <table:table-cell/>
          <table:table-cell office:value-type="string" calcext:value-type="string">
            <text:p>Retrato de estudio de un caballero de mediana edad, caracterizado por un prominente bigote estilo 'handlebar' y vestimenta formal de finales de la era victoriana o principios de la eduardiana.</text:p>
          </table:table-cell>
          <table:table-cell/>
          <table:table-cell office:value-type="string" calcext:value-type="string">
            <text:p>Retrato de estudio; Moda masculina finisecular; Fotografía de gabinete</text:p>
          </table:table-cell>
          <table:table-cell office:value-type="string" calcext:value-type="string">
            <text:p>Lincoln, Nebraska, Estados Unidos</text:p>
          </table:table-cell>
          <table:table-cell office:value-type="float" office:value="40.8136" calcext:value-type="float">
            <text:p>40.8136</text:p>
          </table:table-cell>
          <table:table-cell office:value-type="float" office:value="-96.7026" calcext:value-type="float">
            <text:p>-96.702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3.jpg</text:p>
          </table:table-cell>
          <table:table-cell office:value-type="string" calcext:value-type="string">
            <text:p>qsa34e</text:p>
          </table:table-cell>
          <table:table-cell office:value-type="string" calcext:value-type="string">
            <text:p>image</text:p>
          </table:table-cell>
          <table:table-cell office:value-type="string" calcext:value-type="string">
            <text:p>/objects/impresion_013.jpg</text:p>
          </table:table-cell>
          <table:table-cell office:value-type="string" calcext:value-type="string">
            <text:p>/objects/small/impresion_013_sm.jpg</text:p>
          </table:table-cell>
          <table:table-cell office:value-type="string" calcext:value-type="string">
            <text:p>/objects/thumbs/impresion_013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4</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Anónimo (Estudio fotográfico comercial)</text:p>
          </table:table-cell>
          <table:table-cell/>
          <table:table-cell office:value-type="string" calcext:value-type="string">
            <text:p>Retrato de estudio de una niña pequeña de pie sobre una silla de madera. La menor viste una indumentaria invernal de lujo para la época, consistente en un abrigo blanco con detalles de encaje en el cuello, una gorra (bonnet) a juego con lazos prominentes y medias blancas. Sostiene lo que parece ser un juguete de peluche o una muñeca. La fotografía está montada en una cartulina rígida de color marrón oscuro con un marco hundido y un escudo gofrado en la parte inferior, típico de la presentación comercial de finales del siglo XIX y principios del XX.</text:p>
          </table:table-cell>
          <table:table-cell/>
          <table:table-cell office:value-type="string" calcext:value-type="string">
            <text:p>Retrato de estudio; Moda infantil eduardiana; Fotografía de gabinete</text:p>
          </table:table-cell>
          <table:table-cell office:value-type="string" calcext:value-type="string">
            <text:p>Noreste de los Estados Unidos</text:p>
          </table:table-cell>
          <table:table-cell office:value-type="float" office:value="40.7127" calcext:value-type="float">
            <text:p>40.7127</text:p>
          </table:table-cell>
          <table:table-cell office:value-type="float" office:value="-74.0059" calcext:value-type="float">
            <text:p>-74.00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4.jpg</text:p>
          </table:table-cell>
          <table:table-cell office:value-type="string" calcext:value-type="string">
            <text:p>0so2zq</text:p>
          </table:table-cell>
          <table:table-cell office:value-type="string" calcext:value-type="string">
            <text:p>image</text:p>
          </table:table-cell>
          <table:table-cell office:value-type="string" calcext:value-type="string">
            <text:p>/objects/impresion_014.jpg</text:p>
          </table:table-cell>
          <table:table-cell office:value-type="string" calcext:value-type="string">
            <text:p>/objects/small/impresion_014_sm.jpg</text:p>
          </table:table-cell>
          <table:table-cell office:value-type="string" calcext:value-type="string">
            <text:p>/objects/thumbs/impresion_014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5</text:p>
          </table:table-cell>
          <table:table-cell office:value-type="string" calcext:value-type="string">
            <text:p>Retrato de estudio</text:p>
          </table:table-cell>
          <table:table-cell office:value-type="float" office:value="1895" calcext:value-type="float">
            <text:p>1895</text:p>
          </table:table-cell>
          <table:table-cell/>
          <table:table-cell office:value-type="string" calcext:value-type="string">
            <text:p>Albany Art Union (Estudio fotográfico)</text:p>
          </table:table-cell>
          <table:table-cell/>
          <table:table-cell office:value-type="string" calcext:value-type="string">
            <text:p>Retrato de estudio de un caballero de mediana edad, de busto, mirando ligeramente hacia su derecha. El sujeto presenta una barba y bigote densos y bien cuidados, y utiliza gafas de estilo quevedos (pince-nez). Viste un traje formal oscuro, camisa blanca de cuello alto y una pajarita negra. La imagen está montada sobre un cartón rígido grisáceo con el sello distintivo del estudio 'Albany Art Union' en la esquina inferior derecha.</text:p>
          </table:table-cell>
          <table:table-cell/>
          <table:table-cell office:value-type="string" calcext:value-type="string">
            <text:p>Retrato de estudio; Albany Art Union; Moda masculina victoriana</text:p>
          </table:table-cell>
          <table:table-cell office:value-type="string" calcext:value-type="string">
            <text:p>Albany, Nueva York, Estados Unidos</text:p>
          </table:table-cell>
          <table:table-cell office:value-type="float" office:value="42.652579" calcext:value-type="float">
            <text:p>42.652579</text:p>
          </table:table-cell>
          <table:table-cell office:value-type="float" office:value="-73.756232" calcext:value-type="float">
            <text:p>-73.7562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5.jpg</text:p>
          </table:table-cell>
          <table:table-cell office:value-type="string" calcext:value-type="string">
            <text:p>9z6ejg</text:p>
          </table:table-cell>
          <table:table-cell office:value-type="string" calcext:value-type="string">
            <text:p>image</text:p>
          </table:table-cell>
          <table:table-cell office:value-type="string" calcext:value-type="string">
            <text:p>/objects/impresion_015.jpg</text:p>
          </table:table-cell>
          <table:table-cell office:value-type="string" calcext:value-type="string">
            <text:p>/objects/small/impresion_015_sm.jpg</text:p>
          </table:table-cell>
          <table:table-cell office:value-type="string" calcext:value-type="string">
            <text:p>/objects/thumbs/impresion_01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6</text:p>
          </table:table-cell>
          <table:table-cell office:value-type="string" calcext:value-type="string">
            <text:p>Retrato Victoriano</text:p>
          </table:table-cell>
          <table:table-cell office:value-type="float" office:value="1895" calcext:value-type="float">
            <text:p>1895</text:p>
          </table:table-cell>
          <table:table-cell/>
          <table:table-cell office:value-type="string" calcext:value-type="string">
            <text:p>C. H. Gallup &amp; Co.</text:p>
          </table:table-cell>
          <table:table-cell/>
          <table:table-cell office:value-type="string" calcext:value-type="string">
            <text:p>Retrato de estudio de dos mujeres jóvenes, identificadas por la inscripción manuscrita como Eliza Raymond y Dora, realizado por la firma fotográfica C. H. Gallup &amp; Co. en Poughkeepsie, Nueva York. La imagen muestra a las jóvenes con vestimenta formal de la era victoriana tardía, caracterizada por cuellos altos de encaje y peinados recogidos con lazos.</text:p>
          </table:table-cell>
          <table:table-cell/>
          <table:table-cell office:value-type="string" calcext:value-type="string">
            <text:p>Retrato Victoriano; Fotografía de Estudio; Moda Eduardiana</text:p>
          </table:table-cell>
          <table:table-cell office:value-type="string" calcext:value-type="string">
            <text:p>Poughkeepsie, Nueva York, Estados Unidos</text:p>
          </table:table-cell>
          <table:table-cell office:value-type="float" office:value="41.7003" calcext:value-type="float">
            <text:p>41.7003</text:p>
          </table:table-cell>
          <table:table-cell office:value-type="float" office:value="-73.921" calcext:value-type="float">
            <text:p>-73.9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6.jpg</text:p>
          </table:table-cell>
          <table:table-cell office:value-type="string" calcext:value-type="string">
            <text:p>0n147b</text:p>
          </table:table-cell>
          <table:table-cell office:value-type="string" calcext:value-type="string">
            <text:p>image</text:p>
          </table:table-cell>
          <table:table-cell office:value-type="string" calcext:value-type="string">
            <text:p>/objects/impresion_016.jpg</text:p>
          </table:table-cell>
          <table:table-cell office:value-type="string" calcext:value-type="string">
            <text:p>/objects/small/impresion_016_sm.jpg</text:p>
          </table:table-cell>
          <table:table-cell office:value-type="string" calcext:value-type="string">
            <text:p>/objects/thumbs/impresion_016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7</text:p>
          </table:table-cell>
          <table:table-cell office:value-type="string" calcext:value-type="string">
            <text:p>Fotografía amateur</text:p>
          </table:table-cell>
          <table:table-cell office:value-type="float" office:value="1958" calcext:value-type="float">
            <text:p>1958</text:p>
          </table:table-cell>
          <table:table-cell/>
          <table:table-cell office:value-type="string" calcext:value-type="string">
            <text:p>Anónimo</text:p>
          </table:table-cell>
          <table:table-cell/>
          <table:table-cell office:value-type="string" calcext:value-type="string">
            <text:p>Fotografía amateur en blanco y negro que captura una vista costera o de bahía bajo un cielo brumoso. En el horizonte se distinguen siluetas tenues de estructuras portuarias, barcos o infraestructuras industriales. La imagen presenta un primer plano de terreno costero con vegetación baja, seguido de una amplia extensión de agua tranquila, característica de la fotografía de viajes de mediados del siglo XX.</text:p>
          </table:table-cell>
          <table:table-cell/>
          <table:table-cell office:value-type="string" calcext:value-type="string">
            <text:p>Fotografía amateur; Paisaje marítimo; Década de 1950</text:p>
          </table:table-cell>
          <table:table-cell office:value-type="string" calcext:value-type="string">
            <text:p>Posiblemente Bahía de San Francisco, California, Estados Unidos</text:p>
          </table:table-cell>
          <table:table-cell office:value-type="float" office:value="37.8044" calcext:value-type="float">
            <text:p>37.8044</text:p>
          </table:table-cell>
          <table:table-cell office:value-type="float" office:value="-122.4298" calcext:value-type="float">
            <text:p>-122.4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7.jpg</text:p>
          </table:table-cell>
          <table:table-cell office:value-type="string" calcext:value-type="string">
            <text:p>2jq42s</text:p>
          </table:table-cell>
          <table:table-cell office:value-type="string" calcext:value-type="string">
            <text:p>image</text:p>
          </table:table-cell>
          <table:table-cell office:value-type="string" calcext:value-type="string">
            <text:p>/objects/impresion_017.jpg</text:p>
          </table:table-cell>
          <table:table-cell office:value-type="string" calcext:value-type="string">
            <text:p>/objects/small/impresion_017_sm.jpg</text:p>
          </table:table-cell>
          <table:table-cell office:value-type="string" calcext:value-type="string">
            <text:p>/objects/thumbs/impresion_01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18</text:p>
          </table:table-cell>
          <table:table-cell office:value-type="string" calcext:value-type="string">
            <text:p>Pesca deportiv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fotografía amateur en blanco y negro que muestra una captura de nueve peces (posiblemente lobinas o black bass) dispuestos en fila sobre una superficie clara, probablemente el muelle de madera de un lago o la cubierta de un bote. La imagen captura un momento típico de ocio y pesca deportiva de mediados del siglo XX.</text:p>
          </table:table-cell>
          <table:table-cell/>
          <table:table-cell office:value-type="string" calcext:value-type="string">
            <text:p>Pesca deportiva; Centrarchidae; Vida cotidiana</text:p>
          </table:table-cell>
          <table:table-cell office:value-type="string" calcext:value-type="string">
            <text:p>Región de los Grandes Lagos, Estados Unidos/Canadá</text:p>
          </table:table-cell>
          <table:table-cell office:value-type="float" office:value="45" calcext:value-type="float">
            <text:p>45</text:p>
          </table:table-cell>
          <table:table-cell office:value-type="float" office:value="-90" calcext:value-type="float">
            <text:p>-9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8.jpg</text:p>
          </table:table-cell>
          <table:table-cell office:value-type="string" calcext:value-type="string">
            <text:p>m40f0k</text:p>
          </table:table-cell>
          <table:table-cell office:value-type="string" calcext:value-type="string">
            <text:p>image</text:p>
          </table:table-cell>
          <table:table-cell office:value-type="string" calcext:value-type="string">
            <text:p>/objects/impresion_018.jpg</text:p>
          </table:table-cell>
          <table:table-cell office:value-type="string" calcext:value-type="string">
            <text:p>/objects/small/impresion_018_sm.jpg</text:p>
          </table:table-cell>
          <table:table-cell office:value-type="string" calcext:value-type="string">
            <text:p>/objects/thumbs/impresion_01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9</text:p>
          </table:table-cell>
          <table:table-cell office:value-type="string" calcext:value-type="string">
            <text:p>Retrato de estudio</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formal de una mujer joven, característico de la estética de mediados del siglo XX. La imagen presenta un acabado en viñeta, técnica habitual en la fotografía comercial de la época para centrar la atención en el sujeto y suavizar los bordes del fondo. La expresión es sobria y la iluminación controlada, sugiriendo un propósito de identificación personal o recuerdo familiar.</text:p>
          </table:table-cell>
          <table:table-cell/>
          <table:table-cell office:value-type="string" calcext:value-type="string">
            <text:p>Retrato de estudio; Moda años 50; Fotografía analógica</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9.jpg</text:p>
          </table:table-cell>
          <table:table-cell office:value-type="string" calcext:value-type="string">
            <text:p>w7pqo</text:p>
          </table:table-cell>
          <table:table-cell office:value-type="string" calcext:value-type="string">
            <text:p>image</text:p>
          </table:table-cell>
          <table:table-cell office:value-type="string" calcext:value-type="string">
            <text:p>/objects/impresion_019.jpg</text:p>
          </table:table-cell>
          <table:table-cell office:value-type="string" calcext:value-type="string">
            <text:p>/objects/small/impresion_019_sm.jpg</text:p>
          </table:table-cell>
          <table:table-cell office:value-type="string" calcext:value-type="string">
            <text:p>/objects/thumbs/impresion_019_th.jpg</text:p>
          </table:table-cell>
          <table:table-cell table:number-columns-repeated="2"/>
          <table:table-cell office:value-type="string" calcext:value-type="string">
            <text:p>Copia positiva de gelatina de plata sobre papel barit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0</text:p>
          </table:table-cell>
          <table:table-cell office:value-type="string" calcext:value-type="string">
            <text:p>Diego Rivera</text:p>
          </table:table-cell>
          <table:table-cell office:value-type="float" office:value="1932" calcext:value-type="float">
            <text:p>1932</text:p>
          </table:table-cell>
          <table:table-cell/>
          <table:table-cell office:value-type="string" calcext:value-type="string">
            <text:p>Lucienne Bloch</text:p>
          </table:table-cell>
          <table:table-cell/>
          <table:table-cell office:value-type="string" calcext:value-type="string">
            <text:p>Esta fotografía histórica captura al renombrado muralista mexicano Diego Rivera asomado por la ventana de un vagón de tren junto a un acompañante, probablemente uno de sus asistentes técnicos o colaboradores. La imagen evoca la época de los grandes viajes transcontinentales de Rivera hacia los Estados Unidos durante la década de 1930, periodo en el que realizó obras icónicas como los murales de la 'Industria de Detroit'. La composición resalta la textura industrial del vagón de acero remachado, contrastando con la humanidad de los sujetos.</text:p>
          </table:table-cell>
          <table:table-cell/>
          <table:table-cell office:value-type="string" calcext:value-type="string">
            <text:p>Diego Rivera; Muralismo Mexicano; Ferrocarriles</text:p>
          </table:table-cell>
          <table:table-cell office:value-type="string" calcext:value-type="string">
            <text:p>Detroit, Michigan, Estados Unidos</text:p>
          </table:table-cell>
          <table:table-cell office:value-type="float" office:value="42.3314" calcext:value-type="float">
            <text:p>42.3314</text:p>
          </table:table-cell>
          <table:table-cell office:value-type="float" office:value="-82.0458" calcext:value-type="float">
            <text:p>-82.04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0.jpg</text:p>
          </table:table-cell>
          <table:table-cell office:value-type="string" calcext:value-type="string">
            <text:p>221jo</text:p>
          </table:table-cell>
          <table:table-cell office:value-type="string" calcext:value-type="string">
            <text:p>image</text:p>
          </table:table-cell>
          <table:table-cell office:value-type="string" calcext:value-type="string">
            <text:p>/objects/impresion_020.jpg</text:p>
          </table:table-cell>
          <table:table-cell office:value-type="string" calcext:value-type="string">
            <text:p>/objects/small/impresion_020_sm.jpg</text:p>
          </table:table-cell>
          <table:table-cell office:value-type="string" calcext:value-type="string">
            <text:p>/objects/thumbs/impresion_02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1</text:p>
          </table:table-cell>
          <table:table-cell office:value-type="string" calcext:value-type="string">
            <text:p>Policía Militar</text:p>
          </table:table-cell>
          <table:table-cell office:value-type="float" office:value="1944" calcext:value-type="float">
            <text:p>1944</text:p>
          </table:table-cell>
          <table:table-cell/>
          <table:table-cell office:value-type="string" calcext:value-type="string">
            <text:p>Anónimo (Soldado compañero)</text:p>
          </table:table-cell>
          <table:table-cell/>
          <table:table-cell office:value-type="string" calcext:value-type="string">
            <text:p>Retrato de un soldado de la Policía Militar (MP) del Ejército de los Estados Unidos durante la Segunda Guerra Mundial. El individuo posa de pie en un camino embarrado, probablemente en el teatro de operaciones europeo. Viste la icónica chaqueta de campo M-1943 y un casco M1 con las siglas 'MP' pintadas frontalmente. El paisaje de árboles caducifolios desnudos y el terreno lodoso sugieren un clima invernal o de principios de primavera en Europa Occidental.</text:p>
          </table:table-cell>
          <table:table-cell/>
          <table:table-cell office:value-type="string" calcext:value-type="string">
            <text:p>Policía Militar; Segunda Guerra Mundial; Uniforme M-1943</text:p>
          </table:table-cell>
          <table:table-cell office:value-type="string" calcext:value-type="string">
            <text:p>Ardenas, Bélgica / Frontera Franco-Alemana</text:p>
          </table:table-cell>
          <table:table-cell office:value-type="float" office:value="50.0014" calcext:value-type="float">
            <text:p>50.0014</text:p>
          </table:table-cell>
          <table:table-cell office:value-type="float" office:value="5.7153" calcext:value-type="float">
            <text:p>5.71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1.jpg</text:p>
          </table:table-cell>
          <table:table-cell office:value-type="string" calcext:value-type="string">
            <text:p>hwixn</text:p>
          </table:table-cell>
          <table:table-cell office:value-type="string" calcext:value-type="string">
            <text:p>image</text:p>
          </table:table-cell>
          <table:table-cell office:value-type="string" calcext:value-type="string">
            <text:p>/objects/impresion_021.jpg</text:p>
          </table:table-cell>
          <table:table-cell office:value-type="string" calcext:value-type="string">
            <text:p>/objects/small/impresion_021_sm.jpg</text:p>
          </table:table-cell>
          <table:table-cell office:value-type="string" calcext:value-type="string">
            <text:p>/objects/thumbs/impresion_0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2</text:p>
          </table:table-cell>
          <table:table-cell office:value-type="string" calcext:value-type="string">
            <text:p>Sasha Montenegro</text:p>
          </table:table-cell>
          <table:table-cell office:value-type="float" office:value="1975" calcext:value-type="float">
            <text:p>1975</text:p>
          </table:table-cell>
          <table:table-cell/>
          <table:table-cell office:value-type="string" calcext:value-type="string">
            <text:p>Jaime Silva</text:p>
          </table:table-cell>
          <table:table-cell/>
          <table:table-cell office:value-type="string" calcext:value-type="string">
            <text:p>Hoja de contacto fotográfica que muestra una sesión de estudio de la actriz y vedette méxico-yugoslava Sasha Montenegro. La secuencia captura diversas poses eróticas y de moda características de la estética del 'Cine de Ficheras' y el espectáculo de variedades en México durante la década de 1970. Se observan marcas de selección editorial en tinta azul y roja, incluyendo encuadres propuestos y anotaciones manuscritas como las iniciales 'JS'.</text:p>
          </table:table-cell>
          <table:table-cell/>
          <table:table-cell office:value-type="string" calcext:value-type="string">
            <text:p>Sasha Montenegro; Cine de Ficheras; Vedette</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2.jpg</text:p>
          </table:table-cell>
          <table:table-cell office:value-type="string" calcext:value-type="string">
            <text:p>vqacu</text:p>
          </table:table-cell>
          <table:table-cell office:value-type="string" calcext:value-type="string">
            <text:p>image</text:p>
          </table:table-cell>
          <table:table-cell office:value-type="string" calcext:value-type="string">
            <text:p>/objects/impresion_022.jpg</text:p>
          </table:table-cell>
          <table:table-cell office:value-type="string" calcext:value-type="string">
            <text:p>/objects/small/impresion_022_sm.jpg</text:p>
          </table:table-cell>
          <table:table-cell office:value-type="string" calcext:value-type="string">
            <text:p>/objects/thumbs/impresion_0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3</text:p>
          </table:table-cell>
          <table:table-cell office:value-type="string" calcext:value-type="string">
            <text:p>Puente Golden Gate</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fotografía en blanco y negro capturada desde el interior de un vehículo en movimiento, que muestra una vista distante y neblinosa del Puente Golden Gate. Se distingue claramente una de las torres de suspensión y los cables característicos que cruzan el estrecho. La composición encuadrada por el marco redondeado de la ventana sugiere una instantánea de viaje captada por un turista que se aproxima a San Francisco.</text:p>
          </table:table-cell>
          <table:table-cell/>
          <table:table-cell office:value-type="string" calcext:value-type="string">
            <text:p>Puente Golden Gate; San Francisco; Fotografía de viaje</text:p>
          </table:table-cell>
          <table:table-cell office:value-type="string" calcext:value-type="string">
            <text:p>San Francisco, California, Estados Unidos</text:p>
          </table:table-cell>
          <table:table-cell office:value-type="float" office:value="37.8199" calcext:value-type="float">
            <text:p>37.8199</text:p>
          </table:table-cell>
          <table:table-cell office:value-type="float" office:value="-122.4783" calcext:value-type="float">
            <text:p>-122.47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3.jpg</text:p>
          </table:table-cell>
          <table:table-cell office:value-type="string" calcext:value-type="string">
            <text:p>m5qlwg</text:p>
          </table:table-cell>
          <table:table-cell office:value-type="string" calcext:value-type="string">
            <text:p>image</text:p>
          </table:table-cell>
          <table:table-cell office:value-type="string" calcext:value-type="string">
            <text:p>/objects/impresion_023.jpg</text:p>
          </table:table-cell>
          <table:table-cell office:value-type="string" calcext:value-type="string">
            <text:p>/objects/small/impresion_023_sm.jpg</text:p>
          </table:table-cell>
          <table:table-cell office:value-type="string" calcext:value-type="string">
            <text:p>/objects/thumbs/impresion_023_th.jpg</text:p>
          </table:table-cell>
          <table:table-cell table:number-columns-repeated="2"/>
          <table:table-cell office:value-type="string" calcext:value-type="string">
            <text:p>Copia fotográfica positiva en pape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4</text:p>
          </table:table-cell>
          <table:table-cell office:value-type="string" calcext:value-type="string">
            <text:p>Violinista</text:p>
          </table:table-cell>
          <table:table-cell office:value-type="float" office:value="1905" calcext:value-type="float">
            <text:p>1905</text:p>
          </table:table-cell>
          <table:table-cell/>
          <table:table-cell office:value-type="string" calcext:value-type="string">
            <text:p>Anónimo</text:p>
          </table:table-cell>
          <table:table-cell/>
          <table:table-cell office:value-type="string" calcext:value-type="string">
            <text:p>Un retrato grupal de una reunión social o comunitaria de principios del siglo XX, centrada en un hombre joven sentado que sostiene un violín y un arco. El grupo, compuesto por hombres y mujeres, posa en un interior doméstico con carpintería decorativa. La vestimenta sugiere una clase media rural o de pequeña ciudad en Norteamérica, capturada en un momento de ocio musical.</text:p>
          </table:table-cell>
          <table:table-cell/>
          <table:table-cell office:value-type="string" calcext:value-type="string">
            <text:p>Violinista; Vestimenta eduardiana; Retrato grupal</text:p>
          </table:table-cell>
          <table:table-cell office:value-type="string" calcext:value-type="string">
            <text:p>Región del Medio Oeste, Estados Unidos</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4.jpg</text:p>
          </table:table-cell>
          <table:table-cell office:value-type="string" calcext:value-type="string">
            <text:p>am1nir</text:p>
          </table:table-cell>
          <table:table-cell office:value-type="string" calcext:value-type="string">
            <text:p>image</text:p>
          </table:table-cell>
          <table:table-cell office:value-type="string" calcext:value-type="string">
            <text:p>/objects/impresion_024.jpg</text:p>
          </table:table-cell>
          <table:table-cell office:value-type="string" calcext:value-type="string">
            <text:p>/objects/small/impresion_024_sm.jpg</text:p>
          </table:table-cell>
          <table:table-cell office:value-type="string" calcext:value-type="string">
            <text:p>/objects/thumbs/impresion_024_th.jpg</text:p>
          </table:table-cell>
          <table:table-cell table:number-columns-repeated="2"/>
          <table:table-cell office:value-type="string" calcext:value-type="string">
            <text:p>Impresión de gelatina de plata sobre papel fotográfic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5</text:p>
          </table:table-cell>
          <table:table-cell office:value-type="string" calcext:value-type="string">
            <text:p>Moda eduardiana</text:p>
          </table:table-cell>
          <table:table-cell office:value-type="float" office:value="1900" calcext:value-type="float">
            <text:p>1900</text:p>
          </table:table-cell>
          <table:table-cell/>
          <table:table-cell office:value-type="string" calcext:value-type="string">
            <text:p>Anónimo</text:p>
          </table:table-cell>
          <table:table-cell/>
          <table:table-cell office:value-type="string" calcext:value-type="string">
            <text:p>Retrato de estudio formal de una mujer joven vestida con indumentaria de invierno de finales de la era victoriana o principios de la eduardiana, destacando un sombrero de ala ancha con adornos de cinta y un abrigo oscuro pesado con amplios puños y cuello de piel o material texturizado.</text:p>
          </table:table-cell>
          <table:table-cell/>
          <table:table-cell office:value-type="string" calcext:value-type="string">
            <text:p>Moda eduardiana; Retrato de estudio; Sombrero Merry Widow</text:p>
          </table:table-cell>
          <table:table-cell office:value-type="string" calcext:value-type="string">
            <text:p>Nueva York,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5.jpg</text:p>
          </table:table-cell>
          <table:table-cell office:value-type="string" calcext:value-type="string">
            <text:p>suhg9r</text:p>
          </table:table-cell>
          <table:table-cell office:value-type="string" calcext:value-type="string">
            <text:p>image</text:p>
          </table:table-cell>
          <table:table-cell office:value-type="string" calcext:value-type="string">
            <text:p>/objects/impresion_025.jpg</text:p>
          </table:table-cell>
          <table:table-cell office:value-type="string" calcext:value-type="string">
            <text:p>/objects/small/impresion_025_sm.jpg</text:p>
          </table:table-cell>
          <table:table-cell office:value-type="string" calcext:value-type="string">
            <text:p>/objects/thumbs/impresion_02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6</text:p>
          </table:table-cell>
          <table:table-cell office:value-type="string" calcext:value-type="string">
            <text:p>Kinescopio</text:p>
          </table:table-cell>
          <table:table-cell office:value-type="float" office:value="1950" calcext:value-type="float">
            <text:p>1950</text:p>
          </table:table-cell>
          <table:table-cell/>
          <table:table-cell office:value-type="string" calcext:value-type="string">
            <text:p>Anónimo (Técnico o fotógrafo de prensa de telesistema mexicano)</text:p>
          </table:table-cell>
          <table:table-cell/>
          <table:table-cell office:value-type="string" calcext:value-type="string">
            <text:p>Retrato en primer plano de un joven Miguel Aceves Mejía, capturado mediante la técnica de fotografía de pantalla o kinescopio. La imagen muestra al cantante y actor mexicano con una expresión de interpretación, vistiendo una camisa con moño oscuro. La característica visual más notable es el patrón de líneas de barrido horizontal, lo que indica que la fotografía fue tomada directamente de un monitor de televisión de tubo de rayos catódicos (CRT) durante una emisión en vivo o una grabación de la época.</text:p>
          </table:table-cell>
          <table:table-cell/>
          <table:table-cell office:value-type="string" calcext:value-type="string">
            <text:p>Kinescopio; Miguel Aceves Mejía; Televisión Mexicana</text:p>
          </table:table-cell>
          <table:table-cell office:value-type="string" calcext:value-type="string">
            <text:p>Ciudad de México, México</text:p>
          </table:table-cell>
          <table:table-cell office:value-type="float" office:value="19.427045" calcext:value-type="float">
            <text:p>19.427045</text:p>
          </table:table-cell>
          <table:table-cell office:value-type="float" office:value="-99.148944" calcext:value-type="float">
            <text:p>-99.1489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6.jpg</text:p>
          </table:table-cell>
          <table:table-cell office:value-type="string" calcext:value-type="string">
            <text:p>vson9q</text:p>
          </table:table-cell>
          <table:table-cell office:value-type="string" calcext:value-type="string">
            <text:p>image</text:p>
          </table:table-cell>
          <table:table-cell office:value-type="string" calcext:value-type="string">
            <text:p>/objects/impresion_026.jpg</text:p>
          </table:table-cell>
          <table:table-cell office:value-type="string" calcext:value-type="string">
            <text:p>/objects/small/impresion_026_sm.jpg</text:p>
          </table:table-cell>
          <table:table-cell office:value-type="string" calcext:value-type="string">
            <text:p>/objects/thumbs/impresion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7</text:p>
          </table:table-cell>
          <table:table-cell office:value-type="string" calcext:value-type="string">
            <text:p>Retrato de estudio</text:p>
          </table:table-cell>
          <table:table-cell office:value-type="float" office:value="1925" calcext:value-type="float">
            <text:p>1925</text:p>
          </table:table-cell>
          <table:table-cell/>
          <table:table-cell office:value-type="string" calcext:value-type="string">
            <text:p>Victor Studio</text:p>
          </table:table-cell>
          <table:table-cell/>
          <table:table-cell office:value-type="string" calcext:value-type="string">
            <text:p>Un retrato de estudio de una mujer joven capturado a finales de la década de 1920. El sujeto muestra una postura de tres cuartos, luciendo un cárdigan oscuro de punto con un cuello blanco prominente, un atuendo formal pero moderno para la época. La fotografía destaca por su iluminación suave y un fondo degradado característico del pictorialismo comercial de la época, con el sello en seco del 'Victor Studio' en el margen inferior.</text:p>
          </table:table-cell>
          <table:table-cell/>
          <table:table-cell office:value-type="string" calcext:value-type="string">
            <text:p>Retrato de estudio; Moda de los años 1920; Sello en seco</text:p>
          </table:table-cell>
          <table:table-cell office:value-type="string" calcext:value-type="string">
            <text:p>Manila, Filipinas</text:p>
          </table:table-cell>
          <table:table-cell office:value-type="float" office:value="14.5995" calcext:value-type="float">
            <text:p>14.5995</text:p>
          </table:table-cell>
          <table:table-cell office:value-type="float" office:value="120.9842" calcext:value-type="float">
            <text:p>120.98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7.jpg</text:p>
          </table:table-cell>
          <table:table-cell office:value-type="string" calcext:value-type="string">
            <text:p>9nknxr</text:p>
          </table:table-cell>
          <table:table-cell office:value-type="string" calcext:value-type="string">
            <text:p>image</text:p>
          </table:table-cell>
          <table:table-cell office:value-type="string" calcext:value-type="string">
            <text:p>/objects/impresion_027.jpg</text:p>
          </table:table-cell>
          <table:table-cell office:value-type="string" calcext:value-type="string">
            <text:p>/objects/small/impresion_027_sm.jpg</text:p>
          </table:table-cell>
          <table:table-cell office:value-type="string" calcext:value-type="string">
            <text:p>/objects/thumbs/impresion_02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8</text:p>
          </table:table-cell>
          <table:table-cell office:value-type="string" calcext:value-type="string">
            <text:p>Moda infantil</text:p>
          </table:table-cell>
          <table:table-cell office:value-type="float" office:value="1955" calcext:value-type="float">
            <text:p>1955</text:p>
          </table:table-cell>
          <table:table-cell/>
          <table:table-cell office:value-type="string" calcext:value-type="string">
            <text:p>Anónimo (Estudio fotográfico comercial)</text:p>
          </table:table-cell>
          <table:table-cell/>
          <table:table-cell office:value-type="string" calcext:value-type="string">
            <text:p>Retrato de estudio de una niña pequeña realizado a mediados del siglo XX. La imagen captura la estética infantil de la época, mostrando a la niña con una blusa blanca de cuello redondeado y un vestido tipo pichi de patrón de cuadros escoceses, sentada en una pose formal pero con una expresión natural y sonriente.</text:p>
          </table:table-cell>
          <table:table-cell/>
          <table:table-cell office:value-type="string" calcext:value-type="string">
            <text:p>Moda infantil; Retrato de estudio; Años 50</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8.jpg</text:p>
          </table:table-cell>
          <table:table-cell office:value-type="string" calcext:value-type="string">
            <text:p>e15nr</text:p>
          </table:table-cell>
          <table:table-cell office:value-type="string" calcext:value-type="string">
            <text:p>image</text:p>
          </table:table-cell>
          <table:table-cell office:value-type="string" calcext:value-type="string">
            <text:p>/objects/impresion_028.jpg</text:p>
          </table:table-cell>
          <table:table-cell office:value-type="string" calcext:value-type="string">
            <text:p>/objects/small/impresion_028_sm.jpg</text:p>
          </table:table-cell>
          <table:table-cell office:value-type="string" calcext:value-type="string">
            <text:p>/objects/thumbs/impresion_028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9</text:p>
          </table:table-cell>
          <table:table-cell office:value-type="string" calcext:value-type="string">
            <text:p>Retrato de estudio</text:p>
          </table:table-cell>
          <table:table-cell office:value-type="float" office:value="1895" calcext:value-type="float">
            <text:p>1895</text:p>
          </table:table-cell>
          <table:table-cell/>
          <table:table-cell office:value-type="string" calcext:value-type="string">
            <text:p>Jacob Ginther</text:p>
          </table:table-cell>
          <table:table-cell/>
          <table:table-cell office:value-type="string" calcext:value-type="string">
            <text:p>Retrato de estudio de una mujer joven con el cabello rizado y peinado hacia arriba, apoyada sobre un mueble tapizado. La sujeto viste una prenda de tonos claros con detalles de encaje en el cuello y mangas abullonadas, característica de la transición entre la moda victoriana tardía y la era eduardiana.</text:p>
          </table:table-cell>
          <table:table-cell/>
          <table:table-cell office:value-type="string" calcext:value-type="string">
            <text:p>Retrato de estudio; Tarjeta de gabinete; Moda victoriana</text:p>
          </table:table-cell>
          <table:table-cell office:value-type="string" calcext:value-type="string">
            <text:p>Buffalo, Nueva York, Estados Unidos</text:p>
          </table:table-cell>
          <table:table-cell office:value-type="float" office:value="42.8841" calcext:value-type="float">
            <text:p>42.8841</text:p>
          </table:table-cell>
          <table:table-cell office:value-type="float" office:value="-78.8753" calcext:value-type="float">
            <text:p>-78.87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9.jpg</text:p>
          </table:table-cell>
          <table:table-cell office:value-type="string" calcext:value-type="string">
            <text:p>0qd4jh</text:p>
          </table:table-cell>
          <table:table-cell office:value-type="string" calcext:value-type="string">
            <text:p>image</text:p>
          </table:table-cell>
          <table:table-cell office:value-type="string" calcext:value-type="string">
            <text:p>/objects/impresion_029.jpg</text:p>
          </table:table-cell>
          <table:table-cell office:value-type="string" calcext:value-type="string">
            <text:p>/objects/small/impresion_029_sm.jpg</text:p>
          </table:table-cell>
          <table:table-cell office:value-type="string" calcext:value-type="string">
            <text:p>/objects/thumbs/impresion_02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0</text:p>
          </table:table-cell>
          <table:table-cell office:value-type="string" calcext:value-type="string">
            <text:p>Hacienda</text:p>
          </table:table-cell>
          <table:table-cell office:value-type="float" office:value="1950" calcext:value-type="float">
            <text:p>1950</text:p>
          </table:table-cell>
          <table:table-cell/>
          <table:table-cell office:value-type="string" calcext:value-type="string">
            <text:p>Anónimo (Cámara de aficionado)</text:p>
          </table:table-cell>
          <table:table-cell/>
          <table:table-cell office:value-type="string" calcext:value-type="string">
            <text:p>Fotografía grupal de cinco adultos posando frente a una estructura rural con techo de zinc. La imagen captura a tres mujeres y dos hombres vestidos con moda típica de mediados del siglo XX, sugiriendo una visita familiar o social a una propiedad agrícola o finca. La composición y vestimenta reflejan un estatus socioeconómico de clase media-alta en un entorno rural en desarrollo.</text:p>
          </table:table-cell>
          <table:table-cell/>
          <table:table-cell office:value-type="string" calcext:value-type="string">
            <text:p>Hacienda; Moda años 50; Retrato familiar</text:p>
          </table:table-cell>
          <table:table-cell office:value-type="string" calcext:value-type="string">
            <text:p>Región Cafetera, Antioquia, Colombia</text:p>
          </table:table-cell>
          <table:table-cell office:value-type="float" office:value="6.2442" calcext:value-type="float">
            <text:p>6.2442</text:p>
          </table:table-cell>
          <table:table-cell office:value-type="float" office:value="-75.5812" calcext:value-type="float">
            <text:p>-75.581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0.jpg</text:p>
          </table:table-cell>
          <table:table-cell office:value-type="string" calcext:value-type="string">
            <text:p>uy02ne</text:p>
          </table:table-cell>
          <table:table-cell office:value-type="string" calcext:value-type="string">
            <text:p>image</text:p>
          </table:table-cell>
          <table:table-cell office:value-type="string" calcext:value-type="string">
            <text:p>/objects/impresion_030.jpg</text:p>
          </table:table-cell>
          <table:table-cell office:value-type="string" calcext:value-type="string">
            <text:p>/objects/small/impresion_030_sm.jpg</text:p>
          </table:table-cell>
          <table:table-cell office:value-type="string" calcext:value-type="string">
            <text:p>/objects/thumbs/impresion_030_th.jpg</text:p>
          </table:table-cell>
          <table:table-cell table:number-columns-repeated="2"/>
          <table:table-cell office:value-type="string" calcext:value-type="string">
            <text:p>Copia por contacto de un negativo de formato medi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table:number-columns-repeated="2" office:value-type="string" calcext:value-type="string">
            <text:p>Negativo</text:p>
          </table:table-cell>
        </table:table-row>
        <table:table-row table:style-name="ro1">
          <table:table-cell office:value-type="string" calcext:value-type="string">
            <text:p>impresion_031</text:p>
          </table:table-cell>
          <table:table-cell office:value-type="string" calcext:value-type="string">
            <text:p>Ciudad Universitaria UNAM</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pareja posa frente al bajorrelieve en piedra del Estadio Olímpico Universitario en la Ciudad Universitaria de la UNAM. El fondo muestra una sección detallada del mural de Diego Rivera titulado 'La Universidad, la familia y el deporte en México', caracterizado por su técnica de mosaico de piedras naturales de colores. El hombre viste un traje formal típico de mediados del siglo XX y la mujer un abrigo oscuro con cuello blanco, reflejando la moda académica o de clase media-alta de la época en México.</text:p>
          </table:table-cell>
          <table:table-cell/>
          <table:table-cell office:value-type="string" calcext:value-type="string">
            <text:p>Ciudad Universitaria UNAM; Diego Rivera; Muralismo Mexicano</text:p>
          </table:table-cell>
          <table:table-cell office:value-type="string" calcext:value-type="string">
            <text:p>Estadio Olímpico Universitario, Ciudad de México, México</text:p>
          </table:table-cell>
          <table:table-cell office:value-type="float" office:value="19.3331" calcext:value-type="float">
            <text:p>19.3331</text:p>
          </table:table-cell>
          <table:table-cell office:value-type="float" office:value="-99.1925" calcext:value-type="float">
            <text:p>-99.19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1.jpg</text:p>
          </table:table-cell>
          <table:table-cell office:value-type="string" calcext:value-type="string">
            <text:p>z0ozy</text:p>
          </table:table-cell>
          <table:table-cell office:value-type="string" calcext:value-type="string">
            <text:p>image</text:p>
          </table:table-cell>
          <table:table-cell office:value-type="string" calcext:value-type="string">
            <text:p>/objects/impresion_031.jpg</text:p>
          </table:table-cell>
          <table:table-cell office:value-type="string" calcext:value-type="string">
            <text:p>/objects/small/impresion_031_sm.jpg</text:p>
          </table:table-cell>
          <table:table-cell office:value-type="string" calcext:value-type="string">
            <text:p>/objects/thumbs/impresion_03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2</text:p>
          </table:table-cell>
          <table:table-cell office:value-type="string" calcext:value-type="string">
            <text:p>Reunión so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Composición fotográfica que muestra una escena social en un exterior sombreado por un toldo de lona. Se aprecian figuras masculinas vestidas con trajes formales y corbatas, sentadas a mesas dispuestas para un almuerzo o recepción. La imagen se presenta en un formato de hoja de contacto o prueba de impresión con tres versiones de la misma toma: una principal de mayor tamaño y dos miniaturas verticales a la derecha. El estado de conservación muestra un severo virado hacia los tonos rojos y naranjas.</text:p>
          </table:table-cell>
          <table:table-cell/>
          <table:table-cell office:value-type="string" calcext:value-type="string">
            <text:p>Reunión social; Jardín residencial; Moda formal masculina</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2.jpg</text:p>
          </table:table-cell>
          <table:table-cell office:value-type="string" calcext:value-type="string">
            <text:p>gs0rvh</text:p>
          </table:table-cell>
          <table:table-cell office:value-type="string" calcext:value-type="string">
            <text:p>image</text:p>
          </table:table-cell>
          <table:table-cell office:value-type="string" calcext:value-type="string">
            <text:p>/objects/impresion_032.jpg</text:p>
          </table:table-cell>
          <table:table-cell office:value-type="string" calcext:value-type="string">
            <text:p>/objects/small/impresion_032_sm.jpg</text:p>
          </table:table-cell>
          <table:table-cell office:value-type="string" calcext:value-type="string">
            <text:p>/objects/thumbs/impresion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3</text:p>
          </table:table-cell>
          <table:table-cell office:value-type="string" calcext:value-type="string">
            <text:p>Retrato familiar</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Un retrato grupal de siete personas, probablemente una familia extendida, posando frente a una estructura de mampostería y ladrillo. La imagen captura a tres generaciones con vestimenta formal y semicubierta, reflejando las normas sociales y de moda de la clase media urbana o semi-rural a mediados del siglo XX.</text:p>
          </table:table-cell>
          <table:table-cell/>
          <table:table-cell office:value-type="string" calcext:value-type="string">
            <text:p>Retrato familiar; Vestimenta de posguerra; Vida cotidian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3.jpg</text:p>
          </table:table-cell>
          <table:table-cell office:value-type="string" calcext:value-type="string">
            <text:p>5gg8bq</text:p>
          </table:table-cell>
          <table:table-cell office:value-type="string" calcext:value-type="string">
            <text:p>image</text:p>
          </table:table-cell>
          <table:table-cell office:value-type="string" calcext:value-type="string">
            <text:p>/objects/impresion_033.jpg</text:p>
          </table:table-cell>
          <table:table-cell office:value-type="string" calcext:value-type="string">
            <text:p>/objects/small/impresion_033_sm.jpg</text:p>
          </table:table-cell>
          <table:table-cell office:value-type="string" calcext:value-type="string">
            <text:p>/objects/thumbs/impresion_03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34</text:p>
          </table:table-cell>
          <table:table-cell office:value-type="string" calcext:value-type="string">
            <text:p>Antilles Department</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de un soldado de infantería de los Estados Unidos, identificado como miembro del Departamento de las Antillas (Antilles Department) por la insignia en su hombro izquierdo. El sujeto viste el uniforme de servicio de verano caqui ('khakis') con corbata negra y discos de cuello reglamentarios, posando en una composición clásica de mediados del siglo XX.</text:p>
          </table:table-cell>
          <table:table-cell/>
          <table:table-cell office:value-type="string" calcext:value-type="string">
            <text:p>Antilles Department; Uniforme militar; Retrato de estudio</text:p>
          </table:table-cell>
          <table:table-cell office:value-type="string" calcext:value-type="string">
            <text:p>San Juan, Puerto Rico</text:p>
          </table:table-cell>
          <table:table-cell office:value-type="float" office:value="18.4655" calcext:value-type="float">
            <text:p>18.4655</text:p>
          </table:table-cell>
          <table:table-cell office:value-type="float" office:value="-66.1057" calcext:value-type="float">
            <text:p>-66.105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4.jpg</text:p>
          </table:table-cell>
          <table:table-cell office:value-type="string" calcext:value-type="string">
            <text:p>csjc8n</text:p>
          </table:table-cell>
          <table:table-cell office:value-type="string" calcext:value-type="string">
            <text:p>image</text:p>
          </table:table-cell>
          <table:table-cell office:value-type="string" calcext:value-type="string">
            <text:p>/objects/impresion_034.jpg</text:p>
          </table:table-cell>
          <table:table-cell office:value-type="string" calcext:value-type="string">
            <text:p>/objects/small/impresion_034_sm.jpg</text:p>
          </table:table-cell>
          <table:table-cell office:value-type="string" calcext:value-type="string">
            <text:p>/objects/thumbs/impresion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5</text:p>
          </table:table-cell>
          <table:table-cell office:value-type="string" calcext:value-type="string">
            <text:p>Moda años 70</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Retrato triple de un hombre joven sentado en un sofá dentro de un entorno doméstico. La imagen muestra tres impresiones idénticas dispuestas en una composición vertical y lateral, característica de las pruebas de impresión o servicios de revelado comercial de la época. El sujeto viste una camisa de cuadros con cuellos anchos y luce patillas prominentes, elementos icónicos de la moda de principios de la década de 1970. El fondo revela detalles de un interior residencial típico, incluyendo muebles de madera y cortinas de tela gruesa.</text:p>
          </table:table-cell>
          <table:table-cell/>
          <table:table-cell office:value-type="string" calcext:value-type="string">
            <text:p>Moda años 70; Fotografía vernácula; Retrato masculino</text:p>
          </table:table-cell>
          <table:table-cell office:value-type="string" calcext:value-type="string">
            <text:p>Estados Unidos (Ubicación exacta indeterminada,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5.jpg</text:p>
          </table:table-cell>
          <table:table-cell office:value-type="string" calcext:value-type="string">
            <text:p>xj85d</text:p>
          </table:table-cell>
          <table:table-cell office:value-type="string" calcext:value-type="string">
            <text:p>image</text:p>
          </table:table-cell>
          <table:table-cell office:value-type="string" calcext:value-type="string">
            <text:p>/objects/impresion_035.jpg</text:p>
          </table:table-cell>
          <table:table-cell office:value-type="string" calcext:value-type="string">
            <text:p>/objects/small/impresion_035_sm.jpg</text:p>
          </table:table-cell>
          <table:table-cell office:value-type="string" calcext:value-type="string">
            <text:p>/objects/thumbs/impresion_035_th.jpg</text:p>
          </table:table-cell>
          <table:table-cell table:number-columns-repeated="2"/>
          <table:table-cell office:value-type="string" calcext:value-type="string">
            <text:p>Impresión cromogénica sobre papel con base de resina (RC)</text:p>
          </table:table-cell>
          <table:table-cell office:value-type="string" calcext:value-type="string">
            <text:p>Papel</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6</text:p>
          </table:table-cell>
          <table:table-cell office:value-type="string" calcext:value-type="string">
            <text:p>Manuel Benítez El Cordobés</text:p>
          </table:table-cell>
          <table:table-cell office:value-type="float" office:value="1965" calcext:value-type="float">
            <text:p>1965</text:p>
          </table:table-cell>
          <table:table-cell/>
          <table:table-cell office:value-type="string" calcext:value-type="string">
            <text:p>Francisco Cano 'Canito'</text:p>
          </table:table-cell>
          <table:table-cell/>
          <table:table-cell office:value-type="string" calcext:value-type="string">
            <text:p>Fotografía a color que muestra al famoso matador de toros Manuel Benítez 'El Cordobés' en el callejón de una plaza de toros, rodeado de otras figuras de la época. El Cordobés aparece sonriente, vistiendo un traje oscuro y corbata, saliendo por una puerta de madera que muestra el hierro (marca ganadera) de Samuel Flores (una letra 'S' coronada). La escena captura la efervescencia social de la tauromaquia en la década de 1960, donde los toreros eran auténticos íconos de la cultura popular y el 'jet set'.</text:p>
          </table:table-cell>
          <table:table-cell/>
          <table:table-cell office:value-type="string" calcext:value-type="string">
            <text:p>Manuel Benítez El Cordobés; Ganadería Samuel Flores; Tauromaquia años 60</text:p>
          </table:table-cell>
          <table:table-cell office:value-type="string" calcext:value-type="string">
            <text:p>Plaza de Toros de Las Ventas, Madrid</text:p>
          </table:table-cell>
          <table:table-cell office:value-type="float" office:value="40.4319" calcext:value-type="float">
            <text:p>40.4319</text:p>
          </table:table-cell>
          <table:table-cell office:value-type="float" office:value="-3.6634" calcext:value-type="float">
            <text:p>-3.66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6.jpg</text:p>
          </table:table-cell>
          <table:table-cell office:value-type="string" calcext:value-type="string">
            <text:p>a4lf4c</text:p>
          </table:table-cell>
          <table:table-cell office:value-type="string" calcext:value-type="string">
            <text:p>image</text:p>
          </table:table-cell>
          <table:table-cell office:value-type="string" calcext:value-type="string">
            <text:p>/objects/impresion_036.jpg</text:p>
          </table:table-cell>
          <table:table-cell office:value-type="string" calcext:value-type="string">
            <text:p>/objects/small/impresion_036_sm.jpg</text:p>
          </table:table-cell>
          <table:table-cell office:value-type="string" calcext:value-type="string">
            <text:p>/objects/thumbs/impresion_036_th.jpg</text:p>
          </table:table-cell>
          <table:table-cell table:number-columns-repeated="2"/>
          <table:table-cell office:value-type="string" calcext:value-type="string">
            <text:p>Fotografía analógica de formato cuadr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7</text:p>
          </table:table-cell>
          <table:table-cell office:value-type="string" calcext:value-type="string">
            <text:p>Retrato de anuario</text:p>
          </table:table-cell>
          <table:table-cell office:value-type="float" office:value="1972" calcext:value-type="float">
            <text:p>1972</text:p>
          </table:table-cell>
          <table:table-cell/>
          <table:table-cell office:value-type="string" calcext:value-type="string">
            <text:p>Fotógrafo de estudio comercial (Anónimo)</text:p>
          </table:table-cell>
          <table:table-cell/>
          <table:table-cell office:value-type="string" calcext:value-type="string">
            <text:p>Retrato de estudio de un joven de ascendencia asiática, característico de las fotografías de anuarios escolares o graduaciones de mediados de la década de 1970 en los Estados Unidos. El sujeto viste un saco de tweed con solapas anchas, una camisa de color naranja intenso con cuello largo en punta y una corbata ancha a rayas, elementos que definen la estética masculina de la era post-psicodélica.</text:p>
          </table:table-cell>
          <table:table-cell/>
          <table:table-cell office:value-type="string" calcext:value-type="string">
            <text:p>Retrato de anuario; Moda de los años 70; Comunidad asiático-americana</text:p>
          </table:table-cell>
          <table:table-cell office:value-type="string" calcext:value-type="string">
            <text:p>California, Estados Unidos</text:p>
          </table:table-cell>
          <table:table-cell office:value-type="float" office:value="37.7749" calcext:value-type="float">
            <text:p>37.7749</text:p>
          </table:table-cell>
          <table:table-cell office:value-type="float" office:value="-122.4194" calcext:value-type="float">
            <text:p>-122.41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7.jpg</text:p>
          </table:table-cell>
          <table:table-cell office:value-type="string" calcext:value-type="string">
            <text:p>rzg4o</text:p>
          </table:table-cell>
          <table:table-cell office:value-type="string" calcext:value-type="string">
            <text:p>image</text:p>
          </table:table-cell>
          <table:table-cell office:value-type="string" calcext:value-type="string">
            <text:p>/objects/impresion_037.jpg</text:p>
          </table:table-cell>
          <table:table-cell office:value-type="string" calcext:value-type="string">
            <text:p>/objects/small/impresion_037_sm.jpg</text:p>
          </table:table-cell>
          <table:table-cell office:value-type="string" calcext:value-type="string">
            <text:p>/objects/thumbs/impresion_03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8</text:p>
          </table:table-cell>
          <table:table-cell office:value-type="string" calcext:value-type="string">
            <text:p>Retrato familiar</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 retrato familiar extenso de mediados del siglo XX que muestra a trece personas de distintas generaciones posando frente a una pared de ladrillo en un entorno exterior doméstico. La imagen captura la estructura social y la moda de la época, con el patriarca de la familia situado en el centro rodeado por niños, jóvenes y adultos.</text:p>
          </table:table-cell>
          <table:table-cell/>
          <table:table-cell office:value-type="string" calcext:value-type="string">
            <text:p>Retrato familiar; México posrevolucionario; Vestimenta de los años 5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8.jpg</text:p>
          </table:table-cell>
          <table:table-cell office:value-type="string" calcext:value-type="string">
            <text:p>hcz8pa</text:p>
          </table:table-cell>
          <table:table-cell office:value-type="string" calcext:value-type="string">
            <text:p>image</text:p>
          </table:table-cell>
          <table:table-cell office:value-type="string" calcext:value-type="string">
            <text:p>/objects/impresion_038.jpg</text:p>
          </table:table-cell>
          <table:table-cell office:value-type="string" calcext:value-type="string">
            <text:p>/objects/small/impresion_038_sm.jpg</text:p>
          </table:table-cell>
          <table:table-cell office:value-type="string" calcext:value-type="string">
            <text:p>/objects/thumbs/impresion_038_th.jpg</text:p>
          </table:table-cell>
          <table:table-cell table:number-columns-repeated="2"/>
          <table:table-cell office:value-type="string" calcext:value-type="string">
            <text:p>Impresión de época en papel de gelatina de bromuro de plat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9</text:p>
          </table:table-cell>
          <table:table-cell office:value-type="string" calcext:value-type="string">
            <text:p>William Barclay Parsons</text:p>
          </table:table-cell>
          <table:table-cell office:value-type="float" office:value="1880" calcext:value-type="float">
            <text:p>1880</text:p>
          </table:table-cell>
          <table:table-cell/>
          <table:table-cell office:value-type="string" calcext:value-type="string">
            <text:p>Anónimo (Estudio fotográfico de Nueva York)</text:p>
          </table:table-cell>
          <table:table-cell/>
          <table:table-cell office:value-type="string" calcext:value-type="string">
            <text:p>Retrato de estudio de finales del siglo XIX que muestra a un joven identificado como William Barclay Parsons (1859-1932), el destacado ingeniero civil estadounidense responsable de la planificación y construcción de las primeras líneas del Metro de Nueva York. El sujeto viste ropa formal de la época Gilded Age, reflejando su estatus social y profesional.</text:p>
          </table:table-cell>
          <table:table-cell/>
          <table:table-cell office:value-type="string" calcext:value-type="string">
            <text:p>William Barclay Parsons; Retrato de gabinete; Ingeniería civil</text:p>
          </table:table-cell>
          <table:table-cell office:value-type="string" calcext:value-type="string">
            <text:p>Nueva York, Estados Unidos</text:p>
          </table:table-cell>
          <table:table-cell office:value-type="float" office:value="40.712778" calcext:value-type="float">
            <text:p>40.712778</text:p>
          </table:table-cell>
          <table:table-cell office:value-type="float" office:value="-74.005973" calcext:value-type="float">
            <text:p>-74.00597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9.jpg</text:p>
          </table:table-cell>
          <table:table-cell office:value-type="string" calcext:value-type="string">
            <text:p>paa66r</text:p>
          </table:table-cell>
          <table:table-cell office:value-type="string" calcext:value-type="string">
            <text:p>image</text:p>
          </table:table-cell>
          <table:table-cell office:value-type="string" calcext:value-type="string">
            <text:p>/objects/impresion_039.jpg</text:p>
          </table:table-cell>
          <table:table-cell office:value-type="string" calcext:value-type="string">
            <text:p>/objects/small/impresion_039_sm.jpg</text:p>
          </table:table-cell>
          <table:table-cell office:value-type="string" calcext:value-type="string">
            <text:p>/objects/thumbs/impresion_03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0</text:p>
          </table:table-cell>
          <table:table-cell office:value-type="string" calcext:value-type="string">
            <text:p>Artes decorativas</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Fotografía doméstica de una lámpara de sobremesa de estilo decorativo, cuya base presenta una escultura figurativa de un mono o simio en una postura dinámica. El objeto descansa sobre un mantel de encaje blanco con patrones florales, situado frente a unas cortinas pesadas de color oscuro. La iluminación proviene de un flash frontal que genera sombras marcadas y resalta los pliegues de la pantalla de la lámpara, la cual es de color crema con un borde granate o rojo oscuro.</text:p>
          </table:table-cell>
          <table:table-cell/>
          <table:table-cell office:value-type="string" calcext:value-type="string">
            <text:p>Artes decorativas; Mobiliario doméstico; Estética kitsch</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0.jpg</text:p>
          </table:table-cell>
          <table:table-cell office:value-type="string" calcext:value-type="string">
            <text:p>yuak1</text:p>
          </table:table-cell>
          <table:table-cell office:value-type="string" calcext:value-type="string">
            <text:p>image</text:p>
          </table:table-cell>
          <table:table-cell office:value-type="string" calcext:value-type="string">
            <text:p>/objects/impresion_040.jpg</text:p>
          </table:table-cell>
          <table:table-cell office:value-type="string" calcext:value-type="string">
            <text:p>/objects/small/impresion_040_sm.jpg</text:p>
          </table:table-cell>
          <table:table-cell office:value-type="string" calcext:value-type="string">
            <text:p>/objects/thumbs/impresion_04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1</text:p>
          </table:table-cell>
          <table:table-cell office:value-type="string" calcext:value-type="string">
            <text:p>Arte textil</text:p>
          </table:table-cell>
          <table:table-cell office:value-type="float" office:value="2010" calcext:value-type="float">
            <text:p>2010</text:p>
          </table:table-cell>
          <table:table-cell/>
          <table:table-cell office:value-type="string" calcext:value-type="string">
            <text:p>Stacey Page</text:p>
          </table:table-cell>
          <table:table-cell/>
          <table:table-cell office:value-type="string" calcext:value-type="string">
            <text:p>Esta imagen documenta una obra de arte contemporánea que fusiona la fotografía y el bordado. Se trata de un bastidor ovalado que contiene una silueta femenina estilizada, cuya única vestimenta, un conjunto de lencería de mediados del siglo XX, ha sido meticulosamente bordada con hilo blanco. La pieza está colocada sobre una superficie textil blanca con volantes, sugiriendo una ambientación doméstica o de tocador.</text:p>
          </table:table-cell>
          <table:table-cell/>
          <table:table-cell office:value-type="string" calcext:value-type="string">
            <text:p>Arte textil; Bordado contemporáneo; Silueta femenina</text:p>
          </table:table-cell>
          <table:table-cell office:value-type="string" calcext:value-type="string">
            <text:p>Estados Unidos</text:p>
          </table:table-cell>
          <table:table-cell office:value-type="float" office:value="35.7596" calcext:value-type="float">
            <text:p>35.7596</text:p>
          </table:table-cell>
          <table:table-cell office:value-type="float" office:value="-79.0193" calcext:value-type="float">
            <text:p>-79.019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1.jpg</text:p>
          </table:table-cell>
          <table:table-cell office:value-type="string" calcext:value-type="string">
            <text:p>my08c</text:p>
          </table:table-cell>
          <table:table-cell office:value-type="string" calcext:value-type="string">
            <text:p>image</text:p>
          </table:table-cell>
          <table:table-cell office:value-type="string" calcext:value-type="string">
            <text:p>/objects/impresion_041.jpg</text:p>
          </table:table-cell>
          <table:table-cell office:value-type="string" calcext:value-type="string">
            <text:p>/objects/small/impresion_041_sm.jpg</text:p>
          </table:table-cell>
          <table:table-cell office:value-type="string" calcext:value-type="string">
            <text:p>/objects/thumbs/impresion_041_th.jpg</text:p>
          </table:table-cell>
          <table:table-cell table:number-columns-repeated="2"/>
          <table:table-cell office:value-type="string" calcext:value-type="string">
            <text:p>Fotografía en formato instantáneo tipo Polaroid</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2</text:p>
          </table:table-cell>
          <table:table-cell office:value-type="string" calcext:value-type="string">
            <text:p>Fujifilm</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La imagen muestra el reverso o una hoja de prueba subexpuesta de una película fotográfica instantánea profesional. No contiene una escena capturada, sino que es un registro material de un soporte químico utilizado extensamente en la industria fotográfica para pruebas de iluminación y previsualización antes de disparar en formatos mayores o película tradicional.</text:p>
          </table:table-cell>
          <table:table-cell/>
          <table:table-cell office:value-type="string" calcext:value-type="string">
            <text:p>Fujifilm; Material fotográfico; Prueba técnica</text:p>
          </table:table-cell>
          <table:table-cell office:value-type="string" calcext:value-type="string">
            <text:p>Minamiashigara, Prefectura de Kanagawa, Japón (Lugar de fabricación)</text:p>
          </table:table-cell>
          <table:table-cell office:value-type="float" office:value="35.318" calcext:value-type="float">
            <text:p>35.318</text:p>
          </table:table-cell>
          <table:table-cell office:value-type="float" office:value="139.111" calcext:value-type="float">
            <text:p>139.1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2.jpg</text:p>
          </table:table-cell>
          <table:table-cell office:value-type="string" calcext:value-type="string">
            <text:p>ow3zen</text:p>
          </table:table-cell>
          <table:table-cell office:value-type="string" calcext:value-type="string">
            <text:p>image</text:p>
          </table:table-cell>
          <table:table-cell office:value-type="string" calcext:value-type="string">
            <text:p>/objects/impresion_042.jpg</text:p>
          </table:table-cell>
          <table:table-cell office:value-type="string" calcext:value-type="string">
            <text:p>/objects/small/impresion_042_sm.jpg</text:p>
          </table:table-cell>
          <table:table-cell office:value-type="string" calcext:value-type="string">
            <text:p>/objects/thumbs/impresion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3</text:p>
          </table:table-cell>
          <table:table-cell office:value-type="string" calcext:value-type="string">
            <text:p>Inscripción manuscrit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verso de una fotografía antigua que contiene una inscripción manuscrita en tinta azul. El texto reza 'Dads' carved lamp ~ Polly's', indicando que la imagen original documentaba una pieza de artesanía doméstica (una lámpara tallada) perteneciente al padre del remitente y probablemente ubicada o heredada por alguien llamado Polly.</text:p>
          </table:table-cell>
          <table:table-cell/>
          <table:table-cell office:value-type="string" calcext:value-type="string">
            <text:p>Inscripción manuscrita; Memoria familiar; Artesanía</text:p>
          </table:table-cell>
          <table:table-cell office:value-type="string" calcext:value-type="string">
            <text:p>Estados Unidos (contexto doméstic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3.jpg</text:p>
          </table:table-cell>
          <table:table-cell office:value-type="string" calcext:value-type="string">
            <text:p>ssv543</text:p>
          </table:table-cell>
          <table:table-cell office:value-type="string" calcext:value-type="string">
            <text:p>image</text:p>
          </table:table-cell>
          <table:table-cell office:value-type="string" calcext:value-type="string">
            <text:p>/objects/impresion_043.jpg</text:p>
          </table:table-cell>
          <table:table-cell office:value-type="string" calcext:value-type="string">
            <text:p>/objects/small/impresion_043_sm.jpg</text:p>
          </table:table-cell>
          <table:table-cell office:value-type="string" calcext:value-type="string">
            <text:p>/objects/thumbs/impresion_043_th.jpg</text:p>
          </table:table-cell>
          <table:table-cell table:number-columns-repeated="2"/>
          <table:table-cell office:value-type="string" calcext:value-type="string">
            <text:p>Soporte de papel fotográfico de fibra con acabado mate</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4</text:p>
          </table:table-cell>
          <table:table-cell office:value-type="string" calcext:value-type="string">
            <text:p>Navidad</text:p>
          </table:table-cell>
          <table:table-cell office:value-type="float" office:value="1959" calcext:value-type="float">
            <text:p>1959</text:p>
          </table:table-cell>
          <table:table-cell/>
          <table:table-cell office:value-type="string" calcext:value-type="string">
            <text:p>Anónimo</text:p>
          </table:table-cell>
          <table:table-cell/>
          <table:table-cell office:value-type="string" calcext:value-type="string">
            <text:p>Fotografía vernácula de un retrato familiar durante la época navideña, mostrando a tres mujeres y dos niños posando frente a un árbol de Navidad blanco de estilo 'flocado' o de aluminio. La escena ocurre en un interior doméstico con elementos arquitectónicos típicos de mediados de siglo XX, como un arco de medio punto y papel tapiz decorativo visible en el fondo.</text:p>
          </table:table-cell>
          <table:table-cell/>
          <table:table-cell office:value-type="string" calcext:value-type="string">
            <text:p>Navidad; Retrato familiar; Años 50</text:p>
          </table:table-cell>
          <table:table-cell office:value-type="string" calcext:value-type="string">
            <text:p>Suroeste de los Estados Unidos (probablemente Los Ángeles, California)</text:p>
          </table:table-cell>
          <table:table-cell office:value-type="float" office:value="34.0522" calcext:value-type="float">
            <text:p>34.0522</text:p>
          </table:table-cell>
          <table:table-cell office:value-type="float" office:value="-118.2437" calcext:value-type="float">
            <text:p>-118.243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4.jpg</text:p>
          </table:table-cell>
          <table:table-cell office:value-type="string" calcext:value-type="string">
            <text:p>ezd13f</text:p>
          </table:table-cell>
          <table:table-cell office:value-type="string" calcext:value-type="string">
            <text:p>image</text:p>
          </table:table-cell>
          <table:table-cell office:value-type="string" calcext:value-type="string">
            <text:p>/objects/impresion_044.jpg</text:p>
          </table:table-cell>
          <table:table-cell office:value-type="string" calcext:value-type="string">
            <text:p>/objects/small/impresion_044_sm.jpg</text:p>
          </table:table-cell>
          <table:table-cell office:value-type="string" calcext:value-type="string">
            <text:p>/objects/thumbs/impresion_04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5</text:p>
          </table:table-cell>
          <table:table-cell office:value-type="string" calcext:value-type="string">
            <text:p>Verso</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El reverso de una fotografía analógica instantánea que muestra la marca de agua 'POLAROID' estampada en tinta azul, junto con códigos de producción alfanuméricos. Se observa un borde dentado (deckle edge) en el lateral derecho y números de serie o lote impresos en los márgenes, típicos de los soportes de revelado inmediato de mediados del siglo XX.</text:p>
          </table:table-cell>
          <table:table-cell/>
          <table:table-cell office:value-type="string" calcext:value-type="string">
            <text:p>Verso; Polaroid; Fotografía instantánea</text:p>
          </table:table-cell>
          <table:table-cell office:value-type="string" calcext:value-type="string">
            <text:p>Indeterminada (Origen probable en Estados Unidos o Europa)</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5.jpg</text:p>
          </table:table-cell>
          <table:table-cell office:value-type="string" calcext:value-type="string">
            <text:p>zespht</text:p>
          </table:table-cell>
          <table:table-cell office:value-type="string" calcext:value-type="string">
            <text:p>image</text:p>
          </table:table-cell>
          <table:table-cell office:value-type="string" calcext:value-type="string">
            <text:p>/objects/impresion_045.jpg</text:p>
          </table:table-cell>
          <table:table-cell office:value-type="string" calcext:value-type="string">
            <text:p>/objects/small/impresion_045_sm.jpg</text:p>
          </table:table-cell>
          <table:table-cell office:value-type="string" calcext:value-type="string">
            <text:p>/objects/thumbs/impresion_04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7</text:p>
          </table:table-cell>
          <table:table-cell office:value-type="string" calcext:value-type="string">
            <text:p>Coty</text:p>
          </table:table-cell>
          <table:table-cell office:value-type="float" office:value="1998" calcext:value-type="float">
            <text:p>1998</text:p>
          </table:table-cell>
          <table:table-cell/>
          <table:table-cell office:value-type="string" calcext:value-type="string">
            <text:p>Anónimo (Fotógrafo publicitario)</text:p>
          </table:table-cell>
          <table:table-cell/>
          <table:table-cell office:value-type="string" calcext:value-type="string">
            <text:p>Fotografía publicitaria de estudio que muestra tres envases de la línea de fragancias 'Body Fresh' de la marca Coty, específicamente las variantes 'Turquoise Seas', 'Peach' y 'Morning Glory'. La imagen presenta el producto en una composición minimalista típica de catálogos comerciales de finales del siglo XX.</text:p>
          </table:table-cell>
          <table:table-cell/>
          <table:table-cell office:value-type="string" calcext:value-type="string">
            <text:p>Coty; Cosmética; Publicidad</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7.jpg</text:p>
          </table:table-cell>
          <table:table-cell office:value-type="string" calcext:value-type="string">
            <text:p>hirrd9</text:p>
          </table:table-cell>
          <table:table-cell office:value-type="string" calcext:value-type="string">
            <text:p>image</text:p>
          </table:table-cell>
          <table:table-cell office:value-type="string" calcext:value-type="string">
            <text:p>/objects/impresion_047.jpg</text:p>
          </table:table-cell>
          <table:table-cell office:value-type="string" calcext:value-type="string">
            <text:p>/objects/small/impresion_047_sm.jpg</text:p>
          </table:table-cell>
          <table:table-cell office:value-type="string" calcext:value-type="string">
            <text:p>/objects/thumbs/impresion_04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8</text:p>
          </table:table-cell>
          <table:table-cell office:value-type="string" calcext:value-type="string">
            <text:p>Polaroid</text:p>
          </table:table-cell>
          <table:table-cell office:value-type="float" office:value="1988" calcext:value-type="float">
            <text:p>1988</text:p>
          </table:table-cell>
          <table:table-cell/>
          <table:table-cell office:value-type="string" calcext:value-type="string">
            <text:p>Anónimo (Fabricado por Polaroid Corporation)</text:p>
          </table:table-cell>
          <table:table-cell/>
          <table:table-cell office:value-type="string" calcext:value-type="string">
            <text:p>Reverso de una hoja de película fotográfica instantánea Polaroid de gran formato, mostrando marcas de fabricación y un código de lote industrial. El papel de soporte presenta una tonalidad grisácea característica y una solapa troquelada en el extremo derecho diseñada para la extracción de la película del chasis.</text:p>
          </table:table-cell>
          <table:table-cell/>
          <table:table-cell office:value-type="string" calcext:value-type="string">
            <text:p>Polaroid; Fotografía instantánea; Soporte físico</text:p>
          </table:table-cell>
          <table:table-cell office:value-type="string" calcext:value-type="string">
            <text:p>Cambridge, Massachusetts, Estados Unidos</text:p>
          </table:table-cell>
          <table:table-cell office:value-type="float" office:value="42.3635" calcext:value-type="float">
            <text:p>42.3635</text:p>
          </table:table-cell>
          <table:table-cell office:value-type="float" office:value="-71.0912" calcext:value-type="float">
            <text:p>-71.091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8.jpg</text:p>
          </table:table-cell>
          <table:table-cell office:value-type="string" calcext:value-type="string">
            <text:p>8kr99nb</text:p>
          </table:table-cell>
          <table:table-cell office:value-type="string" calcext:value-type="string">
            <text:p>image</text:p>
          </table:table-cell>
          <table:table-cell office:value-type="string" calcext:value-type="string">
            <text:p>/objects/impresion_048.jpg</text:p>
          </table:table-cell>
          <table:table-cell office:value-type="string" calcext:value-type="string">
            <text:p>/objects/small/impresion_048_sm.jpg</text:p>
          </table:table-cell>
          <table:table-cell office:value-type="string" calcext:value-type="string">
            <text:p>/objects/thumbs/impresion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50</text:p>
          </table:table-cell>
          <table:table-cell office:value-type="string" calcext:value-type="string">
            <text:p>Catolicismo</text:p>
          </table:table-cell>
          <table:table-cell office:value-type="float" office:value="1966" calcext:value-type="float">
            <text:p>1966</text:p>
          </table:table-cell>
          <table:table-cell/>
          <table:table-cell office:value-type="string" calcext:value-type="string">
            <text:p>Anónimo</text:p>
          </table:table-cell>
          <table:table-cell/>
          <table:table-cell office:value-type="string" calcext:value-type="string">
            <text:p>Retrato de grupo de cuatro mujeres jóvenes y un niño pequeño en lo que parece ser el patio de una parroquia o centro religioso. Las mujeres visten túnicas blancas con cordones cruzados (cíngulos), sugiriendo una filiación con una organización laica católica, posiblemente las Hijas de María. El entorno muestra una arquitectura moderna de mediados del siglo XX con muros de piedra volcánica y una techumbre de retícula metálica. El peinado 'bouffant' o 'beehive' de las jóvenes es característico de la moda de finales de la década de 1960.</text:p>
          </table:table-cell>
          <table:table-cell/>
          <table:table-cell office:value-type="string" calcext:value-type="string">
            <text:p>Catolicismo; Moda años 60; Hijas de María</text:p>
          </table:table-cell>
          <table:table-cell office:value-type="string" calcext:value-type="string">
            <text:p>Ciudad de México, zona sur (Coyoacán o Tlalpan)</text:p>
          </table:table-cell>
          <table:table-cell office:value-type="float" office:value="19.333333" calcext:value-type="float">
            <text:p>19.333333</text:p>
          </table:table-cell>
          <table:table-cell office:value-type="float" office:value="-99.183333" calcext:value-type="float">
            <text:p>-99.1833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0.jpg</text:p>
          </table:table-cell>
          <table:table-cell office:value-type="string" calcext:value-type="string">
            <text:p>18q0fs</text:p>
          </table:table-cell>
          <table:table-cell office:value-type="string" calcext:value-type="string">
            <text:p>image</text:p>
          </table:table-cell>
          <table:table-cell office:value-type="string" calcext:value-type="string">
            <text:p>/objects/impresion_050.jpg</text:p>
          </table:table-cell>
          <table:table-cell office:value-type="string" calcext:value-type="string">
            <text:p>/objects/small/impresion_050_sm.jpg</text:p>
          </table:table-cell>
          <table:table-cell office:value-type="string" calcext:value-type="string">
            <text:p>/objects/thumbs/impresion_05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1</text:p>
          </table:table-cell>
          <table:table-cell office:value-type="string" calcext:value-type="string">
            <text:p>Interiorism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Fotografía en blanco y negro de un rincón interior que destaca una ornamentada lámpara de pie de estilo neobarroco o renacentista. La escena incluye una cortina plisada a la izquierda, una rejilla de ventilación de aire forzado en la base de la pared derecha y lo que parece ser un fragmento de un papel pintado panorámico o mural en el extremo derecho.</text:p>
          </table:table-cell>
          <table:table-cell/>
          <table:table-cell office:value-type="string" calcext:value-type="string">
            <text:p>Interiorismo; Lámpara de pie; Arquitectura doméstica</text:p>
          </table:table-cell>
          <table:table-cell office:value-type="string" calcext:value-type="string">
            <text:p>Estados Unidos (Probable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1.jpg</text:p>
          </table:table-cell>
          <table:table-cell office:value-type="string" calcext:value-type="string">
            <text:p>soas3v</text:p>
          </table:table-cell>
          <table:table-cell office:value-type="string" calcext:value-type="string">
            <text:p>image</text:p>
          </table:table-cell>
          <table:table-cell office:value-type="string" calcext:value-type="string">
            <text:p>/objects/impresion_051.jpg</text:p>
          </table:table-cell>
          <table:table-cell office:value-type="string" calcext:value-type="string">
            <text:p>/objects/small/impresion_051_sm.jpg</text:p>
          </table:table-cell>
          <table:table-cell office:value-type="string" calcext:value-type="string">
            <text:p>/objects/thumbs/impresion_051_th.jpg</text:p>
          </table:table-cell>
          <table:table-cell table:number-columns-repeated="2"/>
          <table:table-cell office:value-type="string" calcext:value-type="string">
            <text:p>Impresión en gelatina de plata sobre papel de fibr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2</text:p>
          </table:table-cell>
          <table:table-cell office:value-type="string" calcext:value-type="string">
            <text:p>Fotografía vernácul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trato familiar vernáculo de mediados del siglo XX que muestra a dos mujeres, un hombre y dos niños posando en los escalones de ladrillo de una residencia suburbana. La imagen es un ejemplo clásico de la fotografía doméstica de posguerra en Norteamérica, capturando la vestimenta formal típica de las reuniones familiares, incluyendo vestidos con patrones florales y geométricos, collares de perlas y trajes masculinos de corte recto.</text:p>
          </table:table-cell>
          <table:table-cell/>
          <table:table-cell office:value-type="string" calcext:value-type="string">
            <text:p>Fotografía vernácula; Estilo de vida suburbano; Moda años 60</text:p>
          </table:table-cell>
          <table:table-cell office:value-type="string" calcext:value-type="string">
            <text:p>Suburbios de la región Noreste o Medio Oeste,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2.jpg</text:p>
          </table:table-cell>
          <table:table-cell office:value-type="string" calcext:value-type="string">
            <text:p>ynrlb3</text:p>
          </table:table-cell>
          <table:table-cell office:value-type="string" calcext:value-type="string">
            <text:p>image</text:p>
          </table:table-cell>
          <table:table-cell office:value-type="string" calcext:value-type="string">
            <text:p>/objects/impresion_052.jpg</text:p>
          </table:table-cell>
          <table:table-cell office:value-type="string" calcext:value-type="string">
            <text:p>/objects/small/impresion_052_sm.jpg</text:p>
          </table:table-cell>
          <table:table-cell office:value-type="string" calcext:value-type="string">
            <text:p>/objects/thumbs/impresion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3</text:p>
          </table:table-cell>
          <table:table-cell office:value-type="string" calcext:value-type="string">
            <text:p>Retrato victoriano</text:p>
          </table:table-cell>
          <table:table-cell office:value-type="float" office:value="1864" calcext:value-type="float">
            <text:p>1864</text:p>
          </table:table-cell>
          <table:table-cell/>
          <table:table-cell office:value-type="string" calcext:value-type="string">
            <text:p>Anónimo</text:p>
          </table:table-cell>
          <table:table-cell/>
          <table:table-cell office:value-type="string" calcext:value-type="string">
            <text:p>Retrato de estudio de una mujer joven perteneciente a la clase media-alta durante la época victoriana media. La retratada posa sentada junto a una mesa con tapete ornamental, vistiendo un traje de día confeccionado en tela con patrón de lunares (polka dots), mangas tipo 'bishop' abullonadas y un collar de perlas con un medallón central. El formato corresponde a una 'Carte de Visite' (CDV), el estándar de intercambio social fotográfico de la década de 1860.</text:p>
          </table:table-cell>
          <table:table-cell/>
          <table:table-cell office:value-type="string" calcext:value-type="string">
            <text:p>Retrato victoriano; Carte de visite; Moda siglo XIX</text:p>
          </table:table-cell>
          <table:table-cell office:value-type="string" calcext:value-type="string">
            <text:p>Londres, Reino Unido / Costa Este, Estados Unidos</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3.jpg</text:p>
          </table:table-cell>
          <table:table-cell office:value-type="string" calcext:value-type="string">
            <text:p>3v910g</text:p>
          </table:table-cell>
          <table:table-cell office:value-type="string" calcext:value-type="string">
            <text:p>image</text:p>
          </table:table-cell>
          <table:table-cell office:value-type="string" calcext:value-type="string">
            <text:p>/objects/impresion_053.jpg</text:p>
          </table:table-cell>
          <table:table-cell office:value-type="string" calcext:value-type="string">
            <text:p>/objects/small/impresion_053_sm.jpg</text:p>
          </table:table-cell>
          <table:table-cell office:value-type="string" calcext:value-type="string">
            <text:p>/objects/thumbs/impresion_053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4</text:p>
          </table:table-cell>
          <table:table-cell office:value-type="string" calcext:value-type="string">
            <text:p>Retrato eduardiano</text:p>
          </table:table-cell>
          <table:table-cell office:value-type="float" office:value="1905" calcext:value-type="float">
            <text:p>1905</text:p>
          </table:table-cell>
          <table:table-cell/>
          <table:table-cell office:value-type="string" calcext:value-type="string">
            <text:p>Charles L. Gresham (Estudio Gresham)</text:p>
          </table:table-cell>
          <table:table-cell/>
          <table:table-cell office:value-type="string" calcext:value-type="string">
            <text:p>Retrato de estudio en formato de óvalo de una mujer joven durante la época eduardiana. La retratada viste una blusa blanca de cuello alto con detalles de encaje, un broche central y un ramillete de flores oscuras en el pecho. Su peinado incluye un gran lazo oscuro, típico de la estética 'Gibson Girl' de principios del siglo XX.</text:p>
          </table:table-cell>
          <table:table-cell/>
          <table:table-cell office:value-type="string" calcext:value-type="string">
            <text:p>Retrato eduardiano; Estudio fotográfico; Moda femenina 1900</text:p>
          </table:table-cell>
          <table:table-cell office:value-type="string" calcext:value-type="string">
            <text:p>Bloomfield, Iowa, Estados Unidos</text:p>
          </table:table-cell>
          <table:table-cell office:value-type="float" office:value="40.7511" calcext:value-type="float">
            <text:p>40.7511</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4.jpg</text:p>
          </table:table-cell>
          <table:table-cell office:value-type="string" calcext:value-type="string">
            <text:p>2039t</text:p>
          </table:table-cell>
          <table:table-cell office:value-type="string" calcext:value-type="string">
            <text:p>image</text:p>
          </table:table-cell>
          <table:table-cell office:value-type="string" calcext:value-type="string">
            <text:p>/objects/impresion_054.jpg</text:p>
          </table:table-cell>
          <table:table-cell office:value-type="string" calcext:value-type="string">
            <text:p>/objects/small/impresion_054_sm.jpg</text:p>
          </table:table-cell>
          <table:table-cell office:value-type="string" calcext:value-type="string">
            <text:p>/objects/thumbs/impresion_054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5</text:p>
          </table:table-cell>
          <table:table-cell office:value-type="string" calcext:value-type="string">
            <text:p>Tarjeta postal</text:p>
          </table:table-cell>
          <table:table-cell office:value-type="float" office:value="1914" calcext:value-type="float">
            <text:p>1914</text:p>
          </table:table-cell>
          <table:table-cell/>
          <table:table-cell office:value-type="string" calcext:value-type="string">
            <text:p>Charles L'Hôpital &amp; Cie (Editor)</text:p>
          </table:table-cell>
          <table:table-cell/>
          <table:table-cell office:value-type="string" calcext:value-type="string">
            <text:p>Retrato de estudio de estilo 'belle époque' que muestra a un infante vestido con un traje de tweed de tres piezas y un sombrero de paja de ala ancha. La imagen es una tarjeta postal coloreada a mano, característica de principios del siglo XX, que incluye una dedicatoria manuscrita en portugués: 'No jardim da ausencia só desabrocha a triste flôr da saudade' (En el jardín de la ausencia sólo florece la triste flor de la nostalgia), fechada el 8 de abril de 1914.</text:p>
          </table:table-cell>
          <table:table-cell/>
          <table:table-cell office:value-type="string" calcext:value-type="string">
            <text:p>Tarjeta postal; Retrato infantil; Belle Époque</text:p>
          </table:table-cell>
          <table:table-cell office:value-type="string" calcext:value-type="string">
            <text:p>Lisboa, Portugal</text:p>
          </table:table-cell>
          <table:table-cell office:value-type="float" office:value="38.7223" calcext:value-type="float">
            <text:p>38.7223</text:p>
          </table:table-cell>
          <table:table-cell office:value-type="float" office:value="-9.1393" calcext:value-type="float">
            <text:p>-9.139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5.jpg</text:p>
          </table:table-cell>
          <table:table-cell office:value-type="string" calcext:value-type="string">
            <text:p>ed4ffk</text:p>
          </table:table-cell>
          <table:table-cell office:value-type="string" calcext:value-type="string">
            <text:p>image</text:p>
          </table:table-cell>
          <table:table-cell office:value-type="string" calcext:value-type="string">
            <text:p>/objects/impresion_055.jpg</text:p>
          </table:table-cell>
          <table:table-cell office:value-type="string" calcext:value-type="string">
            <text:p>/objects/small/impresion_055_sm.jpg</text:p>
          </table:table-cell>
          <table:table-cell office:value-type="string" calcext:value-type="string">
            <text:p>/objects/thumbs/impresion_055_th.jpg</text:p>
          </table:table-cell>
          <table:table-cell table:number-columns-repeated="2"/>
          <table:table-cell office:value-type="string" calcext:value-type="string">
            <text:p>Tarjeta postal de tipo 'Real Photo Postcard' (RPPC)</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Negativo</text:p>
          </table:table-cell>
        </table:table-row>
        <table:table-row table:style-name="ro1">
          <table:table-cell office:value-type="string" calcext:value-type="string">
            <text:p>impresion_056</text:p>
          </table:table-cell>
          <table:table-cell office:value-type="string" calcext:value-type="string">
            <text:p>Retrato Victoriano</text:p>
          </table:table-cell>
          <table:table-cell office:value-type="float" office:value="1885" calcext:value-type="float">
            <text:p>1885</text:p>
          </table:table-cell>
          <table:table-cell/>
          <table:table-cell office:value-type="string" calcext:value-type="string">
            <text:p>Charles S. Rabineau</text:p>
          </table:table-cell>
          <table:table-cell/>
          <table:table-cell office:value-type="string" calcext:value-type="string">
            <text:p>Retrato de estudio de una mujer joven en formato Cabinet Card, capturado por el fotógrafo Charles S. Rabineau en Albany, Nueva York. La imagen muestra a la sujeto de medio perfil con un peinado de estilo victoriano tardío, caracterizado por flequillo rizado y un moño alto, vistiendo una prenda oscura de cuello alto con detalles de encaje y una pieza de joyería central.</text:p>
          </table:table-cell>
          <table:table-cell/>
          <table:table-cell office:value-type="string" calcext:value-type="string">
            <text:p>Retrato Victoriano; Cabinet Card; Charles S. Rabineau</text:p>
          </table:table-cell>
          <table:table-cell office:value-type="string" calcext:value-type="string">
            <text:p>Albany, Nueva York, Estados Unidos</text:p>
          </table:table-cell>
          <table:table-cell office:value-type="float" office:value="42.6526" calcext:value-type="float">
            <text:p>42.6526</text:p>
          </table:table-cell>
          <table:table-cell office:value-type="float" office:value="-73.7562" calcext:value-type="float">
            <text:p>-73.756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6.jpg</text:p>
          </table:table-cell>
          <table:table-cell office:value-type="string" calcext:value-type="string">
            <text:p>5fl8xz</text:p>
          </table:table-cell>
          <table:table-cell office:value-type="string" calcext:value-type="string">
            <text:p>image</text:p>
          </table:table-cell>
          <table:table-cell office:value-type="string" calcext:value-type="string">
            <text:p>/objects/impresion_056.jpg</text:p>
          </table:table-cell>
          <table:table-cell office:value-type="string" calcext:value-type="string">
            <text:p>/objects/small/impresion_056_sm.jpg</text:p>
          </table:table-cell>
          <table:table-cell office:value-type="string" calcext:value-type="string">
            <text:p>/objects/thumbs/impresion_05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57</text:p>
          </table:table-cell>
          <table:table-cell office:value-type="string" calcext:value-type="string">
            <text:p>Retrato de estudio</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estudio de una joven mujer que refleja la estética de la posguerra europea o norteamericana. La pose de tres cuartos, la mirada serena y la iluminación controlada sugieren una fotografía social de carácter privado, posiblemente para un documento de identidad o un recuerdo familiar.</text:p>
          </table:table-cell>
          <table:table-cell/>
          <table:table-cell office:value-type="string" calcext:value-type="string">
            <text:p>Retrato de estudio; Moda años 40; Papel seda</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7.jpg</text:p>
          </table:table-cell>
          <table:table-cell office:value-type="string" calcext:value-type="string">
            <text:p>wdm4ze</text:p>
          </table:table-cell>
          <table:table-cell office:value-type="string" calcext:value-type="string">
            <text:p>image</text:p>
          </table:table-cell>
          <table:table-cell office:value-type="string" calcext:value-type="string">
            <text:p>/objects/impresion_057.jpg</text:p>
          </table:table-cell>
          <table:table-cell office:value-type="string" calcext:value-type="string">
            <text:p>/objects/small/impresion_057_sm.jpg</text:p>
          </table:table-cell>
          <table:table-cell office:value-type="string" calcext:value-type="string">
            <text:p>/objects/thumbs/impresion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8</text:p>
          </table:table-cell>
          <table:table-cell office:value-type="string" calcext:value-type="string">
            <text:p>Pesca recreativ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Fotografía amateur en blanco y negro que muestra una hilera de nueve peces, probablemente lobinas de boca grande (Micropterus salmoides), dispuestos sobre un muelle de madera o plataforma junto a un bote de remos. La imagen captura un momento típico de la cultura del ocio y la pesca recreativa en la región de los Grandes Lagos o el medio oeste norteamericano a mediados del siglo XX.</text:p>
          </table:table-cell>
          <table:table-cell/>
          <table:table-cell office:value-type="string" calcext:value-type="string">
            <text:p>Pesca recreativa; Lubina; Cultura lacustre</text:p>
          </table:table-cell>
          <table:table-cell office:value-type="string" calcext:value-type="string">
            <text:p>Región de los Grandes Lagos, Michigan, EE. UU.</text:p>
          </table:table-cell>
          <table:table-cell office:value-type="float" office:value="44.3148" calcext:value-type="float">
            <text:p>44.3148</text:p>
          </table:table-cell>
          <table:table-cell office:value-type="float" office:value="-85.6024" calcext:value-type="float">
            <text:p>-85.60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8.jpg</text:p>
          </table:table-cell>
          <table:table-cell office:value-type="string" calcext:value-type="string">
            <text:p>1ypx19</text:p>
          </table:table-cell>
          <table:table-cell office:value-type="string" calcext:value-type="string">
            <text:p>image</text:p>
          </table:table-cell>
          <table:table-cell office:value-type="string" calcext:value-type="string">
            <text:p>/objects/impresion_058.jpg</text:p>
          </table:table-cell>
          <table:table-cell office:value-type="string" calcext:value-type="string">
            <text:p>/objects/small/impresion_058_sm.jpg</text:p>
          </table:table-cell>
          <table:table-cell office:value-type="string" calcext:value-type="string">
            <text:p>/objects/thumbs/impresion_05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9</text:p>
          </table:table-cell>
          <table:table-cell office:value-type="string" calcext:value-type="string">
            <text:p>Carte de visite</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formal de estudio de un hombre de mediana edad realizado en formato 'Carte de Visite' (CdV). El sujeto presenta una fisonomía típica de finales del siglo XIX, con un bigote poblado y peinado hacia los lados. Viste una chaqueta oscura de solapa ancha, chaleco abotonado y una corbata de lazo estrecho. La escena incluye elementos de atrezo clásicos de la época, como una silla tallada y una mesa con mantel bordado, sobre un fondo neutro degradado.</text:p>
          </table:table-cell>
          <table:table-cell/>
          <table:table-cell office:value-type="string" calcext:value-type="string">
            <text:p>Carte de visite; Moda victoriana; Albúmina</text:p>
          </table:table-cell>
          <table:table-cell office:value-type="string" calcext:value-type="string">
            <text:p>Estados Unidos de América</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9.jpg</text:p>
          </table:table-cell>
          <table:table-cell office:value-type="string" calcext:value-type="string">
            <text:p>ccaopt</text:p>
          </table:table-cell>
          <table:table-cell office:value-type="string" calcext:value-type="string">
            <text:p>image</text:p>
          </table:table-cell>
          <table:table-cell office:value-type="string" calcext:value-type="string">
            <text:p>/objects/impresion_059.jpg</text:p>
          </table:table-cell>
          <table:table-cell office:value-type="string" calcext:value-type="string">
            <text:p>/objects/small/impresion_059_sm.jpg</text:p>
          </table:table-cell>
          <table:table-cell office:value-type="string" calcext:value-type="string">
            <text:p>/objects/thumbs/impresion_05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0</text:p>
          </table:table-cell>
          <table:table-cell office:value-type="string" calcext:value-type="string">
            <text:p>Retrato victorian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Retrato de estudio de un niño pequeño con vestimenta formal de la época victoriana tardía. El sujeto viste una chaqueta de lana de tres botones sobre un chaleco a juego y una camisa de cuello alto con una pajarita oscura. La imagen está enmarcada en un óvalo impreso sobre un soporte de cartulina rígida con bordes redondeados, característico del formato Carte de Visite o Cabinet Card de finales del siglo XIX.</text:p>
          </table:table-cell>
          <table:table-cell/>
          <table:table-cell office:value-type="string" calcext:value-type="string">
            <text:p>Retrato victoriano; Impresión a la albúmina; Fotografía de estudio</text:p>
          </table:table-cell>
          <table:table-cell office:value-type="string" calcext:value-type="string">
            <text:p>Noreste de Estados Unidos (estimado por el estilo del estudio)</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0.jpg</text:p>
          </table:table-cell>
          <table:table-cell office:value-type="string" calcext:value-type="string">
            <text:p>2v18sr</text:p>
          </table:table-cell>
          <table:table-cell office:value-type="string" calcext:value-type="string">
            <text:p>image</text:p>
          </table:table-cell>
          <table:table-cell office:value-type="string" calcext:value-type="string">
            <text:p>/objects/impresion_060.jpg</text:p>
          </table:table-cell>
          <table:table-cell office:value-type="string" calcext:value-type="string">
            <text:p>/objects/small/impresion_060_sm.jpg</text:p>
          </table:table-cell>
          <table:table-cell office:value-type="string" calcext:value-type="string">
            <text:p>/objects/thumbs/impresion_06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1</text:p>
          </table:table-cell>
          <table:table-cell office:value-type="string" calcext:value-type="string">
            <text:p>Retrato victoriano</text:p>
          </table:table-cell>
          <table:table-cell office:value-type="float" office:value="1890" calcext:value-type="float">
            <text:p>1890</text:p>
          </table:table-cell>
          <table:table-cell/>
          <table:table-cell office:value-type="string" calcext:value-type="string">
            <text:p>Egide Verhassel</text:p>
          </table:table-cell>
          <table:table-cell/>
          <table:table-cell office:value-type="string" calcext:value-type="string">
            <text:p>Retrato de estudio de un niño de pie, vestido con un traje formal de tres piezas y pantalones estilo knickerbockers, sosteniendo un sombrero hongo y un pequeño libro. La toma fue realizada en el estudio de Egide Verhassel en Bruselas, Bélgica, caracterizada por una composición clásica de finales de la época victoriana con mobiliario ornamentado, una alfombra floral y una planta de interior (palmera) para añadir profundidad a la escena.</text:p>
          </table:table-cell>
          <table:table-cell/>
          <table:table-cell office:value-type="string" calcext:value-type="string">
            <text:p>Retrato victoriano; Carte de visite; Moda infantil del siglo XIX</text:p>
          </table:table-cell>
          <table:table-cell office:value-type="string" calcext:value-type="string">
            <text:p>Bruselas, Bélgica</text:p>
          </table:table-cell>
          <table:table-cell office:value-type="float" office:value="50.854" calcext:value-type="float">
            <text:p>50.854</text:p>
          </table:table-cell>
          <table:table-cell office:value-type="float" office:value="4.3395" calcext:value-type="float">
            <text:p>4.33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1.jpg</text:p>
          </table:table-cell>
          <table:table-cell office:value-type="string" calcext:value-type="string">
            <text:p>e7srnm</text:p>
          </table:table-cell>
          <table:table-cell office:value-type="string" calcext:value-type="string">
            <text:p>image</text:p>
          </table:table-cell>
          <table:table-cell office:value-type="string" calcext:value-type="string">
            <text:p>/objects/impresion_061.jpg</text:p>
          </table:table-cell>
          <table:table-cell office:value-type="string" calcext:value-type="string">
            <text:p>/objects/small/impresion_061_sm.jpg</text:p>
          </table:table-cell>
          <table:table-cell office:value-type="string" calcext:value-type="string">
            <text:p>/objects/thumbs/impresion_061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2</text:p>
          </table:table-cell>
          <table:table-cell office:value-type="string" calcext:value-type="string">
            <text:p>Ingeniería</text:p>
          </table:table-cell>
          <table:table-cell office:value-type="float" office:value="1883" calcext:value-type="float">
            <text:p>1883</text:p>
          </table:table-cell>
          <table:table-cell/>
          <table:table-cell office:value-type="string" calcext:value-type="string">
            <text:p>Anónimo (Estudio fotográfico profesional)</text:p>
          </table:table-cell>
          <table:table-cell/>
          <table:table-cell office:value-type="string" calcext:value-type="string">
            <text:p>Retrato de estudio de Rudolf Diesel, ingeniero alemán conocido por la invención del motor de combustión que lleva su nombre. La imagen captura a un joven Diesel durante la década de 1880, época en la que trabajaba en el desarrollo de sistemas de refrigeración y comenzaba sus investigaciones sobre la eficiencia térmica.</text:p>
          </table:table-cell>
          <table:table-cell/>
          <table:table-cell office:value-type="string" calcext:value-type="string">
            <text:p>Ingeniería; Rudolf Diesel; Retrato decimonónico</text:p>
          </table:table-cell>
          <table:table-cell office:value-type="string" calcext:value-type="string">
            <text:p>París, Francia</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2.jpg</text:p>
          </table:table-cell>
          <table:table-cell office:value-type="string" calcext:value-type="string">
            <text:p>6qo4c</text:p>
          </table:table-cell>
          <table:table-cell office:value-type="string" calcext:value-type="string">
            <text:p>image</text:p>
          </table:table-cell>
          <table:table-cell office:value-type="string" calcext:value-type="string">
            <text:p>/objects/impresion_062.jpg</text:p>
          </table:table-cell>
          <table:table-cell office:value-type="string" calcext:value-type="string">
            <text:p>/objects/small/impresion_062_sm.jpg</text:p>
          </table:table-cell>
          <table:table-cell office:value-type="string" calcext:value-type="string">
            <text:p>/objects/thumbs/impresion_062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3</text:p>
          </table:table-cell>
          <table:table-cell office:value-type="string" calcext:value-type="string">
            <text:p>Retrato de estudio</text:p>
          </table:table-cell>
          <table:table-cell office:value-type="float" office:value="1885" calcext:value-type="float">
            <text:p>1885</text:p>
          </table:table-cell>
          <table:table-cell/>
          <table:table-cell office:value-type="string" calcext:value-type="string">
            <text:p>Anónimo</text:p>
          </table:table-cell>
          <table:table-cell/>
          <table:table-cell office:value-type="string" calcext:value-type="string">
            <text:p>Retrato de estudio de una niña pequeña en la época victoriana tardía, posando de pie junto a una silla tapizada con flecos. La niña viste un vestido a cuadros (gingham) con volantes en el dobladillo, un cuello blanco y botas de cuero oscuras abotonadas. La composición es típica de las 'cartes de visite' (tarjetas de visita) populares en la segunda mitad del siglo XIX, caracterizadas por el uso de mobiliario de estudio pesado y fondos pintados para denotar estatus social.</text:p>
          </table:table-cell>
          <table:table-cell/>
          <table:table-cell office:value-type="string" calcext:value-type="string">
            <text:p>Retrato de estudio; Moda infantil victoriana; Copia a la albúmina</text:p>
          </table:table-cell>
          <table:table-cell office:value-type="string" calcext:value-type="string">
            <text:p>Londres, Reino Unido (entorno urbano general)</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3.jpg</text:p>
          </table:table-cell>
          <table:table-cell office:value-type="string" calcext:value-type="string">
            <text:p>4fgvlr</text:p>
          </table:table-cell>
          <table:table-cell office:value-type="string" calcext:value-type="string">
            <text:p>image</text:p>
          </table:table-cell>
          <table:table-cell office:value-type="string" calcext:value-type="string">
            <text:p>/objects/impresion_063.jpg</text:p>
          </table:table-cell>
          <table:table-cell office:value-type="string" calcext:value-type="string">
            <text:p>/objects/small/impresion_063_sm.jpg</text:p>
          </table:table-cell>
          <table:table-cell office:value-type="string" calcext:value-type="string">
            <text:p>/objects/thumbs/impresion_063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4</text:p>
          </table:table-cell>
          <table:table-cell office:value-type="string" calcext:value-type="string">
            <text:p>Retrato</text:p>
          </table:table-cell>
          <table:table-cell office:value-type="float" office:value="1875" calcext:value-type="float">
            <text:p>1875</text:p>
          </table:table-cell>
          <table:table-cell/>
          <table:table-cell office:value-type="string" calcext:value-type="string">
            <text:p>Anónimo</text:p>
          </table:table-cell>
          <table:table-cell/>
          <table:table-cell office:value-type="string" calcext:value-type="string">
            <text:p>Retrato de estudio de un hombre joven con bigote prominente, vestido con traje formal de tres piezas, camisa de cuello alto y pajarita (corbata de lazo). La fotografía es un ejemplo clásico del formato 'Carte de Visite', característico de la segunda mitad del siglo XIX, con su distintivo tono sepia y montaje sobre cartulina con bordes redondeados y señales de envejecimiento natural.</text:p>
          </table:table-cell>
          <table:table-cell/>
          <table:table-cell office:value-type="string" calcext:value-type="string">
            <text:p>Retrato; Siglo XIX; Carte de Visite</text:p>
          </table:table-cell>
          <table:table-cell office:value-type="string" calcext:value-type="string">
            <text:p>Estados Unidos o Europa (Probable centro urbano)</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4.jpg</text:p>
          </table:table-cell>
          <table:table-cell office:value-type="string" calcext:value-type="string">
            <text:p>3cfwak</text:p>
          </table:table-cell>
          <table:table-cell office:value-type="string" calcext:value-type="string">
            <text:p>image</text:p>
          </table:table-cell>
          <table:table-cell office:value-type="string" calcext:value-type="string">
            <text:p>/objects/impresion_064.jpg</text:p>
          </table:table-cell>
          <table:table-cell office:value-type="string" calcext:value-type="string">
            <text:p>/objects/small/impresion_064_sm.jpg</text:p>
          </table:table-cell>
          <table:table-cell office:value-type="string" calcext:value-type="string">
            <text:p>/objects/thumbs/impresion_064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5</text:p>
          </table:table-cell>
          <table:table-cell office:value-type="string" calcext:value-type="string">
            <text:p>Segunda Guerra Mundial</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Fotografía en blanco y negro de un miembro de la Policía Militar (MP) del Ejército de los Estados Unidos posando en un entorno rural durante la Segunda Guerra Mundial. El soldado viste el uniforme reglamentario de finales de la guerra, destacando la chaqueta de campo M-1943 y un casco M1 con las siglas 'MP' pintadas frontalmente. Se encuentra sobre un terreno densamente embarrado con huellas de neumáticos de vehículos pesados, flanqueado por vegetación invernal y árboles sin hojas, lo que sugiere una ubicación en el teatro de operaciones europeo durante el invierno de 1944 o principios de 1945.</text:p>
          </table:table-cell>
          <table:table-cell/>
          <table:table-cell office:value-type="string" calcext:value-type="string">
            <text:p>Segunda Guerra Mundial; Policía Militar; Chaqueta M-1943</text:p>
          </table:table-cell>
          <table:table-cell office:value-type="string" calcext:value-type="string">
            <text:p>Región de las Ardenas, Bélgica/Luxemburgo</text:p>
          </table:table-cell>
          <table:table-cell office:value-type="float" office:value="50.126" calcext:value-type="float">
            <text:p>50.126</text:p>
          </table:table-cell>
          <table:table-cell office:value-type="float" office:value="5.707" calcext:value-type="float">
            <text:p>5.7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5.jpg</text:p>
          </table:table-cell>
          <table:table-cell office:value-type="string" calcext:value-type="string">
            <text:p>d4wmri</text:p>
          </table:table-cell>
          <table:table-cell office:value-type="string" calcext:value-type="string">
            <text:p>image</text:p>
          </table:table-cell>
          <table:table-cell office:value-type="string" calcext:value-type="string">
            <text:p>/objects/impresion_065.jpg</text:p>
          </table:table-cell>
          <table:table-cell office:value-type="string" calcext:value-type="string">
            <text:p>/objects/small/impresion_065_sm.jpg</text:p>
          </table:table-cell>
          <table:table-cell office:value-type="string" calcext:value-type="string">
            <text:p>/objects/thumbs/impresion_06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6</text:p>
          </table:table-cell>
          <table:table-cell office:value-type="string" calcext:value-type="string">
            <text:p>Carte de Visite</text:p>
          </table:table-cell>
          <table:table-cell office:value-type="float" office:value="1860" calcext:value-type="float">
            <text:p>1860</text:p>
          </table:table-cell>
          <table:table-cell/>
          <table:table-cell office:value-type="string" calcext:value-type="string">
            <text:p>Anónimo</text:p>
          </table:table-cell>
          <table:table-cell/>
          <table:table-cell office:value-type="string" calcext:value-type="string">
            <text:p>Retrato de estudio de un hombre de mediana edad con rasgos marcados y ojos claros, característico de mediados del siglo XIX. El sujeto luce una barba completa con bigote recortado, peinado con volumen hacia los lados y viste la indumentaria formal de la época: una levita (frock coat) oscura sobre un chaleco a juego, camisa blanca de cuello alto y corbatín oscuro. La pose, sedente y apoyado en una mesa con un tapete de brocado floral, es la convención estética estándar de la fotografía de gabinete o tarjeta de visita de la década de 1860.</text:p>
          </table:table-cell>
          <table:table-cell/>
          <table:table-cell office:value-type="string" calcext:value-type="string">
            <text:p>Carte de Visite; Moda victoriana; Retrato de estudio</text:p>
          </table:table-cell>
          <table:table-cell office:value-type="string" calcext:value-type="string">
            <text:p>Estados Unidos</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6.jpg</text:p>
          </table:table-cell>
          <table:table-cell office:value-type="string" calcext:value-type="string">
            <text:p>wetb5c</text:p>
          </table:table-cell>
          <table:table-cell office:value-type="string" calcext:value-type="string">
            <text:p>image</text:p>
          </table:table-cell>
          <table:table-cell office:value-type="string" calcext:value-type="string">
            <text:p>/objects/impresion_066.jpg</text:p>
          </table:table-cell>
          <table:table-cell office:value-type="string" calcext:value-type="string">
            <text:p>/objects/small/impresion_066_sm.jpg</text:p>
          </table:table-cell>
          <table:table-cell office:value-type="string" calcext:value-type="string">
            <text:p>/objects/thumbs/impresion_06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67</text:p>
          </table:table-cell>
          <table:table-cell office:value-type="string" calcext:value-type="string">
            <text:p>William S. Burroughs</text:p>
          </table:table-cell>
          <table:table-cell office:value-type="float" office:value="1980" calcext:value-type="float">
            <text:p>1980</text:p>
          </table:table-cell>
          <table:table-cell/>
          <table:table-cell office:value-type="string" calcext:value-type="string">
            <text:p>Anónimo (Círculo personal de Burroughs)</text:p>
          </table:table-cell>
          <table:table-cell/>
          <table:table-cell office:value-type="string" calcext:value-type="string">
            <text:p>Retrato frontal del reconocido escritor estadounidense William S. Burroughs, figura clave de la Generación Beat. La fotografía captura al autor en su etapa de madurez, caracterizada por su rostro enjuto y mirada penetrante, vistiendo su habitual chaqueta acolchada de nailon.</text:p>
          </table:table-cell>
          <table:table-cell/>
          <table:table-cell office:value-type="string" calcext:value-type="string">
            <text:p>William S. Burroughs; Generación Beat; Literatura Postmoderna</text:p>
          </table:table-cell>
          <table:table-cell office:value-type="string" calcext:value-type="string">
            <text:p>Lawrence, Kansas, Estados Unidos</text:p>
          </table:table-cell>
          <table:table-cell office:value-type="float" office:value="38.9717" calcext:value-type="float">
            <text:p>38.9717</text:p>
          </table:table-cell>
          <table:table-cell office:value-type="float" office:value="-95.2353" calcext:value-type="float">
            <text:p>-95.23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7.jpg</text:p>
          </table:table-cell>
          <table:table-cell office:value-type="string" calcext:value-type="string">
            <text:p>p5mlps</text:p>
          </table:table-cell>
          <table:table-cell office:value-type="string" calcext:value-type="string">
            <text:p>image</text:p>
          </table:table-cell>
          <table:table-cell office:value-type="string" calcext:value-type="string">
            <text:p>/objects/impresion_067.jpg</text:p>
          </table:table-cell>
          <table:table-cell office:value-type="string" calcext:value-type="string">
            <text:p>/objects/small/impresion_067_sm.jpg</text:p>
          </table:table-cell>
          <table:table-cell office:value-type="string" calcext:value-type="string">
            <text:p>/objects/thumbs/impresion_067_th.jpg</text:p>
          </table:table-cell>
          <table:table-cell table:number-columns-repeated="2"/>
          <table:table-cell office:value-type="string" calcext:value-type="string">
            <text:p>Copia positiva en blanco y negr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8</text:p>
          </table:table-cell>
          <table:table-cell office:value-type="string" calcext:value-type="string">
            <text:p>RAF Bomber Command</text:p>
          </table:table-cell>
          <table:table-cell office:value-type="float" office:value="1943" calcext:value-type="float">
            <text:p>1943</text:p>
          </table:table-cell>
          <table:table-cell/>
          <table:table-cell office:value-type="string" calcext:value-type="string">
            <text:p>Fotógrafo oficial de la RAF o personal de servicio (Anónimo)</text:p>
          </table:table-cell>
          <table:table-cell/>
          <table:table-cell office:value-type="string" calcext:value-type="string">
            <text:p>Fotografía en blanco y negro que muestra la entrada de un barracón militar de tipo Nissen hut en una base aérea británica durante la Segunda Guerra Mundial. La puerta de madera presenta un cartel pintado a mano con el texto 'THE BLOCKBUSTER BOYS', ilustrado con una mujer (estilo pin-up), una jarra de cerveza, una bomba y la silueta de un bombardero pesado, probablemente un Avro Lancaster. Una bicicleta está apoyada contra la pared exterior del edificio, que muestra aberturas de ventilación características y marcos de ventanas metálicos típicos de la arquitectura militar modular británica.</text:p>
          </table:table-cell>
          <table:table-cell/>
          <table:table-cell office:value-type="string" calcext:value-type="string">
            <text:p>RAF Bomber Command; Segunda Guerra Mundial; Nissen hut</text:p>
          </table:table-cell>
          <table:table-cell office:value-type="string" calcext:value-type="string">
            <text:p>Condado de Lincolnshire, Inglaterra (Probable base de la RAF como Coningsby o Scampton)</text:p>
          </table:table-cell>
          <table:table-cell office:value-type="float" office:value="53.111" calcext:value-type="float">
            <text:p>53.111</text:p>
          </table:table-cell>
          <table:table-cell office:value-type="float" office:value="-0.155" calcext:value-type="float">
            <text:p>-0.1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8.jpg</text:p>
          </table:table-cell>
          <table:table-cell office:value-type="string" calcext:value-type="string">
            <text:p>gznvd</text:p>
          </table:table-cell>
          <table:table-cell office:value-type="string" calcext:value-type="string">
            <text:p>image</text:p>
          </table:table-cell>
          <table:table-cell office:value-type="string" calcext:value-type="string">
            <text:p>/objects/impresion_068.jpg</text:p>
          </table:table-cell>
          <table:table-cell office:value-type="string" calcext:value-type="string">
            <text:p>/objects/small/impresion_068_sm.jpg</text:p>
          </table:table-cell>
          <table:table-cell office:value-type="string" calcext:value-type="string">
            <text:p>/objects/thumbs/impresion_06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69</text:p>
          </table:table-cell>
          <table:table-cell office:value-type="string" calcext:value-type="string">
            <text:p>Retrato de estudio</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estudio en blanco y negro que muestra el busto de una mujer joven, probablemente entre los 20 y 30 años. La imagen presenta un viñeteado ovalado que difumina los hombros y el fondo, una técnica común para centrar la atención en el rostro. La mujer luce un peinado recogido típico de la época y un vestido de tela texturizada con un cuello de solapas oscuras en contraste, posiblemente de terciopelo, cerrado con botones grandes. La copia física presenta los característicos bordes dentados (deckle edges) de las impresiones de laboratorio de mediados del siglo XX.</text:p>
          </table:table-cell>
          <table:table-cell/>
          <table:table-cell office:value-type="string" calcext:value-type="string">
            <text:p>Retrato de estudio; Moda de los años 40; Gelatina de plata</text:p>
          </table:table-cell>
          <table:table-cell office:value-type="string" calcext:value-type="string">
            <text:p>Madrid, España (Atribuido por estilo de estudio europeo)</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9.jpg</text:p>
          </table:table-cell>
          <table:table-cell office:value-type="string" calcext:value-type="string">
            <text:p>oq6j1</text:p>
          </table:table-cell>
          <table:table-cell office:value-type="string" calcext:value-type="string">
            <text:p>image</text:p>
          </table:table-cell>
          <table:table-cell office:value-type="string" calcext:value-type="string">
            <text:p>/objects/impresion_069.jpg</text:p>
          </table:table-cell>
          <table:table-cell office:value-type="string" calcext:value-type="string">
            <text:p>/objects/small/impresion_069_sm.jpg</text:p>
          </table:table-cell>
          <table:table-cell office:value-type="string" calcext:value-type="string">
            <text:p>/objects/thumbs/impresion_06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0</text:p>
          </table:table-cell>
          <table:table-cell office:value-type="string" calcext:value-type="string">
            <text:p>Retrato documental</text:p>
          </table:table-cell>
          <table:table-cell office:value-type="float" office:value="1979" calcext:value-type="float">
            <text:p>1979</text:p>
          </table:table-cell>
          <table:table-cell/>
          <table:table-cell office:value-type="string" calcext:value-type="string">
            <text:p>Richard Avedon</text:p>
          </table:table-cell>
          <table:table-cell/>
          <table:table-cell office:value-type="string" calcext:value-type="string">
            <text:p>Retrato fotográfico de busto de un hombre de edad avanzada capturado con una expresión de ligera sorpresa o vulnerabilidad. El sujeto viste una chaqueta acolchada (puffer jacket) oscura sobre una camisa de franela a cuadros, vestimenta característica de los trabajadores rurales del oeste estadounidense a finales del siglo XX. La imagen destaca por su nitidez extrema y el uso de un fondo minimalista que descontextualiza al sujeto, una técnica recurrente en la fotografía documental de autor de la época.</text:p>
          </table:table-cell>
          <table:table-cell/>
          <table:table-cell office:value-type="string" calcext:value-type="string">
            <text:p>Retrato documental; Gran formato; Oeste americano</text:p>
          </table:table-cell>
          <table:table-cell office:value-type="string" calcext:value-type="string">
            <text:p>Casper, Wyoming, Estados Unidos</text:p>
          </table:table-cell>
          <table:table-cell office:value-type="float" office:value="42.8501" calcext:value-type="float">
            <text:p>42.8501</text:p>
          </table:table-cell>
          <table:table-cell office:value-type="float" office:value="-106.3251" calcext:value-type="float">
            <text:p>-106.325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0.jpg</text:p>
          </table:table-cell>
          <table:table-cell office:value-type="string" calcext:value-type="string">
            <text:p>rbbk5</text:p>
          </table:table-cell>
          <table:table-cell office:value-type="string" calcext:value-type="string">
            <text:p>image</text:p>
          </table:table-cell>
          <table:table-cell office:value-type="string" calcext:value-type="string">
            <text:p>/objects/impresion_070.jpg</text:p>
          </table:table-cell>
          <table:table-cell office:value-type="string" calcext:value-type="string">
            <text:p>/objects/small/impresion_070_sm.jpg</text:p>
          </table:table-cell>
          <table:table-cell office:value-type="string" calcext:value-type="string">
            <text:p>/objects/thumbs/impresion_07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1</text:p>
          </table:table-cell>
          <table:table-cell office:value-type="string" calcext:value-type="string">
            <text:p>Arquitectura industria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Fotografía histórica en blanco y negro que captura la 'Torre de El Coyote' en el municipio de Matamoros, Coahuila, México. Esta estructura de piedra posee una rampa helicoidal externa distintiva y fue construida a principios del siglo XX para el monitoreo de niveles de agua en los canales de riego de la Región Lagunera. En la cima de la torre se observan dos personas, lo que permite apreciar las dimensiones de la construcción, la cual muestra la inscripción 'COYOTE' grabada en su parte superior.</text:p>
          </table:table-cell>
          <table:table-cell/>
          <table:table-cell office:value-type="string" calcext:value-type="string">
            <text:p>Arquitectura industrial; Comarca Lagunera; Ingeniería hidráulica</text:p>
          </table:table-cell>
          <table:table-cell office:value-type="string" calcext:value-type="string">
            <text:p>El Coyote, Matamoros, Coahuila, México</text:p>
          </table:table-cell>
          <table:table-cell office:value-type="float" office:value="25.6886" calcext:value-type="float">
            <text:p>25.6886</text:p>
          </table:table-cell>
          <table:table-cell office:value-type="float" office:value="-103.2671" calcext:value-type="float">
            <text:p>-103.267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1.jpg</text:p>
          </table:table-cell>
          <table:table-cell office:value-type="string" calcext:value-type="string">
            <text:p>o9dx1h</text:p>
          </table:table-cell>
          <table:table-cell office:value-type="string" calcext:value-type="string">
            <text:p>image</text:p>
          </table:table-cell>
          <table:table-cell office:value-type="string" calcext:value-type="string">
            <text:p>/objects/impresion_071.jpg</text:p>
          </table:table-cell>
          <table:table-cell office:value-type="string" calcext:value-type="string">
            <text:p>/objects/small/impresion_071_sm.jpg</text:p>
          </table:table-cell>
          <table:table-cell office:value-type="string" calcext:value-type="string">
            <text:p>/objects/thumbs/impresion_07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2</text:p>
          </table:table-cell>
          <table:table-cell office:value-type="string" calcext:value-type="string">
            <text:p>Retrato vernáculo</text:p>
          </table:table-cell>
          <table:table-cell office:value-type="float" office:value="1905" calcext:value-type="float">
            <text:p>1905</text:p>
          </table:table-cell>
          <table:table-cell/>
          <table:table-cell office:value-type="string" calcext:value-type="string">
            <text:p>Anónimo</text:p>
          </table:table-cell>
          <table:table-cell/>
          <table:table-cell office:value-type="string" calcext:value-type="string">
            <text:p>Retrato vernáculo de una pareja de principios del siglo XX capturada en un ambiente informal frente a una pared de ladrillo. La imagen destaca por la expresión relajada y afectuosa de los sujetos, poco común en los retratos de estudio formales de la época, lo que sugiere una fotografía doméstica o amateur de alta calidad técnica.</text:p>
          </table:table-cell>
          <table:table-cell/>
          <table:table-cell office:value-type="string" calcext:value-type="string">
            <text:p>Retrato vernáculo; Vestimenta eduardiana; Fotografía sobre cartón</text:p>
          </table:table-cell>
          <table:table-cell office:value-type="string" calcext:value-type="string">
            <text:p>Estados Unidos (Región del Medio Oeste o Noreste)</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2.jpg</text:p>
          </table:table-cell>
          <table:table-cell office:value-type="string" calcext:value-type="string">
            <text:p>4kvfg</text:p>
          </table:table-cell>
          <table:table-cell office:value-type="string" calcext:value-type="string">
            <text:p>image</text:p>
          </table:table-cell>
          <table:table-cell office:value-type="string" calcext:value-type="string">
            <text:p>/objects/impresion_072.jpg</text:p>
          </table:table-cell>
          <table:table-cell office:value-type="string" calcext:value-type="string">
            <text:p>/objects/small/impresion_072_sm.jpg</text:p>
          </table:table-cell>
          <table:table-cell office:value-type="string" calcext:value-type="string">
            <text:p>/objects/thumbs/impresion_07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3</text:p>
          </table:table-cell>
          <table:table-cell office:value-type="string" calcext:value-type="string">
            <text:p>Retrato de identidad</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busto de un hombre de edad avanzada, de estilo formal y sobrio, recortado en formato circular. La imagen muestra signos evidentes de haber sido retirada de un soporte secundario, presentando restos de adhesivo, manchas de humedad y perforaciones laterales que sugieren su uso en documentos de identidad, expedientes administrativos o relicarios conmemorativos de mediados del siglo XX.</text:p>
          </table:table-cell>
          <table:table-cell/>
          <table:table-cell office:value-type="string" calcext:value-type="string">
            <text:p>Retrato de identidad; Fotografía de gelatina de plata; Cultura administrativa</text:p>
          </table:table-cell>
          <table:table-cell office:value-type="string" calcext:value-type="string">
            <text:p>Buenos Aires, Argentina</text:p>
          </table:table-cell>
          <table:table-cell office:value-type="float" office:value="-34.6037" calcext:value-type="float">
            <text:p>-34.6037</text:p>
          </table:table-cell>
          <table:table-cell office:value-type="float" office:value="-58.3816" calcext:value-type="float">
            <text:p>-58.38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3.jpg</text:p>
          </table:table-cell>
          <table:table-cell office:value-type="string" calcext:value-type="string">
            <text:p>2kv3</text:p>
          </table:table-cell>
          <table:table-cell office:value-type="string" calcext:value-type="string">
            <text:p>image</text:p>
          </table:table-cell>
          <table:table-cell office:value-type="string" calcext:value-type="string">
            <text:p>/objects/impresion_073.jpg</text:p>
          </table:table-cell>
          <table:table-cell office:value-type="string" calcext:value-type="string">
            <text:p>/objects/small/impresion_073_sm.jpg</text:p>
          </table:table-cell>
          <table:table-cell office:value-type="string" calcext:value-type="string">
            <text:p>/objects/thumbs/impresion_07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4</text:p>
          </table:table-cell>
          <table:table-cell office:value-type="string" calcext:value-type="string">
            <text:p>Lázaro Cárdenas del Río</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Retrato de busto de un hombre de edad avanzada, identificado por sus rasgos fisonómicos como Lázaro Cárdenas del Río (1895-1970), expresidente de México. La imagen lo muestra en sus años de vejez, vistiendo una camisa de cuello abierto de estilo informal, posiblemente una guayabera, característica de su vestimenta civil tras su retiro de la vida política activa. La fotografía presenta un desvanecimiento lumínico y una pátina propia de las copias en papel de mediados del siglo XX.</text:p>
          </table:table-cell>
          <table:table-cell/>
          <table:table-cell office:value-type="string" calcext:value-type="string">
            <text:p>Lázaro Cárdenas del Río; Retrato histórico; México posrevolucionari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4.jpg</text:p>
          </table:table-cell>
          <table:table-cell office:value-type="string" calcext:value-type="string">
            <text:p>n20tdc</text:p>
          </table:table-cell>
          <table:table-cell office:value-type="string" calcext:value-type="string">
            <text:p>image</text:p>
          </table:table-cell>
          <table:table-cell office:value-type="string" calcext:value-type="string">
            <text:p>/objects/impresion_074.jpg</text:p>
          </table:table-cell>
          <table:table-cell office:value-type="string" calcext:value-type="string">
            <text:p>/objects/small/impresion_074_sm.jpg</text:p>
          </table:table-cell>
          <table:table-cell office:value-type="string" calcext:value-type="string">
            <text:p>/objects/thumbs/impresion_07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5</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Estudio comercial de fotografía rápida)</text:p>
          </table:table-cell>
          <table:table-cell/>
          <table:table-cell office:value-type="string" calcext:value-type="string">
            <text:p>Tira vertical de tres retratos de estudio individuales montados sobre un cartón gris oscuro texturizado. La imagen superior muestra a una mujer con una blusa a cuadros de cuello alto; la central a un hombre con cuello rígido desmontable y pajarita; y la inferior a una mujer con una blusa blanca de encaje estilo 'Gibson Girl'. Los tres sujetos exhiben peinados y vestimentas típicos de la era eduardiana.</text:p>
          </table:table-cell>
          <table:table-cell/>
          <table:table-cell office:value-type="string" calcext:value-type="string">
            <text:p>Retrato de estudio; Moda eduardiana; Fotografía de sello</text:p>
          </table:table-cell>
          <table:table-cell office:value-type="string" calcext:value-type="string">
            <text:p>Estados Unidos (probablemente un estudio fotográfico 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5.jpg</text:p>
          </table:table-cell>
          <table:table-cell office:value-type="string" calcext:value-type="string">
            <text:p>gjrv9</text:p>
          </table:table-cell>
          <table:table-cell office:value-type="string" calcext:value-type="string">
            <text:p>image</text:p>
          </table:table-cell>
          <table:table-cell office:value-type="string" calcext:value-type="string">
            <text:p>/objects/impresion_075.jpg</text:p>
          </table:table-cell>
          <table:table-cell office:value-type="string" calcext:value-type="string">
            <text:p>/objects/small/impresion_075_sm.jpg</text:p>
          </table:table-cell>
          <table:table-cell office:value-type="string" calcext:value-type="string">
            <text:p>/objects/thumbs/impresion_07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6</text:p>
          </table:table-cell>
          <table:table-cell office:value-type="string" calcext:value-type="string">
            <text:p>Retrato victoriano</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estudio de un infante de corta edad capturado en formato 'Carte de Visite' (CDV). El niño aparece sentado en una silla de estudio ornamentada con flecos y tachuelas, vistiendo una túnica o vestido con patrón de cuadros ('plaid'), una indumentaria común para niños y niñas en la era victoriana antes de la transición a los pantalones. La imagen presenta el desgaste típico de los bordes y el tono sepia característico de la técnica de albúmina del siglo XIX.</text:p>
          </table:table-cell>
          <table:table-cell/>
          <table:table-cell office:value-type="string" calcext:value-type="string">
            <text:p>Retrato victoriano; Carte de Visite; Indumentaria infantil del siglo XIX</text:p>
          </table:table-cell>
          <table:table-cell office:value-type="string" calcext:value-type="string">
            <text:p>Estados Unidos (probable estudio fotográfico en la Costa Este)</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6.jpg</text:p>
          </table:table-cell>
          <table:table-cell office:value-type="string" calcext:value-type="string">
            <text:p>xuudli</text:p>
          </table:table-cell>
          <table:table-cell office:value-type="string" calcext:value-type="string">
            <text:p>image</text:p>
          </table:table-cell>
          <table:table-cell office:value-type="string" calcext:value-type="string">
            <text:p>/objects/impresion_076.jpg</text:p>
          </table:table-cell>
          <table:table-cell office:value-type="string" calcext:value-type="string">
            <text:p>/objects/small/impresion_076_sm.jpg</text:p>
          </table:table-cell>
          <table:table-cell office:value-type="string" calcext:value-type="string">
            <text:p>/objects/thumbs/impresion_07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7</text:p>
          </table:table-cell>
          <table:table-cell office:value-type="string" calcext:value-type="string">
            <text:p>Moda de los años 30</text:p>
          </table:table-cell>
          <table:table-cell office:value-type="float" office:value="1935" calcext:value-type="float">
            <text:p>1935</text:p>
          </table:table-cell>
          <table:table-cell/>
          <table:table-cell office:value-type="string" calcext:value-type="string">
            <text:p>Anónimo</text:p>
          </table:table-cell>
          <table:table-cell/>
          <table:table-cell office:value-type="string" calcext:value-type="string">
            <text:p>Retrato familiar de tres adultos (un hombre y dos mujeres) posando frente a una residencia de madera durante la época invernal. La imagen captura la moda y el entorno doméstico suburbano típico de América del Norte a mediados de la década de 1930, destacando la vestimenta formal de la clase media de la época.</text:p>
          </table:table-cell>
          <table:table-cell/>
          <table:table-cell office:value-type="string" calcext:value-type="string">
            <text:p>Moda de los años 30; Arquitectura residencial estadounidense; Retrato invernal</text:p>
          </table:table-cell>
          <table:table-cell office:value-type="string" calcext:value-type="string">
            <text:p>Noreste de Estados Unidos o Canadá (ej. Nueva Inglaterra)</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7.jpg</text:p>
          </table:table-cell>
          <table:table-cell office:value-type="string" calcext:value-type="string">
            <text:p>mfsca</text:p>
          </table:table-cell>
          <table:table-cell office:value-type="string" calcext:value-type="string">
            <text:p>image</text:p>
          </table:table-cell>
          <table:table-cell office:value-type="string" calcext:value-type="string">
            <text:p>/objects/impresion_077.jpg</text:p>
          </table:table-cell>
          <table:table-cell office:value-type="string" calcext:value-type="string">
            <text:p>/objects/small/impresion_077_sm.jpg</text:p>
          </table:table-cell>
          <table:table-cell office:value-type="string" calcext:value-type="string">
            <text:p>/objects/thumbs/impresion_07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8</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Samuel P. Gresham (Gresham Studio)</text:p>
          </table:table-cell>
          <table:table-cell/>
          <table:table-cell office:value-type="string" calcext:value-type="string">
            <text:p>Retrato formal de estudio de un joven de perfil tres cuartos, montado en una cartulina decorativa de la era eduardiana. El sujeto viste una chaqueta oscura de solapa estrecha y un característico cuello rígido desmontable de gran altura con una corbata de nudo pequeño, reflejando el estándar de formalidad masculina de principios del siglo XX en el Medio Oeste de Estados Unidos.</text:p>
          </table:table-cell>
          <table:table-cell/>
          <table:table-cell office:value-type="string" calcext:value-type="string">
            <text:p>Retrato de estudio; Moda masculina eduardiana; Fotografía de Iowa</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8.jpg</text:p>
          </table:table-cell>
          <table:table-cell office:value-type="string" calcext:value-type="string">
            <text:p>dgan8</text:p>
          </table:table-cell>
          <table:table-cell office:value-type="string" calcext:value-type="string">
            <text:p>image</text:p>
          </table:table-cell>
          <table:table-cell office:value-type="string" calcext:value-type="string">
            <text:p>/objects/impresion_078.jpg</text:p>
          </table:table-cell>
          <table:table-cell office:value-type="string" calcext:value-type="string">
            <text:p>/objects/small/impresion_078_sm.jpg</text:p>
          </table:table-cell>
          <table:table-cell office:value-type="string" calcext:value-type="string">
            <text:p>/objects/thumbs/impresion_078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9</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Pierce Studio</text:p>
          </table:table-cell>
          <table:table-cell/>
          <table:table-cell office:value-type="string" calcext:value-type="string">
            <text:p>Un retrato fotográfico de estudio de un hombre adulto con un distintivo bigote estilo imperial, vestido con ropa formal de principios del siglo XX, incluyendo un cuello alto almidonado y una corbata con pasador. La imagen está montada en un soporte de cartón con relieve profesional.</text:p>
          </table:table-cell>
          <table:table-cell/>
          <table:table-cell office:value-type="string" calcext:value-type="string">
            <text:p>Retrato de estudio; Moda masculina eduardiana; Fotografía de Iowa</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3" calcext:value-type="float">
            <text:p>-92.411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9.jpg</text:p>
          </table:table-cell>
          <table:table-cell office:value-type="string" calcext:value-type="string">
            <text:p>2xkktt</text:p>
          </table:table-cell>
          <table:table-cell office:value-type="string" calcext:value-type="string">
            <text:p>image</text:p>
          </table:table-cell>
          <table:table-cell office:value-type="string" calcext:value-type="string">
            <text:p>/objects/impresion_079.jpg</text:p>
          </table:table-cell>
          <table:table-cell office:value-type="string" calcext:value-type="string">
            <text:p>/objects/small/impresion_079_sm.jpg</text:p>
          </table:table-cell>
          <table:table-cell office:value-type="string" calcext:value-type="string">
            <text:p>/objects/thumbs/impresion_07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0</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C. L. Gresham</text:p>
          </table:table-cell>
          <table:table-cell/>
          <table:table-cell office:value-type="string" calcext:value-type="string">
            <text:p>Retrato de estudio formal de una mujer joven perteneciente a la época eduardiana, capturado en Bloomfield, Iowa. La mujer luce un vestido oscuro con detalles de encaje negro, un cuello alto de encaje blanco y un broche o reloj de bolsillo prendido al pecho. El retrato está presentado en un montaje de cartulina gris oscuro con un marco ovalado grabado y motivos ornamentales típicos de los primeros años del siglo XX.</text:p>
          </table:table-cell>
          <table:table-cell/>
          <table:table-cell office:value-type="string" calcext:value-type="string">
            <text:p>Retrato de estudio; Moda eduardiana; Fotografía estadounidense</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0.jpg</text:p>
          </table:table-cell>
          <table:table-cell office:value-type="string" calcext:value-type="string">
            <text:p>xs1xla</text:p>
          </table:table-cell>
          <table:table-cell office:value-type="string" calcext:value-type="string">
            <text:p>image</text:p>
          </table:table-cell>
          <table:table-cell office:value-type="string" calcext:value-type="string">
            <text:p>/objects/impresion_080.jpg</text:p>
          </table:table-cell>
          <table:table-cell office:value-type="string" calcext:value-type="string">
            <text:p>/objects/small/impresion_080_sm.jpg</text:p>
          </table:table-cell>
          <table:table-cell office:value-type="string" calcext:value-type="string">
            <text:p>/objects/thumbs/impresion_080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1</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Anónimo (Estudio fotográfico comercial)</text:p>
          </table:table-cell>
          <table:table-cell/>
          <table:table-cell office:value-type="string" calcext:value-type="string">
            <text:p>Retrato de estudio de busto de una mujer joven con la mirada dirigida hacia un lateral. Viste una blusa oscura de cuello alto con detalles de jaretas verticales y un colgante fino, característico de la moda de la transición del siglo XIX al XX. La fotografía está presentada en un soporte de cartulina rígida de color gris verdoso con una orla decorativa grabada en seco con motivos de volutas y elementos vegetales de estilo modernista.</text:p>
          </table:table-cell>
          <table:table-cell/>
          <table:table-cell office:value-type="string" calcext:value-type="string">
            <text:p>Retrato de estudio; Moda eduardiana; Gelatina de plata</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1.jpg</text:p>
          </table:table-cell>
          <table:table-cell office:value-type="string" calcext:value-type="string">
            <text:p>gky20i</text:p>
          </table:table-cell>
          <table:table-cell office:value-type="string" calcext:value-type="string">
            <text:p>image</text:p>
          </table:table-cell>
          <table:table-cell office:value-type="string" calcext:value-type="string">
            <text:p>/objects/impresion_081.jpg</text:p>
          </table:table-cell>
          <table:table-cell office:value-type="string" calcext:value-type="string">
            <text:p>/objects/small/impresion_081_sm.jpg</text:p>
          </table:table-cell>
          <table:table-cell office:value-type="string" calcext:value-type="string">
            <text:p>/objects/thumbs/impresion_081_th.jpg</text:p>
          </table:table-cell>
          <table:table-cell table:number-columns-repeated="2"/>
          <table:table-cell office:value-type="string" calcext:value-type="string">
            <text:p>Impresión de gelatina de plata sobre papel</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2</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James W. Gresham</text:p>
          </table:table-cell>
          <table:table-cell/>
          <table:table-cell office:value-type="string" calcext:value-type="string">
            <text:p>Retrato de estudio de busto de un hombre joven vestido con indumentaria formal de principios del siglo XX, que incluye una chaqueta de traje oscura, un cuello de camisa alto y desmontable ('high stand collar') y una corbata de seda con un patrón decorativo complejo. La imagen está presentada en un montaje de cartulina gris oscuro con relieves ornamentales gofrados que incluyen la firma del estudio y la ubicación.</text:p>
          </table:table-cell>
          <table:table-cell/>
          <table:table-cell office:value-type="string" calcext:value-type="string">
            <text:p>Retrato de estudio; Moda eduardiana; Bloomfield Iowa</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52" calcext:value-type="float">
            <text:p>-92.41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2.jpg</text:p>
          </table:table-cell>
          <table:table-cell office:value-type="string" calcext:value-type="string">
            <text:p>sb13m</text:p>
          </table:table-cell>
          <table:table-cell office:value-type="string" calcext:value-type="string">
            <text:p>image</text:p>
          </table:table-cell>
          <table:table-cell office:value-type="string" calcext:value-type="string">
            <text:p>/objects/impresion_082.jpg</text:p>
          </table:table-cell>
          <table:table-cell office:value-type="string" calcext:value-type="string">
            <text:p>/objects/small/impresion_082_sm.jpg</text:p>
          </table:table-cell>
          <table:table-cell office:value-type="string" calcext:value-type="string">
            <text:p>/objects/thumbs/impresion_08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83</text:p>
          </table:table-cell>
          <table:table-cell office:value-type="string" calcext:value-type="string">
            <text:p>Moda de los años 20</text:p>
          </table:table-cell>
          <table:table-cell office:value-type="float" office:value="1924" calcext:value-type="float">
            <text:p>1924</text:p>
          </table:table-cell>
          <table:table-cell/>
          <table:table-cell office:value-type="string" calcext:value-type="string">
            <text:p>Anónimo (Fotografía amateur)</text:p>
          </table:table-cell>
          <table:table-cell/>
          <table:table-cell office:value-type="string" calcext:value-type="string">
            <text:p>Una fotografía de mediados de la década de 1920 que muestra a dos mujeres posando frente a las ruinas de una estructura de piedra de gran antigüedad. La imagen captura la moda y el auge del turismo cultural amateur de la época, reflejando el cambio en el estilo de vida de las mujeres tras la Primera Guerra Mundial.</text:p>
          </table:table-cell>
          <table:table-cell/>
          <table:table-cell office:value-type="string" calcext:value-type="string">
            <text:p>Moda de los años 20; Turismo arqueológico; Sombrero cloche</text:p>
          </table:table-cell>
          <table:table-cell office:value-type="string" calcext:value-type="string">
            <text:p>Reino Unido (posiblemente una abadía medieval en ruinas en Inglaterra o Escocia)</text:p>
          </table:table-cell>
          <table:table-cell office:value-type="float" office:value="51.146" calcext:value-type="float">
            <text:p>51.146</text:p>
          </table:table-cell>
          <table:table-cell office:value-type="float" office:value="-2.715" calcext:value-type="float">
            <text:p>-2.7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3.jpg</text:p>
          </table:table-cell>
          <table:table-cell office:value-type="string" calcext:value-type="string">
            <text:p>mtuq87</text:p>
          </table:table-cell>
          <table:table-cell office:value-type="string" calcext:value-type="string">
            <text:p>image</text:p>
          </table:table-cell>
          <table:table-cell office:value-type="string" calcext:value-type="string">
            <text:p>/objects/impresion_083.jpg</text:p>
          </table:table-cell>
          <table:table-cell office:value-type="string" calcext:value-type="string">
            <text:p>/objects/small/impresion_083_sm.jpg</text:p>
          </table:table-cell>
          <table:table-cell office:value-type="string" calcext:value-type="string">
            <text:p>/objects/thumbs/impresion_08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4</text:p>
          </table:table-cell>
          <table:table-cell office:value-type="string" calcext:value-type="string">
            <text:p>Plaza de San Marcos</text:p>
          </table:table-cell>
          <table:table-cell office:value-type="float" office:value="1885" calcext:value-type="float">
            <text:p>1885</text:p>
          </table:table-cell>
          <table:table-cell/>
          <table:table-cell office:value-type="string" calcext:value-type="string">
            <text:p>Carlo Naya (o Studio Naya)</text:p>
          </table:table-cell>
          <table:table-cell/>
          <table:table-cell office:value-type="string" calcext:value-type="string">
            <text:p>Una vista histórica de la Plaza de San Marcos en Venecia, Italia, capturando la vida urbana frente a la Basílica de San Marcos y el Campanile original antes de su colapso en 1902. La imagen muestra peatones con vestimenta formal de finales de la era victoriana, destacando la monumentalidad de la arquitectura neobizantina y gótica veneciana en un encuadre que prioriza la escala humana frente a los edificios históricos.</text:p>
          </table:table-cell>
          <table:table-cell/>
          <table:table-cell office:value-type="string" calcext:value-type="string">
            <text:p>Plaza de San Marcos; Venecia; Arquitectura Neobizantina</text:p>
          </table:table-cell>
          <table:table-cell office:value-type="string" calcext:value-type="string">
            <text:p>Venecia, Italia</text:p>
          </table:table-cell>
          <table:table-cell office:value-type="float" office:value="45.4341" calcext:value-type="float">
            <text:p>45.4341</text:p>
          </table:table-cell>
          <table:table-cell office:value-type="float" office:value="12.3385" calcext:value-type="float">
            <text:p>12.338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4.jpg</text:p>
          </table:table-cell>
          <table:table-cell office:value-type="string" calcext:value-type="string">
            <text:p>553brl</text:p>
          </table:table-cell>
          <table:table-cell office:value-type="string" calcext:value-type="string">
            <text:p>image</text:p>
          </table:table-cell>
          <table:table-cell office:value-type="string" calcext:value-type="string">
            <text:p>/objects/impresion_084.jpg</text:p>
          </table:table-cell>
          <table:table-cell office:value-type="string" calcext:value-type="string">
            <text:p>/objects/small/impresion_084_sm.jpg</text:p>
          </table:table-cell>
          <table:table-cell office:value-type="string" calcext:value-type="string">
            <text:p>/objects/thumbs/impresion_084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5</text:p>
          </table:table-cell>
          <table:table-cell office:value-type="string" calcext:value-type="string">
            <text:p>Retrato de estudio</text:p>
          </table:table-cell>
          <table:table-cell office:value-type="float" office:value="1920" calcext:value-type="float">
            <text:p>1920</text:p>
          </table:table-cell>
          <table:table-cell/>
          <table:table-cell office:value-type="string" calcext:value-type="string">
            <text:p>Anónimo</text:p>
          </table:table-cell>
          <table:table-cell/>
          <table:table-cell office:value-type="string" calcext:value-type="string">
            <text:p>Retrato de estudio de una mujer joven con vestimenta y peinado característicos de la década de 1920. La imagen se encuentra preservada en su soporte original, una carpeta de cartón oscuro (bifold mount) con ranuras en las esquinas, un formato comercial estándar para la fotografía de retrato profesional durante el periodo de entreguerras.</text:p>
          </table:table-cell>
          <table:table-cell/>
          <table:table-cell office:value-type="string" calcext:value-type="string">
            <text:p>Retrato de estudio; Moda años 20; Carpeta de cartón</text:p>
          </table:table-cell>
          <table:table-cell office:value-type="string" calcext:value-type="string">
            <text:p>Estados Unidos (Probable origen en estudio comercial urbano)</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5.jpg</text:p>
          </table:table-cell>
          <table:table-cell office:value-type="string" calcext:value-type="string">
            <text:p>90wgts</text:p>
          </table:table-cell>
          <table:table-cell office:value-type="string" calcext:value-type="string">
            <text:p>image</text:p>
          </table:table-cell>
          <table:table-cell office:value-type="string" calcext:value-type="string">
            <text:p>/objects/impresion_085.jpg</text:p>
          </table:table-cell>
          <table:table-cell office:value-type="string" calcext:value-type="string">
            <text:p>/objects/small/impresion_085_sm.jpg</text:p>
          </table:table-cell>
          <table:table-cell office:value-type="string" calcext:value-type="string">
            <text:p>/objects/thumbs/impresion_085_th.jpg</text:p>
          </table:table-cell>
          <table:table-cell table:number-columns-repeated="2"/>
          <table:table-cell office:value-type="string" calcext:value-type="string">
            <text:p>Impresión de gelatina de plata sobre papel de fibr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6</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 (Fotógrafo de estudio comercial)</text:p>
          </table:table-cell>
          <table:table-cell/>
          <table:table-cell office:value-type="string" calcext:value-type="string">
            <text:p>Retrato de estudio de una niña pequeña realizado a mediados del siglo XX. La niña aparece sonriente, sentada sobre una superficie cubierta con tela, vistiendo un traje típico de la época que consiste en un vestido de cuadros (pichi) sobre una blusa blanca de mangas abullonadas y cuello con bordados. La iluminación es suave y frontal, característica de la fotografía comercial de retrato de posguerra.</text:p>
          </table:table-cell>
          <table:table-cell/>
          <table:table-cell office:value-type="string" calcext:value-type="string">
            <text:p>Retrato infantil; Moda de posguerra; Estudio fotográfico</text:p>
          </table:table-cell>
          <table:table-cell office:value-type="string" calcext:value-type="string">
            <text:p>Europa Central (posiblemente Alemania o Austria)</text:p>
          </table:table-cell>
          <table:table-cell office:value-type="float" office:value="52.520007" calcext:value-type="float">
            <text:p>52.520007</text:p>
          </table:table-cell>
          <table:table-cell office:value-type="float" office:value="13.404954" calcext:value-type="float">
            <text:p>13.40495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6.jpg</text:p>
          </table:table-cell>
          <table:table-cell office:value-type="string" calcext:value-type="string">
            <text:p>t61fw</text:p>
          </table:table-cell>
          <table:table-cell office:value-type="string" calcext:value-type="string">
            <text:p>image</text:p>
          </table:table-cell>
          <table:table-cell office:value-type="string" calcext:value-type="string">
            <text:p>/objects/impresion_086.jpg</text:p>
          </table:table-cell>
          <table:table-cell office:value-type="string" calcext:value-type="string">
            <text:p>/objects/small/impresion_086_sm.jpg</text:p>
          </table:table-cell>
          <table:table-cell office:value-type="string" calcext:value-type="string">
            <text:p>/objects/thumbs/impresion_08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7</text:p>
          </table:table-cell>
          <table:table-cell office:value-type="string" calcext:value-type="string">
            <text:p>Bergen</text:p>
          </table:table-cell>
          <table:table-cell office:value-type="float" office:value="1900" calcext:value-type="float">
            <text:p>1900</text:p>
          </table:table-cell>
          <table:table-cell/>
          <table:table-cell office:value-type="string" calcext:value-type="string">
            <text:p>Knud Knudsen</text:p>
          </table:table-cell>
          <table:table-cell/>
          <table:table-cell office:value-type="string" calcext:value-type="string">
            <text:p>Vista histórica del lago Lille Lungegårdsvannet en Bergen, Noruega, capturada a finales del siglo XIX o principios del XX. La imagen muestra en primer plano el lago con pequeñas embarcaciones de remo, mientras que al fondo se destaca el primer edificio del Hotel Norge (inaugurado en 1885) y el museo 'Permanenten'. La escena está coronada por la ladera del monte Fløyen, elemento topográfico icónico de la ciudad. El estilo arquitectónico historicista y la disposición urbana reflejan el desarrollo de Bergen antes del gran incendio de 1916.</text:p>
          </table:table-cell>
          <table:table-cell/>
          <table:table-cell office:value-type="string" calcext:value-type="string">
            <text:p>Bergen; Lille Lungegårdsvannet; Arquitectura historicista</text:p>
          </table:table-cell>
          <table:table-cell office:value-type="string" calcext:value-type="string">
            <text:p>Bergen, Noruega</text:p>
          </table:table-cell>
          <table:table-cell office:value-type="float" office:value="60.391266" calcext:value-type="float">
            <text:p>60.391266</text:p>
          </table:table-cell>
          <table:table-cell office:value-type="float" office:value="5.332561" calcext:value-type="float">
            <text:p>5.33256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7.jpg</text:p>
          </table:table-cell>
          <table:table-cell office:value-type="string" calcext:value-type="string">
            <text:p>8m51vg</text:p>
          </table:table-cell>
          <table:table-cell office:value-type="string" calcext:value-type="string">
            <text:p>image</text:p>
          </table:table-cell>
          <table:table-cell office:value-type="string" calcext:value-type="string">
            <text:p>/objects/impresion_087.jpg</text:p>
          </table:table-cell>
          <table:table-cell office:value-type="string" calcext:value-type="string">
            <text:p>/objects/small/impresion_087_sm.jpg</text:p>
          </table:table-cell>
          <table:table-cell office:value-type="string" calcext:value-type="string">
            <text:p>/objects/thumbs/impresion_087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8</text:p>
          </table:table-cell>
          <table:table-cell office:value-type="string" calcext:value-type="string">
            <text:p>Bandera de 45 estrellas</text:p>
          </table:table-cell>
          <table:table-cell office:value-type="float" office:value="1900" calcext:value-type="float">
            <text:p>1900</text:p>
          </table:table-cell>
          <table:table-cell/>
          <table:table-cell office:value-type="string" calcext:value-type="string">
            <text:p>Estudio de Penny Portraits (Anónimo)</text:p>
          </table:table-cell>
          <table:table-cell/>
          <table:table-cell office:value-type="string" calcext:value-type="string">
            <text:p>Tríptico fotográfico de estudio que muestra a una niña pequeña en tres poses distintas: sosteniendo una bandera de los Estados Unidos de 45 estrellas, utilizando un teléfono de tipo candelabro y posando con un sombrero de paja. Se trata de un ejemplo clásico de retrato comercial de bajo costo de finales del siglo XIX o principios del XX, capturado con una cámara de objetivos múltiples para crear tiras de imágenes económicas.</text:p>
          </table:table-cell>
          <table:table-cell/>
          <table:table-cell office:value-type="string" calcext:value-type="string">
            <text:p>Bandera de 45 estrellas; Teléfono de candelabro; Retrato de estudio infantil</text:p>
          </table:table-cell>
          <table:table-cell office:value-type="string" calcext:value-type="string">
            <text:p>Nueva York,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8.jpg</text:p>
          </table:table-cell>
          <table:table-cell office:value-type="string" calcext:value-type="string">
            <text:p>fgs13</text:p>
          </table:table-cell>
          <table:table-cell office:value-type="string" calcext:value-type="string">
            <text:p>image</text:p>
          </table:table-cell>
          <table:table-cell office:value-type="string" calcext:value-type="string">
            <text:p>/objects/impresion_088.jpg</text:p>
          </table:table-cell>
          <table:table-cell office:value-type="string" calcext:value-type="string">
            <text:p>/objects/small/impresion_088_sm.jpg</text:p>
          </table:table-cell>
          <table:table-cell office:value-type="string" calcext:value-type="string">
            <text:p>/objects/thumbs/impresion_088_th.jpg</text:p>
          </table:table-cell>
          <table:table-cell table:number-columns-repeated="2"/>
          <table:table-cell office:value-type="string" calcext:value-type="string">
            <text:p>Impresión de gelatina de plata sobre papel de base baritada</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9</text:p>
          </table:table-cell>
          <table:table-cell office:value-type="string" calcext:value-type="string">
            <text:p>Retrato familiar</text:p>
          </table:table-cell>
          <table:table-cell office:value-type="float" office:value="1919" calcext:value-type="float">
            <text:p>1919</text:p>
          </table:table-cell>
          <table:table-cell/>
          <table:table-cell office:value-type="string" calcext:value-type="string">
            <text:p>Anónimo</text:p>
          </table:table-cell>
          <table:table-cell/>
          <table:table-cell office:value-type="string" calcext:value-type="string">
            <text:p>Retrato familiar al aire libre capturado en el año 1919 en la localidad de Erdal, Noruega. La imagen muestra a una mujer identificada como Gulla, un niño o joven llamado Odd, y una pequeña bebé llamada Elsa, acompañados por un perro de raza mixta llamado Texas. La escena es informal y doméstica, característica de la fotografía amateur de principios del siglo XX.</text:p>
          </table:table-cell>
          <table:table-cell/>
          <table:table-cell office:value-type="string" calcext:value-type="string">
            <text:p>Retrato familiar; Erdal Noruega; Vestimenta eduardiana tardía</text:p>
          </table:table-cell>
          <table:table-cell office:value-type="string" calcext:value-type="string">
            <text:p>Erdal, Stryn, Vestland, Noruega</text:p>
          </table:table-cell>
          <table:table-cell office:value-type="float" office:value="61.8883" calcext:value-type="float">
            <text:p>61.8883</text:p>
          </table:table-cell>
          <table:table-cell office:value-type="float" office:value="7.1264" calcext:value-type="float">
            <text:p>7.12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9.jpg</text:p>
          </table:table-cell>
          <table:table-cell office:value-type="string" calcext:value-type="string">
            <text:p>o42h4h</text:p>
          </table:table-cell>
          <table:table-cell office:value-type="string" calcext:value-type="string">
            <text:p>image</text:p>
          </table:table-cell>
          <table:table-cell office:value-type="string" calcext:value-type="string">
            <text:p>/objects/impresion_089.jpg</text:p>
          </table:table-cell>
          <table:table-cell office:value-type="string" calcext:value-type="string">
            <text:p>/objects/small/impresion_089_sm.jpg</text:p>
          </table:table-cell>
          <table:table-cell office:value-type="string" calcext:value-type="string">
            <text:p>/objects/thumbs/impresion_08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0</text:p>
          </table:table-cell>
          <table:table-cell office:value-type="string" calcext:value-type="string">
            <text:p>Arquitectura colonial española</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Fotografía en blanco y negro de la puerta principal (Sally Port) del Castillo de San Marcos en San Agustín, Florida. La imagen captura la entrada principal de la fortificación colonial española de finales del siglo XVII, destacando el dintel de piedra con el escudo real de armas de España tallado, una puerta de madera con tablones en diagonal y un puente levadizo o pasarela de madera en primer plano.</text:p>
          </table:table-cell>
          <table:table-cell/>
          <table:table-cell office:value-type="string" calcext:value-type="string">
            <text:p>Arquitectura colonial española; Fortificación militar; Piedra de coquina</text:p>
          </table:table-cell>
          <table:table-cell office:value-type="string" calcext:value-type="string">
            <text:p>Castillo de San Marcos, San Agustín, Florida, Estados Unidos</text:p>
          </table:table-cell>
          <table:table-cell office:value-type="float" office:value="29.8978" calcext:value-type="float">
            <text:p>29.8978</text:p>
          </table:table-cell>
          <table:table-cell office:value-type="float" office:value="-81.3114" calcext:value-type="float">
            <text:p>-81.31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0.jpg</text:p>
          </table:table-cell>
          <table:table-cell office:value-type="string" calcext:value-type="string">
            <text:p>erqbco</text:p>
          </table:table-cell>
          <table:table-cell office:value-type="string" calcext:value-type="string">
            <text:p>image</text:p>
          </table:table-cell>
          <table:table-cell office:value-type="string" calcext:value-type="string">
            <text:p>/objects/impresion_090.jpg</text:p>
          </table:table-cell>
          <table:table-cell office:value-type="string" calcext:value-type="string">
            <text:p>/objects/small/impresion_090_sm.jpg</text:p>
          </table:table-cell>
          <table:table-cell office:value-type="string" calcext:value-type="string">
            <text:p>/objects/thumbs/impresion_09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91</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 (Fotógrafo de estudio comercial)</text:p>
          </table:table-cell>
          <table:table-cell/>
          <table:table-cell office:value-type="string" calcext:value-type="string">
            <text:p>Retrato de estudio de dos niñas pequeñas, posiblemente gemelas o hermanas de edad cercana, vestidas de manera idéntica. Ambas lucen vestidos claros de manga corta con cuellos babero (Peter Pan) adornados con broderie anglaise o encaje calado, lazos en el cabello y calzado tipo 'bootie' blanco de cuero suave. La pose es frontal y formal, característica de la fotografía comercial de mediados del siglo XX.</text:p>
          </table:table-cell>
          <table:table-cell/>
          <table:table-cell office:value-type="string" calcext:value-type="string">
            <text:p>Retrato infantil; Moda años 50; Fotografía de estudio</text:p>
          </table:table-cell>
          <table:table-cell office:value-type="string" calcext:value-type="string">
            <text:p>Estados Unidos (Probabl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1.jpg</text:p>
          </table:table-cell>
          <table:table-cell office:value-type="string" calcext:value-type="string">
            <text:p>bhnzwp</text:p>
          </table:table-cell>
          <table:table-cell office:value-type="string" calcext:value-type="string">
            <text:p>image</text:p>
          </table:table-cell>
          <table:table-cell office:value-type="string" calcext:value-type="string">
            <text:p>/objects/impresion_091.jpg</text:p>
          </table:table-cell>
          <table:table-cell office:value-type="string" calcext:value-type="string">
            <text:p>/objects/small/impresion_091_sm.jpg</text:p>
          </table:table-cell>
          <table:table-cell office:value-type="string" calcext:value-type="string">
            <text:p>/objects/thumbs/impresion_09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92</text:p>
          </table:table-cell>
          <table:table-cell office:value-type="string" calcext:value-type="string">
            <text:p>Cabinet card</text:p>
          </table:table-cell>
          <table:table-cell office:value-type="float" office:value="1885" calcext:value-type="float">
            <text:p>1885</text:p>
          </table:table-cell>
          <table:table-cell/>
          <table:table-cell office:value-type="string" calcext:value-type="string">
            <text:p>C. L. Thomas</text:p>
          </table:table-cell>
          <table:table-cell/>
          <table:table-cell office:value-type="string" calcext:value-type="string">
            <text:p>Un retrato de estudio familiar de finales de la era victoriana que muestra a un hombre, una mujer y un bebé. La imagen es un ejemplo clásico de la fotografía de gabinete (Cabinet Card) común en el medio oeste de Estados Unidos a finales del siglo XIX. El hombre viste un traje de tres piezas con una cadena de reloj de bolsillo visible, la mujer un vestido oscuro con una hilera de botones pequeños y un broche, y el bebé un faldón largo de bautizo blanco.</text:p>
          </table:table-cell>
          <table:table-cell/>
          <table:table-cell office:value-type="string" calcext:value-type="string">
            <text:p>Cabinet card; Moda victoriana; Retrato de estudio</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6" calcext:value-type="float">
            <text:p>-92.41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2.jpg</text:p>
          </table:table-cell>
          <table:table-cell office:value-type="string" calcext:value-type="string">
            <text:p>mv57w</text:p>
          </table:table-cell>
          <table:table-cell office:value-type="string" calcext:value-type="string">
            <text:p>image</text:p>
          </table:table-cell>
          <table:table-cell office:value-type="string" calcext:value-type="string">
            <text:p>/objects/impresion_092.jpg</text:p>
          </table:table-cell>
          <table:table-cell office:value-type="string" calcext:value-type="string">
            <text:p>/objects/small/impresion_092_sm.jpg</text:p>
          </table:table-cell>
          <table:table-cell office:value-type="string" calcext:value-type="string">
            <text:p>/objects/thumbs/impresion_092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3</text:p>
          </table:table-cell>
          <table:table-cell office:value-type="string" calcext:value-type="string">
            <text:p>Barroco flamenco</text:p>
          </table:table-cell>
          <table:table-cell office:value-type="float" office:value="1890" calcext:value-type="float">
            <text:p>1890</text:p>
          </table:table-cell>
          <table:table-cell/>
          <table:table-cell office:value-type="string" calcext:value-type="string">
            <text:p>Anónimo (Atribuido a estudios como Braun &amp; Cie o Alinari)</text:p>
          </table:table-cell>
          <table:table-cell/>
          <table:table-cell office:value-type="string" calcext:value-type="string">
            <text:p>Fotografía que reproduce el panel central del tríptico 'El Descendimiento de la Cruz', obra maestra del pintor barroco flamenco Peter Paul Rubens realizada entre 1612 y 1614. La escena muestra a ocho personajes, incluyendo a San Juan, Nicodemo, José de Arimatea y las Tres Marías, bajando cuidadosamente el cuerpo de Cristo de la cruz utilizando un sudario blanco, destacando el intenso claroscuro y la composición diagonal característica del autor.</text:p>
          </table:table-cell>
          <table:table-cell/>
          <table:table-cell office:value-type="string" calcext:value-type="string">
            <text:p>Barroco flamenco; Peter Paul Rubens; Iconografía religiosa</text:p>
          </table:table-cell>
          <table:table-cell office:value-type="string" calcext:value-type="string">
            <text:p>Catedral de Nuestra Señora, Amberes, Bélgica</text:p>
          </table:table-cell>
          <table:table-cell office:value-type="float" office:value="51.2203" calcext:value-type="float">
            <text:p>51.2203</text:p>
          </table:table-cell>
          <table:table-cell office:value-type="float" office:value="4.4005" calcext:value-type="float">
            <text:p>4.400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3.jpg</text:p>
          </table:table-cell>
          <table:table-cell office:value-type="string" calcext:value-type="string">
            <text:p>uvqi9e</text:p>
          </table:table-cell>
          <table:table-cell office:value-type="string" calcext:value-type="string">
            <text:p>image</text:p>
          </table:table-cell>
          <table:table-cell office:value-type="string" calcext:value-type="string">
            <text:p>/objects/impresion_093.jpg</text:p>
          </table:table-cell>
          <table:table-cell office:value-type="string" calcext:value-type="string">
            <text:p>/objects/small/impresion_093_sm.jpg</text:p>
          </table:table-cell>
          <table:table-cell office:value-type="string" calcext:value-type="string">
            <text:p>/objects/thumbs/impresion_093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4</text:p>
          </table:table-cell>
          <table:table-cell office:value-type="string" calcext:value-type="string">
            <text:p>Retrato de estudio</text:p>
          </table:table-cell>
          <table:table-cell office:value-type="float" office:value="1890" calcext:value-type="float">
            <text:p>1890</text:p>
          </table:table-cell>
          <table:table-cell/>
          <table:table-cell office:value-type="string" calcext:value-type="string">
            <text:p>Charles L. Thomas (C.L. Thomas)</text:p>
          </table:table-cell>
          <table:table-cell/>
          <table:table-cell office:value-type="string" calcext:value-type="string">
            <text:p>Retrato de estudio de estilo 'Cabinet Card' que muestra a dos niños pequeños, probablemente hermanos. El niño de la derecha está de pie vistiendo un vestido de cuadros con cuello alto y mangas largas, típico de la moda infantil de finales del siglo XIX, mientras que el más pequeño está sentado sobre un pedestal cubierto de tela, sosteniendo una muñeca de porcelana o trapo.</text:p>
          </table:table-cell>
          <table:table-cell/>
          <table:table-cell office:value-type="string" calcext:value-type="string">
            <text:p>Retrato de estudio; Fotografía de gabinete; Era Victoriana</text:p>
          </table:table-cell>
          <table:table-cell office:value-type="string" calcext:value-type="string">
            <text:p>Ottumwa, Iowa, Estados Unidos</text:p>
          </table:table-cell>
          <table:table-cell office:value-type="float" office:value="41.02001" calcext:value-type="float">
            <text:p>41.02001</text:p>
          </table:table-cell>
          <table:table-cell office:value-type="float" office:value="-92.41159" calcext:value-type="float">
            <text:p>-92.411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4.jpg</text:p>
          </table:table-cell>
          <table:table-cell office:value-type="string" calcext:value-type="string">
            <text:p>k5tau</text:p>
          </table:table-cell>
          <table:table-cell office:value-type="string" calcext:value-type="string">
            <text:p>image</text:p>
          </table:table-cell>
          <table:table-cell office:value-type="string" calcext:value-type="string">
            <text:p>/objects/impresion_094.jpg</text:p>
          </table:table-cell>
          <table:table-cell office:value-type="string" calcext:value-type="string">
            <text:p>/objects/small/impresion_094_sm.jpg</text:p>
          </table:table-cell>
          <table:table-cell office:value-type="string" calcext:value-type="string">
            <text:p>/objects/thumbs/impresion_094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5</text:p>
          </table:table-cell>
          <table:table-cell office:value-type="string" calcext:value-type="string">
            <text:p>Cabinet Card</text:p>
          </table:table-cell>
          <table:table-cell office:value-type="float" office:value="1895" calcext:value-type="float">
            <text:p>1895</text:p>
          </table:table-cell>
          <table:table-cell/>
          <table:table-cell office:value-type="string" calcext:value-type="string">
            <text:p>Jacob Ginther</text:p>
          </table:table-cell>
          <table:table-cell/>
          <table:table-cell office:value-type="string" calcext:value-type="string">
            <text:p>Retrato de estudio de una joven mujer con peinado estilo pompadour y vestido ornamentado con encajes, representativo de la transición entre la era Victoriana tardía y la Edwardiana. La imagen es una 'Cabinet Card' producida por el estudio de Jacob Ginther en Buffalo, Nueva York.</text:p>
          </table:table-cell>
          <table:table-cell/>
          <table:table-cell office:value-type="string" calcext:value-type="string">
            <text:p>Cabinet Card; Retrato de estudio; Moda victoriana</text:p>
          </table:table-cell>
          <table:table-cell office:value-type="string" calcext:value-type="string">
            <text:p>Buffalo, Nueva York, Estados Unidos</text:p>
          </table:table-cell>
          <table:table-cell office:value-type="float" office:value="42.8837" calcext:value-type="float">
            <text:p>42.8837</text:p>
          </table:table-cell>
          <table:table-cell office:value-type="float" office:value="-78.8748" calcext:value-type="float">
            <text:p>-78.87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5.jpg</text:p>
          </table:table-cell>
          <table:table-cell office:value-type="string" calcext:value-type="string">
            <text:p>00jiht</text:p>
          </table:table-cell>
          <table:table-cell office:value-type="string" calcext:value-type="string">
            <text:p>image</text:p>
          </table:table-cell>
          <table:table-cell office:value-type="string" calcext:value-type="string">
            <text:p>/objects/impresion_095.jpg</text:p>
          </table:table-cell>
          <table:table-cell office:value-type="string" calcext:value-type="string">
            <text:p>/objects/small/impresion_095_sm.jpg</text:p>
          </table:table-cell>
          <table:table-cell office:value-type="string" calcext:value-type="string">
            <text:p>/objects/thumbs/impresion_095_th.jpg</text:p>
          </table:table-cell>
          <table:table-cell table:number-columns-repeated="2"/>
          <table:table-cell office:value-type="string" calcext:value-type="string">
            <text:p>Colodión húme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6</text:p>
          </table:table-cell>
          <table:table-cell office:value-type="string" calcext:value-type="string">
            <text:p>Pictorialismo</text:p>
          </table:table-cell>
          <table:table-cell office:value-type="float" office:value="1900" calcext:value-type="float">
            <text:p>1900</text:p>
          </table:table-cell>
          <table:table-cell/>
          <table:table-cell office:value-type="string" calcext:value-type="string">
            <text:p>Rudolf Eickemeyer Jr.</text:p>
          </table:table-cell>
          <table:table-cell/>
          <table:table-cell office:value-type="string" calcext:value-type="string">
            <text:p>Un paisaje boscoso de finales del siglo XIX o principios del XX, caracterizado por una composición pictorialista que destaca el reflejo de los troncos de los árboles en una superficie de agua estancada. La luz suave y la disposición de los elementos naturales sugieren una intención artística de evocar serenidad y una estética cercana a la pintura impresionista.</text:p>
          </table:table-cell>
          <table:table-cell/>
          <table:table-cell office:value-type="string" calcext:value-type="string">
            <text:p>Pictorialismo; Paisaje boscoso; Reflejos acuáticos</text:p>
          </table:table-cell>
          <table:table-cell office:value-type="string" calcext:value-type="string">
            <text:p>Yonkers, Nueva York, Estados Unidos</text:p>
          </table:table-cell>
          <table:table-cell office:value-type="float" office:value="40.9312" calcext:value-type="float">
            <text:p>40.9312</text:p>
          </table:table-cell>
          <table:table-cell office:value-type="float" office:value="-73.8987" calcext:value-type="float">
            <text:p>-73.89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6.jpg</text:p>
          </table:table-cell>
          <table:table-cell office:value-type="string" calcext:value-type="string">
            <text:p>6d383z</text:p>
          </table:table-cell>
          <table:table-cell office:value-type="string" calcext:value-type="string">
            <text:p>image</text:p>
          </table:table-cell>
          <table:table-cell office:value-type="string" calcext:value-type="string">
            <text:p>/objects/impresion_096.jpg</text:p>
          </table:table-cell>
          <table:table-cell office:value-type="string" calcext:value-type="string">
            <text:p>/objects/small/impresion_096_sm.jpg</text:p>
          </table:table-cell>
          <table:table-cell office:value-type="string" calcext:value-type="string">
            <text:p>/objects/thumbs/impresion_096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7</text:p>
          </table:table-cell>
          <table:table-cell office:value-type="string" calcext:value-type="string">
            <text:p>Polaroid</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Una fotografía instantánea tipo Polaroid que documenta una obra de arte enmarcada que representa dos cebras en estilo gráfico. La imagen muestra una cebra de pie y otra descansando, rodeadas por un paspartú de color rojo oscuro y un marco metálico. En el borde inferior blanco de la fotografía, se aprecian anotaciones manuscritas con los números '117' y '20x30', lo que sugiere una codificación de inventario y dimensiones físicas para una galería o subasta.</text:p>
          </table:table-cell>
          <table:table-cell/>
          <table:table-cell office:value-type="string" calcext:value-type="string">
            <text:p>Polaroid; Arte animalista; Inventario</text:p>
          </table:table-cell>
          <table:table-cell office:value-type="string" calcext:value-type="string">
            <text:p>Estados Unido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7.jpg</text:p>
          </table:table-cell>
          <table:table-cell office:value-type="string" calcext:value-type="string">
            <text:p>hh92v</text:p>
          </table:table-cell>
          <table:table-cell office:value-type="string" calcext:value-type="string">
            <text:p>image</text:p>
          </table:table-cell>
          <table:table-cell office:value-type="string" calcext:value-type="string">
            <text:p>/objects/impresion_097.jpg</text:p>
          </table:table-cell>
          <table:table-cell office:value-type="string" calcext:value-type="string">
            <text:p>/objects/small/impresion_097_sm.jpg</text:p>
          </table:table-cell>
          <table:table-cell office:value-type="string" calcext:value-type="string">
            <text:p>/objects/thumbs/impresion_097_th.jpg</text:p>
          </table:table-cell>
          <table:table-cell table:number-columns-repeated="2"/>
          <table:table-cell office:value-type="string" calcext:value-type="string">
            <text:p>Película instantánea integral Polaroid 600</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8</text:p>
          </table:table-cell>
          <table:table-cell office:value-type="string" calcext:value-type="string">
            <text:p>Fotografía vernácul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Escena doméstica de carácter vernáculo que muestra a tres personas de la tercera edad sentadas a una mesa de comedor durante una reunión social privada. La imagen captura la estética de la clase media de finales del siglo XX, destacando elementos decorativos como papel tapiz con patrones verticales, vajilla de transferencia azul tipo 'Willow pattern' y arreglos florales típicos de la época.</text:p>
          </table:table-cell>
          <table:table-cell/>
          <table:table-cell office:value-type="string" calcext:value-type="string">
            <text:p>Fotografía vernácula; Polaroid; Escena doméstica</text:p>
          </table:table-cell>
          <table:table-cell office:value-type="string" calcext:value-type="string">
            <text:p>Cambridge, Massachusetts (Contexto de archivo de la Polaroid Corporation)</text:p>
          </table:table-cell>
          <table:table-cell office:value-type="float" office:value="42.3601" calcext:value-type="float">
            <text:p>42.3601</text:p>
          </table:table-cell>
          <table:table-cell office:value-type="float" office:value="-71.0942" calcext:value-type="float">
            <text:p>-71.09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8.jpg</text:p>
          </table:table-cell>
          <table:table-cell office:value-type="string" calcext:value-type="string">
            <text:p>mowbrs</text:p>
          </table:table-cell>
          <table:table-cell office:value-type="string" calcext:value-type="string">
            <text:p>image</text:p>
          </table:table-cell>
          <table:table-cell office:value-type="string" calcext:value-type="string">
            <text:p>/objects/impresion_098.jpg</text:p>
          </table:table-cell>
          <table:table-cell office:value-type="string" calcext:value-type="string">
            <text:p>/objects/small/impresion_098_sm.jpg</text:p>
          </table:table-cell>
          <table:table-cell office:value-type="string" calcext:value-type="string">
            <text:p>/objects/thumbs/impresion_098_th.jpg</text:p>
          </table:table-cell>
          <table:table-cell table:number-columns-repeated="2"/>
          <table:table-cell office:value-type="string" calcext:value-type="string">
            <text:p>Película instantánea integral (Instan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9</text:p>
          </table:table-cell>
          <table:table-cell office:value-type="string" calcext:value-type="string">
            <text:p>Arquitectura Colonial</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Fotografía de una residencia histórica ubicada en Nantucket, Massachusetts, que exhibe el estilo arquitectónico colonial típico de la región con revestimiento de tejas de cedro grisáceas y carpintería blanca. La imagen captura la fachada lateral y la entrada principal de la propiedad situada en el número 6 de Weymouth Street, un área protegida dentro del Distrito Histórico de Nantucket.</text:p>
          </table:table-cell>
          <table:table-cell/>
          <table:table-cell office:value-type="string" calcext:value-type="string">
            <text:p>Arquitectura Colonial; Nantucket; Polaroid</text:p>
          </table:table-cell>
          <table:table-cell office:value-type="string" calcext:value-type="string">
            <text:p>6 Weymouth Street, Nantucket, Massachusetts, Estados Unidos</text:p>
          </table:table-cell>
          <table:table-cell office:value-type="float" office:value="41.280112" calcext:value-type="float">
            <text:p>41.280112</text:p>
          </table:table-cell>
          <table:table-cell office:value-type="float" office:value="-70.098725" calcext:value-type="float">
            <text:p>-70.0987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9.jpg</text:p>
          </table:table-cell>
          <table:table-cell office:value-type="string" calcext:value-type="string">
            <text:p>kr43ro</text:p>
          </table:table-cell>
          <table:table-cell office:value-type="string" calcext:value-type="string">
            <text:p>image</text:p>
          </table:table-cell>
          <table:table-cell office:value-type="string" calcext:value-type="string">
            <text:p>/objects/impresion_099.jpg</text:p>
          </table:table-cell>
          <table:table-cell office:value-type="string" calcext:value-type="string">
            <text:p>/objects/small/impresion_099_sm.jpg</text:p>
          </table:table-cell>
          <table:table-cell office:value-type="string" calcext:value-type="string">
            <text:p>/objects/thumbs/impresion_09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0</text:p>
          </table:table-cell>
          <table:table-cell office:value-type="string" calcext:value-type="string">
            <text:p>Retrato infantil</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Retrato doméstico de un bebé sostenido por las manos de un adulto en un entorno interior. La escena destaca por el uso de vestimenta con patrones de rayas horizontales de colores vibrantes, típicos de la moda casual de mediados de la década de 1970. La fotografía es una toma instantánea que captura un momento cotidiano de crianza, probablemente los primeros intentos del infante por mantenerse en pie.</text:p>
          </table:table-cell>
          <table:table-cell/>
          <table:table-cell office:value-type="string" calcext:value-type="string">
            <text:p>Retrato infantil; Polaroid; Moda años 70</text:p>
          </table:table-cell>
          <table:table-cell office:value-type="string" calcext:value-type="string">
            <text:p>Entorno doméstico, probablemente en Estados Unidos o Europa Occidental.</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0.jpg</text:p>
          </table:table-cell>
          <table:table-cell office:value-type="string" calcext:value-type="string">
            <text:p>jx0o9g</text:p>
          </table:table-cell>
          <table:table-cell office:value-type="string" calcext:value-type="string">
            <text:p>image</text:p>
          </table:table-cell>
          <table:table-cell office:value-type="string" calcext:value-type="string">
            <text:p>/objects/impresion_100.jpg</text:p>
          </table:table-cell>
          <table:table-cell office:value-type="string" calcext:value-type="string">
            <text:p>/objects/small/impresion_100_sm.jpg</text:p>
          </table:table-cell>
          <table:table-cell office:value-type="string" calcext:value-type="string">
            <text:p>/objects/thumbs/impresion_100_th.jpg</text:p>
          </table:table-cell>
          <table:table-cell table:number-columns-repeated="2"/>
          <table:table-cell office:value-type="string" calcext:value-type="string">
            <text:p>Fotografía instantánea de tipo película integra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1</text:p>
          </table:table-cell>
          <table:table-cell office:value-type="string" calcext:value-type="string">
            <text:p>Arquitectura Industr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Fotografía instantánea de un galpón o almacén de ramos generales con arquitectura de influencia italianizante, característica de la región pampeana en Argentina y Uruguay. El edificio muestra paredes de mampostería blanqueadas, ventanas simétricas en la planta superior y un portón de carga lateral, elementos típicos del desarrollo agroindustrial de principios del siglo XX capturados en una etapa de declive o uso residual.</text:p>
          </table:table-cell>
          <table:table-cell/>
          <table:table-cell office:value-type="string" calcext:value-type="string">
            <text:p>Arquitectura Industrial; Patrimonio Pampeano; Fotografía Instantánea</text:p>
          </table:table-cell>
          <table:table-cell office:value-type="string" calcext:value-type="string">
            <text:p>San Antonio de Areco, Provincia de Buenos Aires, Argentina</text:p>
          </table:table-cell>
          <table:table-cell office:value-type="float" office:value="-34.2446" calcext:value-type="float">
            <text:p>-34.2446</text:p>
          </table:table-cell>
          <table:table-cell office:value-type="float" office:value="-59.4714" calcext:value-type="float">
            <text:p>-59.47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1.jpg</text:p>
          </table:table-cell>
          <table:table-cell office:value-type="string" calcext:value-type="string">
            <text:p>alzv7</text:p>
          </table:table-cell>
          <table:table-cell office:value-type="string" calcext:value-type="string">
            <text:p>image</text:p>
          </table:table-cell>
          <table:table-cell office:value-type="string" calcext:value-type="string">
            <text:p>/objects/impresion_101.jpg</text:p>
          </table:table-cell>
          <table:table-cell office:value-type="string" calcext:value-type="string">
            <text:p>/objects/small/impresion_101_sm.jpg</text:p>
          </table:table-cell>
          <table:table-cell office:value-type="string" calcext:value-type="string">
            <text:p>/objects/thumbs/impresion_101_th.jpg</text:p>
          </table:table-cell>
          <table:table-cell table:number-columns-repeated="2"/>
          <table:table-cell office:value-type="string" calcext:value-type="string">
            <text:p>Copia positiva directa en soporte integral tipo Polaroid</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2</text:p>
          </table:table-cell>
          <table:table-cell office:value-type="string" calcext:value-type="string">
            <text:p>Polaroid</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Reverso de una impresión fotográfica instantánea Polaroid que muestra los bordes festoneados característicos y la marca del fabricante. No se aprecia contenido visual en el anverso visible, revelando únicamente el soporte físico y los códigos de producción típicos de mediados del siglo XX.</text:p>
          </table:table-cell>
          <table:table-cell/>
          <table:table-cell office:value-type="string" calcext:value-type="string">
            <text:p>Polaroid; Fotografía instantánea; Soporte fotográfico</text:p>
          </table:table-cell>
          <table:table-cell office:value-type="string" calcext:value-type="string">
            <text:p>Cambridge, Massachusetts, EE. UU. (Sede histórica de Polaroid)</text:p>
          </table:table-cell>
          <table:table-cell office:value-type="float" office:value="42.3736" calcext:value-type="float">
            <text:p>42.3736</text:p>
          </table:table-cell>
          <table:table-cell office:value-type="float" office:value="-71.1097" calcext:value-type="float">
            <text:p>-71.109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2.jpg</text:p>
          </table:table-cell>
          <table:table-cell office:value-type="string" calcext:value-type="string">
            <text:p>7m0zzr</text:p>
          </table:table-cell>
          <table:table-cell office:value-type="string" calcext:value-type="string">
            <text:p>image</text:p>
          </table:table-cell>
          <table:table-cell office:value-type="string" calcext:value-type="string">
            <text:p>/objects/impresion_102.jpg</text:p>
          </table:table-cell>
          <table:table-cell office:value-type="string" calcext:value-type="string">
            <text:p>/objects/small/impresion_102_sm.jpg</text:p>
          </table:table-cell>
          <table:table-cell office:value-type="string" calcext:value-type="string">
            <text:p>/objects/thumbs/impresion_102_th.jpg</text:p>
          </table:table-cell>
          <table:table-cell table:number-columns-repeated="2"/>
          <table:table-cell office:value-type="string" calcext:value-type="string">
            <text:p>Película de rollo instantánea (Polaroid Land Film Series 40</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3</text:p>
          </table:table-cell>
          <table:table-cell office:value-type="string" calcext:value-type="string">
            <text:p>Fotografía instantánea</text:p>
          </table:table-cell>
          <table:table-cell office:value-type="float" office:value="2010" calcext:value-type="float">
            <text:p>2010</text:p>
          </table:table-cell>
          <table:table-cell/>
          <table:table-cell office:value-type="string" calcext:value-type="string">
            <text:p>Anónimo</text:p>
          </table:table-cell>
          <table:table-cell/>
          <table:table-cell office:value-type="string" calcext:value-type="string">
            <text:p>Fotografía instantánea que captura una cámara Polaroid del sistema Spectra (conocida como 'Image' en Europa) situada sobre un área de césped sombreada por árboles. En el cuadrante superior derecho se aprecian parcialmente las extremidades inferiores de una persona calzada con zapatillas blancas, y en la esquina inferior izquierda del fotograma se observa una falla de revelado o filtración de luz de tono rojizo-anaranjado.</text:p>
          </table:table-cell>
          <table:table-cell/>
          <table:table-cell office:value-type="string" calcext:value-type="string">
            <text:p>Fotografía instantánea; Polaroid Spectra; Artefactos de revelado</text:p>
          </table:table-cell>
          <table:table-cell office:value-type="string" calcext:value-type="string">
            <text:p>Parque Tiergarten, Berlín, Alemania</text:p>
          </table:table-cell>
          <table:table-cell office:value-type="float" office:value="52.5128" calcext:value-type="float">
            <text:p>52.5128</text:p>
          </table:table-cell>
          <table:table-cell office:value-type="float" office:value="13.3532" calcext:value-type="float">
            <text:p>13.35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3.jpg</text:p>
          </table:table-cell>
          <table:table-cell office:value-type="string" calcext:value-type="string">
            <text:p>18fhcd</text:p>
          </table:table-cell>
          <table:table-cell office:value-type="string" calcext:value-type="string">
            <text:p>image</text:p>
          </table:table-cell>
          <table:table-cell office:value-type="string" calcext:value-type="string">
            <text:p>/objects/impresion_103.jpg</text:p>
          </table:table-cell>
          <table:table-cell office:value-type="string" calcext:value-type="string">
            <text:p>/objects/small/impresion_103_sm.jpg</text:p>
          </table:table-cell>
          <table:table-cell office:value-type="string" calcext:value-type="string">
            <text:p>/objects/thumbs/impresion_103_th.jpg</text:p>
          </table:table-cell>
          <table:table-cell table:number-columns-repeated="2"/>
          <table:table-cell office:value-type="string" calcext:value-type="string">
            <text:p>Película instantánea integral formato 600 o i-Type en color</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4</text:p>
          </table:table-cell>
          <table:table-cell office:value-type="string" calcext:value-type="string">
            <text:p>Fotografía instantánea</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Vista del reverso de una fotografía instantánea a color. Se observa una superficie gris azulada uniforme con una anotación manual del número '1' en la esquina superior izquierda y un sello industrial impreso en el margen derecho que identifica el material fotográfico utilizado.</text:p>
          </table:table-cell>
          <table:table-cell/>
          <table:table-cell office:value-type="string" calcext:value-type="string">
            <text:p>Fotografía instantánea; Fujifilm FP-100C; Reverso fotográfico</text:p>
          </table:table-cell>
          <table:table-cell office:value-type="string" calcext:value-type="string">
            <text:p>Indeterminada (Uso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4.jpg</text:p>
          </table:table-cell>
          <table:table-cell office:value-type="string" calcext:value-type="string">
            <text:p>3e984k</text:p>
          </table:table-cell>
          <table:table-cell office:value-type="string" calcext:value-type="string">
            <text:p>image</text:p>
          </table:table-cell>
          <table:table-cell office:value-type="string" calcext:value-type="string">
            <text:p>/objects/impresion_104.jpg</text:p>
          </table:table-cell>
          <table:table-cell office:value-type="string" calcext:value-type="string">
            <text:p>/objects/small/impresion_104_sm.jpg</text:p>
          </table:table-cell>
          <table:table-cell office:value-type="string" calcext:value-type="string">
            <text:p>/objects/thumbs/impresion_1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5</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George Skeels</text:p>
          </table:table-cell>
          <table:table-cell/>
          <table:table-cell office:value-type="string" calcext:value-type="string">
            <text:p>Retrato de estudio de un joven en plano medio corto, presentado en un formato de cartulina con marco ovalado. El sujeto viste ropa formal de época, destacando un cuello alto rígido desmontable y una corbata oscura de nudo estrecho, elementos típicos de la transición entre la era victoriana tardía y la eduardiana.</text:p>
          </table:table-cell>
          <table:table-cell/>
          <table:table-cell office:value-type="string" calcext:value-type="string">
            <text:p>Retrato de estudio; Moda eduardiana; Fotografía de gabinete</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5.jpg</text:p>
          </table:table-cell>
          <table:table-cell office:value-type="string" calcext:value-type="string">
            <text:p>op5ajo</text:p>
          </table:table-cell>
          <table:table-cell office:value-type="string" calcext:value-type="string">
            <text:p>image</text:p>
          </table:table-cell>
          <table:table-cell office:value-type="string" calcext:value-type="string">
            <text:p>/objects/impresion_105.jpg</text:p>
          </table:table-cell>
          <table:table-cell office:value-type="string" calcext:value-type="string">
            <text:p>/objects/small/impresion_105_sm.jpg</text:p>
          </table:table-cell>
          <table:table-cell office:value-type="string" calcext:value-type="string">
            <text:p>/objects/thumbs/impresion_105_th.jpg</text:p>
          </table:table-cell>
          <table:table-cell table:number-columns-repeated="2"/>
          <table:table-cell office:value-type="string" calcext:value-type="string">
            <text:p>Impresión de gelatina de plata sobre papel de base baritad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06</text:p>
          </table:table-cell>
          <table:table-cell office:value-type="string" calcext:value-type="string">
            <text:p>Soporte de cartón</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La imagen muestra el verso o reverso de un soporte secundario de cartón rígido, habitualmente empleado para el montaje de fotografías de formato pequeño o mediano durante el cambio de siglo. El material presenta una textura granulada y un tono grisáceo neutro que indica un origen industrial para uso en estudios fotográficos.</text:p>
          </table:table-cell>
          <table:table-cell/>
          <table:table-cell office:value-type="string" calcext:value-type="string">
            <text:p>Soporte de cartón; Verso de fotografía; Material de archivo</text:p>
          </table:table-cell>
          <table:table-cell office:value-type="string" calcext:value-type="string">
            <text:p>Indeterminada (Uso global en estudios fotográficos)</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6.jpg</text:p>
          </table:table-cell>
          <table:table-cell office:value-type="string" calcext:value-type="string">
            <text:p>webk7f</text:p>
          </table:table-cell>
          <table:table-cell office:value-type="string" calcext:value-type="string">
            <text:p>image</text:p>
          </table:table-cell>
          <table:table-cell office:value-type="string" calcext:value-type="string">
            <text:p>/objects/impresion_106.jpg</text:p>
          </table:table-cell>
          <table:table-cell office:value-type="string" calcext:value-type="string">
            <text:p>/objects/small/impresion_106_sm.jpg</text:p>
          </table:table-cell>
          <table:table-cell office:value-type="string" calcext:value-type="string">
            <text:p>/objects/thumbs/impresion_10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7</text:p>
          </table:table-cell>
          <table:table-cell office:value-type="string" calcext:value-type="string">
            <text:p>Retrato de estudio</text:p>
          </table:table-cell>
          <table:table-cell office:value-type="float" office:value="1920" calcext:value-type="float">
            <text:p>1920</text:p>
          </table:table-cell>
          <table:table-cell/>
          <table:table-cell office:value-type="string" calcext:value-type="string">
            <text:p>Anónimo (Estudio fotográfico comercial)</text:p>
          </table:table-cell>
          <table:table-cell/>
          <table:table-cell office:value-type="string" calcext:value-type="string">
            <text:p>Retrato de estudio de una mujer joven que ejemplifica la estética de principios de la década de 1920. La retratada muestra un peinado corto con ondas sutiles y un vestido oscuro de cuello 'Peter Pan' decorado con botones metálicos alineados, un estilo típico de la transición hacia la moda 'flapper' tras la Primera Guerra Mundial.</text:p>
          </table:table-cell>
          <table:table-cell/>
          <table:table-cell office:value-type="string" calcext:value-type="string">
            <text:p>Retrato de estudio; Moda años 20; Gelatina de plata</text:p>
          </table:table-cell>
          <table:table-cell office:value-type="string" calcext:value-type="string">
            <text:p>Noreste de los Estados Unidos (Probablemente Nueva York o Chicago)</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7.jpg</text:p>
          </table:table-cell>
          <table:table-cell office:value-type="string" calcext:value-type="string">
            <text:p>gt107z</text:p>
          </table:table-cell>
          <table:table-cell office:value-type="string" calcext:value-type="string">
            <text:p>image</text:p>
          </table:table-cell>
          <table:table-cell office:value-type="string" calcext:value-type="string">
            <text:p>/objects/impresion_107.jpg</text:p>
          </table:table-cell>
          <table:table-cell office:value-type="string" calcext:value-type="string">
            <text:p>/objects/small/impresion_107_sm.jpg</text:p>
          </table:table-cell>
          <table:table-cell office:value-type="string" calcext:value-type="string">
            <text:p>/objects/thumbs/impresion_10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8</text:p>
          </table:table-cell>
          <table:table-cell office:value-type="string" calcext:value-type="string">
            <text:p>Vers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La imagen muestra el reverso (verso) de un soporte secundario de cartón rígido, típico de las fotografías de estudio de finales del siglo XIX y principios del XX, como las 'Cabinet Cards'. El objeto presenta una textura fibrosa y granulada característica de la pulpa de madera prensada de la época, con signos de desgaste en los bordes y una pequeña perforación en la parte superior central, lo que sugiere que pudo haber estado archivado en un legajo o colgado para su exhibición.</text:p>
          </table:table-cell>
          <table:table-cell/>
          <table:table-cell office:value-type="string" calcext:value-type="string">
            <text:p>Verso; Cartón de montaje; Soporte fotográfico</text:p>
          </table:table-cell>
          <table:table-cell office:value-type="string" calcext:value-type="string">
            <text:p>Archivo General de la Nación, Ciudad de México</text:p>
          </table:table-cell>
          <table:table-cell office:value-type="float" office:value="19.4358" calcext:value-type="float">
            <text:p>19.4358</text:p>
          </table:table-cell>
          <table:table-cell office:value-type="float" office:value="-99.1147" calcext:value-type="float">
            <text:p>-99.114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8.jpg</text:p>
          </table:table-cell>
          <table:table-cell office:value-type="string" calcext:value-type="string">
            <text:p>2um9vn</text:p>
          </table:table-cell>
          <table:table-cell office:value-type="string" calcext:value-type="string">
            <text:p>image</text:p>
          </table:table-cell>
          <table:table-cell office:value-type="string" calcext:value-type="string">
            <text:p>/objects/impresion_108.jpg</text:p>
          </table:table-cell>
          <table:table-cell office:value-type="string" calcext:value-type="string">
            <text:p>/objects/small/impresion_108_sm.jpg</text:p>
          </table:table-cell>
          <table:table-cell office:value-type="string" calcext:value-type="string">
            <text:p>/objects/thumbs/impresion_108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9</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Fotógrafo de la Corte Real)</text:p>
          </table:table-cell>
          <table:table-cell/>
          <table:table-cell office:value-type="string" calcext:value-type="string">
            <text:p>Retrato de estudio de una mujer joven, capturado a finales de la época victoriana o principios de la eduardiana. La fotografía está presentada en un formato de tarjeta de gabinete con un encuadre ovalado y un soporte de cartón vertical. La modelo viste una blusa blanca ornamentada con encajes, cuello alto y un broche o relicario prendido al pecho, reflejando el estatus social de la burguesía de finales del siglo XIX.</text:p>
          </table:table-cell>
          <table:table-cell/>
          <table:table-cell office:value-type="string" calcext:value-type="string">
            <text:p>Retrato de estudio; Moda eduardiana; Fotografía de gabinete</text:p>
          </table:table-cell>
          <table:table-cell office:value-type="string" calcext:value-type="string">
            <text:p>Estocolmo, Suecia</text:p>
          </table:table-cell>
          <table:table-cell office:value-type="float" office:value="59.3293" calcext:value-type="float">
            <text:p>59.3293</text:p>
          </table:table-cell>
          <table:table-cell office:value-type="float" office:value="18.0686" calcext:value-type="float">
            <text:p>18.06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9.jpg</text:p>
          </table:table-cell>
          <table:table-cell office:value-type="string" calcext:value-type="string">
            <text:p>gc4v9</text:p>
          </table:table-cell>
          <table:table-cell office:value-type="string" calcext:value-type="string">
            <text:p>image</text:p>
          </table:table-cell>
          <table:table-cell office:value-type="string" calcext:value-type="string">
            <text:p>/objects/impresion_109.jpg</text:p>
          </table:table-cell>
          <table:table-cell office:value-type="string" calcext:value-type="string">
            <text:p>/objects/small/impresion_109_sm.jpg</text:p>
          </table:table-cell>
          <table:table-cell office:value-type="string" calcext:value-type="string">
            <text:p>/objects/thumbs/impresion_10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0</text:p>
          </table:table-cell>
          <table:table-cell office:value-type="string" calcext:value-type="string">
            <text:p>Carte de visite</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Reverso de un soporte secundario rígido para fotografía de formato pequeño, probablemente una 'Carte de Visite' o 'Cabinet Card'. Presenta una inscripción manuscrita en la parte superior que identifica a la persona retratada como 'Lizzie Webb' y un precio de '2.50' añadido posteriormente en grafito, indicativo de su tránsito por el mercado de antigüedades.</text:p>
          </table:table-cell>
          <table:table-cell/>
          <table:table-cell office:value-type="string" calcext:value-type="string">
            <text:p>Carte de visite; Epigrafía manuscrita; Siglo XIX</text:p>
          </table:table-cell>
          <table:table-cell office:value-type="string" calcext:value-type="string">
            <text:p>Estados Unidos de América (Ubicación probable por el uso del nombre y formato)</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0.jpg</text:p>
          </table:table-cell>
          <table:table-cell office:value-type="string" calcext:value-type="string">
            <text:p>3ok2en</text:p>
          </table:table-cell>
          <table:table-cell office:value-type="string" calcext:value-type="string">
            <text:p>image</text:p>
          </table:table-cell>
          <table:table-cell office:value-type="string" calcext:value-type="string">
            <text:p>/objects/impresion_110.jpg</text:p>
          </table:table-cell>
          <table:table-cell office:value-type="string" calcext:value-type="string">
            <text:p>/objects/small/impresion_110_sm.jpg</text:p>
          </table:table-cell>
          <table:table-cell office:value-type="string" calcext:value-type="string">
            <text:p>/objects/thumbs/impresion_11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1</text:p>
          </table:table-cell>
          <table:table-cell office:value-type="string" calcext:value-type="string">
            <text:p>Retrato Edwardiano</text:p>
          </table:table-cell>
          <table:table-cell office:value-type="float" office:value="1905" calcext:value-type="float">
            <text:p>1905</text:p>
          </table:table-cell>
          <table:table-cell/>
          <table:table-cell office:value-type="string" calcext:value-type="string">
            <text:p>George H. Van Arnam</text:p>
          </table:table-cell>
          <table:table-cell/>
          <table:table-cell office:value-type="string" calcext:value-type="string">
            <text:p>Retrato de estudio de una mujer joven con un sombrero ornamentado y un vestido de hombros caídos, característico de la estética 'Gibson Girl' de la época Edwardiana. La imagen se presenta en un formato ovalado sobre un soporte de cartulina con bordes irregulares, incluyendo la firma del estudio fotográfico Van Arnam en Troy, Nueva York.</text:p>
          </table:table-cell>
          <table:table-cell/>
          <table:table-cell office:value-type="string" calcext:value-type="string">
            <text:p>Retrato Edwardiano; Moda 1900; Van Arnam Studio</text:p>
          </table:table-cell>
          <table:table-cell office:value-type="string" calcext:value-type="string">
            <text:p>Troy, Nueva York, Estados Unidos</text:p>
          </table:table-cell>
          <table:table-cell office:value-type="float" office:value="42.7284" calcext:value-type="float">
            <text:p>42.7284</text:p>
          </table:table-cell>
          <table:table-cell office:value-type="float" office:value="-73.6918" calcext:value-type="float">
            <text:p>-73.691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1.jpg</text:p>
          </table:table-cell>
          <table:table-cell office:value-type="string" calcext:value-type="string">
            <text:p>75m5pk</text:p>
          </table:table-cell>
          <table:table-cell office:value-type="string" calcext:value-type="string">
            <text:p>image</text:p>
          </table:table-cell>
          <table:table-cell office:value-type="string" calcext:value-type="string">
            <text:p>/objects/impresion_111.jpg</text:p>
          </table:table-cell>
          <table:table-cell office:value-type="string" calcext:value-type="string">
            <text:p>/objects/small/impresion_111_sm.jpg</text:p>
          </table:table-cell>
          <table:table-cell office:value-type="string" calcext:value-type="string">
            <text:p>/objects/thumbs/impresion_111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2</text:p>
          </table:table-cell>
          <table:table-cell office:value-type="string" calcext:value-type="string">
            <text:p>Verso de fotografía</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Reverso de un soporte de cartón para fotografía antigua, probablemente de finales del siglo XIX o principios del XX. La superficie muestra un tono amarronado característico de la oxidación por lignina en soportes de celulosa de baja calidad o envejecimiento natural del papel. Presenta una mancha central de origen accidental y un desgaste perimetral leve.</text:p>
          </table:table-cell>
          <table:table-cell/>
          <table:table-cell office:value-type="string" calcext:value-type="string">
            <text:p>Verso de fotografía; Soporte de cartón; Material de archivo</text:p>
          </table:table-cell>
          <table:table-cell office:value-type="string" calcext:value-type="string">
            <text:p>Desconocida (Sin marcas de estudi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2.jpg</text:p>
          </table:table-cell>
          <table:table-cell office:value-type="string" calcext:value-type="string">
            <text:p>v8wos6</text:p>
          </table:table-cell>
          <table:table-cell office:value-type="string" calcext:value-type="string">
            <text:p>image</text:p>
          </table:table-cell>
          <table:table-cell office:value-type="string" calcext:value-type="string">
            <text:p>/objects/impresion_112.jpg</text:p>
          </table:table-cell>
          <table:table-cell office:value-type="string" calcext:value-type="string">
            <text:p>/objects/small/impresion_112_sm.jpg</text:p>
          </table:table-cell>
          <table:table-cell office:value-type="string" calcext:value-type="string">
            <text:p>/objects/thumbs/impresion_112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3</text:p>
          </table:table-cell>
          <table:table-cell office:value-type="string" calcext:value-type="string">
            <text:p>Gran Ventisca de 1899</text:p>
          </table:table-cell>
          <table:table-cell office:value-type="float" office:value="1899" calcext:value-type="float">
            <text:p>1899</text:p>
          </table:table-cell>
          <table:table-cell/>
          <table:table-cell office:value-type="string" calcext:value-type="string">
            <text:p>Anónimo (Colección Lake County Historical Society)</text:p>
          </table:table-cell>
          <table:table-cell/>
          <table:table-cell office:value-type="string" calcext:value-type="string">
            <text:p>Fotografía histórica que captura a un individuo en un trineo tirado por un caballo frente a los establecimientos comerciales de la calle principal en Painesville, Ohio. La imagen documenta las condiciones de la ciudad tras la 'Gran Tormenta Invernal de 1899', un evento climático extremo que afectó a gran parte de los Estados Unidos. Se aprecian las fachadas de edificios comerciales del siglo XIX, destacando el letrero de 'Matthews &amp; Co.' y el bloque Tibbals.</text:p>
          </table:table-cell>
          <table:table-cell/>
          <table:table-cell office:value-type="string" calcext:value-type="string">
            <text:p>Gran Ventisca de 1899; Painesville Ohio; Transporte invernal decimonónico</text:p>
          </table:table-cell>
          <table:table-cell office:value-type="string" calcext:value-type="string">
            <text:p>Painesville, Ohio, Estados Unidos</text:p>
          </table:table-cell>
          <table:table-cell office:value-type="float" office:value="41.7242" calcext:value-type="float">
            <text:p>41.7242</text:p>
          </table:table-cell>
          <table:table-cell office:value-type="float" office:value="-81.2434" calcext:value-type="float">
            <text:p>-81.24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3.jpg</text:p>
          </table:table-cell>
          <table:table-cell office:value-type="string" calcext:value-type="string">
            <text:p>jtwfo</text:p>
          </table:table-cell>
          <table:table-cell office:value-type="string" calcext:value-type="string">
            <text:p>image</text:p>
          </table:table-cell>
          <table:table-cell office:value-type="string" calcext:value-type="string">
            <text:p>/objects/impresion_113.jpg</text:p>
          </table:table-cell>
          <table:table-cell office:value-type="string" calcext:value-type="string">
            <text:p>/objects/small/impresion_113_sm.jpg</text:p>
          </table:table-cell>
          <table:table-cell office:value-type="string" calcext:value-type="string">
            <text:p>/objects/thumbs/impresion_113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4</text:p>
          </table:table-cell>
          <table:table-cell office:value-type="string" calcext:value-type="string">
            <text:p>Vers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Vista del reverso (verso) de un soporte secundario de cartón para una fotografía de época, probablemente de formato 'Cabinet Card'. El objeto presenta un tono sepia debido a la oxidación natural del papel, bordes redondeados típicos para evitar el desgaste al insertarse en álbumes, y pequeñas marcas manuscritas cifradas en la parte inferior que sugieren una catalogación archivística previa.</text:p>
          </table:table-cell>
          <table:table-cell/>
          <table:table-cell office:value-type="string" calcext:value-type="string">
            <text:p>Verso; Soporte de cartón; Archivo fotográfico</text:p>
          </table:table-cell>
          <table:table-cell office:value-type="string" calcext:value-type="string">
            <text:p>Lugar de procedencia indeterminad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4.jpg</text:p>
          </table:table-cell>
          <table:table-cell office:value-type="string" calcext:value-type="string">
            <text:p>wbdu2</text:p>
          </table:table-cell>
          <table:table-cell office:value-type="string" calcext:value-type="string">
            <text:p>image</text:p>
          </table:table-cell>
          <table:table-cell office:value-type="string" calcext:value-type="string">
            <text:p>/objects/impresion_114.jpg</text:p>
          </table:table-cell>
          <table:table-cell office:value-type="string" calcext:value-type="string">
            <text:p>/objects/small/impresion_114_sm.jpg</text:p>
          </table:table-cell>
          <table:table-cell office:value-type="string" calcext:value-type="string">
            <text:p>/objects/thumbs/impresion_114_th.jpg</text:p>
          </table:table-cell>
          <table:table-cell table:number-columns-repeated="2"/>
          <table:table-cell office:value-type="string" calcext:value-type="string">
            <text:p>Soporte de cartulina prensada (card mount) multicap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5</text:p>
          </table:table-cell>
          <table:table-cell office:value-type="string" calcext:value-type="string">
            <text:p>Tarjeta de gabinete</text:p>
          </table:table-cell>
          <table:table-cell office:value-type="float" office:value="1895" calcext:value-type="float">
            <text:p>1895</text:p>
          </table:table-cell>
          <table:table-cell/>
          <table:table-cell office:value-type="string" calcext:value-type="string">
            <text:p>James W. Lane (J.W. Lane)</text:p>
          </table:table-cell>
          <table:table-cell/>
          <table:table-cell office:value-type="string" calcext:value-type="string">
            <text:p>Retrato de estudio de busto de una mujer de mediana edad, posando en tres cuartos de perfil. Se trata de una tarjeta de gabinete (Cabinet Card) con un acabado sepia y efecto de viñeta suave. La mujer luce un peinado recogido típico de finales de la era victoriana y un vestido oscuro con detalles plisados y cuello alto cerrado por un broche, representativo de la vestimenta formal femenina de finales del siglo XIX.</text:p>
          </table:table-cell>
          <table:table-cell/>
          <table:table-cell office:value-type="string" calcext:value-type="string">
            <text:p>Tarjeta de gabinete; Moda victoriana tardía; Retrato de estudio</text:p>
          </table:table-cell>
          <table:table-cell office:value-type="string" calcext:value-type="string">
            <text:p>56 Pleasant Street, Malden, Massachusetts, Estados Unidos</text:p>
          </table:table-cell>
          <table:table-cell office:value-type="float" office:value="42.4259" calcext:value-type="float">
            <text:p>42.4259</text:p>
          </table:table-cell>
          <table:table-cell office:value-type="float" office:value="-71.0667" calcext:value-type="float">
            <text:p>-71.066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5.jpg</text:p>
          </table:table-cell>
          <table:table-cell office:value-type="string" calcext:value-type="string">
            <text:p>fu0cqv</text:p>
          </table:table-cell>
          <table:table-cell office:value-type="string" calcext:value-type="string">
            <text:p>image</text:p>
          </table:table-cell>
          <table:table-cell office:value-type="string" calcext:value-type="string">
            <text:p>/objects/impresion_115.jpg</text:p>
          </table:table-cell>
          <table:table-cell office:value-type="string" calcext:value-type="string">
            <text:p>/objects/small/impresion_115_sm.jpg</text:p>
          </table:table-cell>
          <table:table-cell office:value-type="string" calcext:value-type="string">
            <text:p>/objects/thumbs/impresion_115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6</text:p>
          </table:table-cell>
          <table:table-cell office:value-type="string" calcext:value-type="string">
            <text:p>Reverso fotográfic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Vista posterior de un soporte fotográfico rígido de finales del siglo XIX o principios del XX. La imagen muestra el reverso de una cartulina de montaje desgastada, con una anotación numérica manual ('2') en la esquina superior derecha y signos evidentes de oxidación y foxing.</text:p>
          </table:table-cell>
          <table:table-cell/>
          <table:table-cell office:value-type="string" calcext:value-type="string">
            <text:p>Reverso fotográfico; Cartón; Soporte histórico</text:p>
          </table:table-cell>
          <table:table-cell office:value-type="string" calcext:value-type="string">
            <text:p>Desconocida (Probable origen occident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6.jpg</text:p>
          </table:table-cell>
          <table:table-cell office:value-type="string" calcext:value-type="string">
            <text:p>m8xhwg</text:p>
          </table:table-cell>
          <table:table-cell office:value-type="string" calcext:value-type="string">
            <text:p>image</text:p>
          </table:table-cell>
          <table:table-cell office:value-type="string" calcext:value-type="string">
            <text:p>/objects/impresion_116.jpg</text:p>
          </table:table-cell>
          <table:table-cell office:value-type="string" calcext:value-type="string">
            <text:p>/objects/small/impresion_116_sm.jpg</text:p>
          </table:table-cell>
          <table:table-cell office:value-type="string" calcext:value-type="string">
            <text:p>/objects/thumbs/impresion_116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7</text:p>
          </table:table-cell>
          <table:table-cell office:value-type="string" calcext:value-type="string">
            <text:p>Cabinet card</text:p>
          </table:table-cell>
          <table:table-cell office:value-type="float" office:value="1890" calcext:value-type="float">
            <text:p>1890</text:p>
          </table:table-cell>
          <table:table-cell/>
          <table:table-cell office:value-type="string" calcext:value-type="string">
            <text:p>B. F. Thomas (Estudio Thomas)</text:p>
          </table:table-cell>
          <table:table-cell/>
          <table:table-cell office:value-type="string" calcext:value-type="string">
            <text:p>Un retrato de estudio de finales del siglo XIX que muestra a dos niños pequeños. La niña de la derecha viste un traje de cuadros con cuello de volantes, mientras que el niño más pequeño a la izquierda sostiene una muñeca de porcelana o tela, vestido con un ropón blanco largo típico de la época victoriana para infantes.</text:p>
          </table:table-cell>
          <table:table-cell/>
          <table:table-cell office:value-type="string" calcext:value-type="string">
            <text:p>Cabinet card; Retrato infantil; Ottumwa Iowa</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6" calcext:value-type="float">
            <text:p>-92.41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7.jpg</text:p>
          </table:table-cell>
          <table:table-cell office:value-type="string" calcext:value-type="string">
            <text:p>mhimfq</text:p>
          </table:table-cell>
          <table:table-cell office:value-type="string" calcext:value-type="string">
            <text:p>image</text:p>
          </table:table-cell>
          <table:table-cell office:value-type="string" calcext:value-type="string">
            <text:p>/objects/impresion_117.jpg</text:p>
          </table:table-cell>
          <table:table-cell office:value-type="string" calcext:value-type="string">
            <text:p>/objects/small/impresion_117_sm.jpg</text:p>
          </table:table-cell>
          <table:table-cell office:value-type="string" calcext:value-type="string">
            <text:p>/objects/thumbs/impresion_117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8</text:p>
          </table:table-cell>
          <table:table-cell office:value-type="string" calcext:value-type="string">
            <text:p>Soporte de cartón</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verso de un soporte secundario de una fotografía de finales del siglo XIX o principios del XX, probablemente una 'Carte de Visite' o una 'Cabinet Card'. La pieza muestra un tono amarillento uniforme debido a la oxidación de la celulosa, con presencia de 'foxing' (manchas de herrumbre/hongo) y bordes redondeados por el desgaste mecánico.</text:p>
          </table:table-cell>
          <table:table-cell/>
          <table:table-cell office:value-type="string" calcext:value-type="string">
            <text:p>Soporte de cartón; Foxing; Fotografía decimonónica</text:p>
          </table:table-cell>
          <table:table-cell office:value-type="string" calcext:value-type="string">
            <text:p>Desconocida (Origen industrial europeo o american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8.jpg</text:p>
          </table:table-cell>
          <table:table-cell office:value-type="string" calcext:value-type="string">
            <text:p>h9pgah</text:p>
          </table:table-cell>
          <table:table-cell office:value-type="string" calcext:value-type="string">
            <text:p>image</text:p>
          </table:table-cell>
          <table:table-cell office:value-type="string" calcext:value-type="string">
            <text:p>/objects/impresion_118.jpg</text:p>
          </table:table-cell>
          <table:table-cell office:value-type="string" calcext:value-type="string">
            <text:p>/objects/small/impresion_118_sm.jpg</text:p>
          </table:table-cell>
          <table:table-cell office:value-type="string" calcext:value-type="string">
            <text:p>/objects/thumbs/impresion_118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9</text:p>
          </table:table-cell>
          <table:table-cell office:value-type="string" calcext:value-type="string">
            <text:p>Retrato victorian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Un retrato de estudio de finales de la era victoriana que muestra a una mujer joven sentada de perfil en una mecedora de madera torneada. El sujeto posa frente a un telón de fondo improvisado hecho de tela con motivos florales. Viste un traje de época con una chaqueta entallada de cuello alto y una falda larga, con el cabello recogido en un estilo pompadour bajo, típico de la moda de finales del siglo XIX.</text:p>
          </table:table-cell>
          <table:table-cell/>
          <table:table-cell office:value-type="string" calcext:value-type="string">
            <text:p>Retrato victoriano; Mecedora; Moda femenina siglo XIX</text:p>
          </table:table-cell>
          <table:table-cell office:value-type="string" calcext:value-type="string">
            <text:p>Estados Unidos (Probable región del Medio Oeste o Costa 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9.jpg</text:p>
          </table:table-cell>
          <table:table-cell office:value-type="string" calcext:value-type="string">
            <text:p>bkxkx</text:p>
          </table:table-cell>
          <table:table-cell office:value-type="string" calcext:value-type="string">
            <text:p>image</text:p>
          </table:table-cell>
          <table:table-cell office:value-type="string" calcext:value-type="string">
            <text:p>/objects/impresion_119.jpg</text:p>
          </table:table-cell>
          <table:table-cell office:value-type="string" calcext:value-type="string">
            <text:p>/objects/small/impresion_119_sm.jpg</text:p>
          </table:table-cell>
          <table:table-cell office:value-type="string" calcext:value-type="string">
            <text:p>/objects/thumbs/impresion_119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0</text:p>
          </table:table-cell>
          <table:table-cell office:value-type="string" calcext:value-type="string">
            <text:p>Verso fotográfico</text:p>
          </table:table-cell>
          <table:table-cell office:value-type="float" office:value="1890" calcext:value-type="float">
            <text:p>1890</text:p>
          </table:table-cell>
          <table:table-cell/>
          <table:table-cell office:value-type="string" calcext:value-type="string">
            <text:p>Anónimo (Anotación de archivero)</text:p>
          </table:table-cell>
          <table:table-cell/>
          <table:table-cell office:value-type="string" calcext:value-type="string">
            <text:p>La imagen muestra el reverso (verso) de una fotografía histórica montada sobre un soporte secundario de cartón rígido. Presenta una pátina de envejecimiento natural con coloración amarillenta y manchas de foxing (oxidación por humedad o partículas metálicas). En la esquina superior derecha se observa una anotación manuscrita a lápiz con el número '125' y un subrayado, lo que indica un marcaje de catalogación o inventario realizado por un archivero o coleccionista.</text:p>
          </table:table-cell>
          <table:table-cell/>
          <table:table-cell office:value-type="string" calcext:value-type="string">
            <text:p>Verso fotográfico; Soporte de cartón; Ficha de inventario</text:p>
          </table:table-cell>
          <table:table-cell office:value-type="string" calcext:value-type="string">
            <text:p>Indeterminada (Conservado en un archivo históric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0.jpg</text:p>
          </table:table-cell>
          <table:table-cell office:value-type="string" calcext:value-type="string">
            <text:p>qrcfbg</text:p>
          </table:table-cell>
          <table:table-cell office:value-type="string" calcext:value-type="string">
            <text:p>image</text:p>
          </table:table-cell>
          <table:table-cell office:value-type="string" calcext:value-type="string">
            <text:p>/objects/impresion_120.jpg</text:p>
          </table:table-cell>
          <table:table-cell office:value-type="string" calcext:value-type="string">
            <text:p>/objects/small/impresion_120_sm.jpg</text:p>
          </table:table-cell>
          <table:table-cell office:value-type="string" calcext:value-type="string">
            <text:p>/objects/thumbs/impresion_12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1</text:p>
          </table:table-cell>
          <table:table-cell office:value-type="string" calcext:value-type="string">
            <text:p>Decoración</text:p>
          </table:table-cell>
          <table:table-cell office:value-type="float" office:value="1970" calcext:value-type="float">
            <text:p>1970</text:p>
          </table:table-cell>
          <table:table-cell/>
          <table:table-cell office:value-type="string" calcext:value-type="string">
            <text:p>William Eggleston</text:p>
          </table:table-cell>
          <table:table-cell/>
          <table:table-cell office:value-type="string" calcext:value-type="string">
            <text:p>Fotografía en blanco y negro que muestra un rincón doméstico con una lámpara de pie de estilo barroco o neoclásico, flanqueada por cortinas plisadas y una rejilla de ventilación, capturando la estética de la cotidianidad estadounidense.</text:p>
          </table:table-cell>
          <table:table-cell/>
          <table:table-cell office:value-type="string" calcext:value-type="string">
            <text:p>Decoración; Arquitectura vernácula; Iluminación</text:p>
          </table:table-cell>
          <table:table-cell office:value-type="string" calcext:value-type="string">
            <text:p>Memphis, Tennessee</text:p>
          </table:table-cell>
          <table:table-cell office:value-type="float" office:value="35.1495" calcext:value-type="float">
            <text:p>35.1495</text:p>
          </table:table-cell>
          <table:table-cell office:value-type="float" office:value="-90.049" calcext:value-type="float">
            <text:p>-90.04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1.jpg</text:p>
          </table:table-cell>
          <table:table-cell office:value-type="string" calcext:value-type="string">
            <text:p>9t0jvj</text:p>
          </table:table-cell>
          <table:table-cell office:value-type="string" calcext:value-type="string">
            <text:p>image</text:p>
          </table:table-cell>
          <table:table-cell office:value-type="string" calcext:value-type="string">
            <text:p>/objects/impresion_121.jpg</text:p>
          </table:table-cell>
          <table:table-cell office:value-type="string" calcext:value-type="string">
            <text:p>/objects/small/impresion_121_sm.jpg</text:p>
          </table:table-cell>
          <table:table-cell office:value-type="string" calcext:value-type="string">
            <text:p>/objects/thumbs/impresion_1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22</text:p>
          </table:table-cell>
          <table:table-cell office:value-type="string" calcext:value-type="string">
            <text:p>Polaroid</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verso de una fotografía instantánea Polaroid que identifica el contenido de la imagen frontal como una lámpara de pie (floor lamp) ubicada en la residencia de una pareja identificada como Bob y Leda. La pieza es un ejemplo de documentación doméstica y el uso de la fotografía instantánea para el registro de interiores en la mitad del siglo XX.</text:p>
          </table:table-cell>
          <table:table-cell/>
          <table:table-cell office:value-type="string" calcext:value-type="string">
            <text:p>Polaroid; Fotografía doméstica; Siglo XX</text:p>
          </table:table-cell>
          <table:table-cell office:value-type="string" calcext:value-type="string">
            <text:p>Estados Unidos</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2.jpg</text:p>
          </table:table-cell>
          <table:table-cell office:value-type="string" calcext:value-type="string">
            <text:p>bbv96i</text:p>
          </table:table-cell>
          <table:table-cell office:value-type="string" calcext:value-type="string">
            <text:p>image</text:p>
          </table:table-cell>
          <table:table-cell office:value-type="string" calcext:value-type="string">
            <text:p>/objects/impresion_122.jpg</text:p>
          </table:table-cell>
          <table:table-cell office:value-type="string" calcext:value-type="string">
            <text:p>/objects/small/impresion_122_sm.jpg</text:p>
          </table:table-cell>
          <table:table-cell office:value-type="string" calcext:value-type="string">
            <text:p>/objects/thumbs/impresion_1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3</text:p>
          </table:table-cell>
          <table:table-cell office:value-type="string" calcext:value-type="string">
            <text:p>Vida suburbana</text:p>
          </table:table-cell>
          <table:table-cell office:value-type="float" office:value="1962" calcext:value-type="float">
            <text:p>1962</text:p>
          </table:table-cell>
          <table:table-cell/>
          <table:table-cell office:value-type="string" calcext:value-type="string">
            <text:p>Anónimo</text:p>
          </table:table-cell>
          <table:table-cell/>
          <table:table-cell office:value-type="string" calcext:value-type="string">
            <text:p>Instantánea amateur en blanco y negro de una familia de cinco miembros (dos mujeres, un hombre y dos niños) posando frente a una residencia de estilo suburbano. La imagen captura la estética doméstica y el ideal de la familia nuclear estadounidense de la era de la posguerra.</text:p>
          </table:table-cell>
          <table:table-cell/>
          <table:table-cell office:value-type="string" calcext:value-type="string">
            <text:p>Vida suburbana; Moda años 60; Retrato familiar</text:p>
          </table:table-cell>
          <table:table-cell office:value-type="string" calcext:value-type="string">
            <text:p>Estados Unidos de América (región del Medio Oeste o Nor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3.jpg</text:p>
          </table:table-cell>
          <table:table-cell office:value-type="string" calcext:value-type="string">
            <text:p>ccmyw</text:p>
          </table:table-cell>
          <table:table-cell office:value-type="string" calcext:value-type="string">
            <text:p>image</text:p>
          </table:table-cell>
          <table:table-cell office:value-type="string" calcext:value-type="string">
            <text:p>/objects/impresion_123.jpg</text:p>
          </table:table-cell>
          <table:table-cell office:value-type="string" calcext:value-type="string">
            <text:p>/objects/small/impresion_123_sm.jpg</text:p>
          </table:table-cell>
          <table:table-cell office:value-type="string" calcext:value-type="string">
            <text:p>/objects/thumbs/impresion_12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4</text:p>
          </table:table-cell>
          <table:table-cell office:value-type="string" calcext:value-type="string">
            <text:p>Reverso fotográfico</text:p>
          </table:table-cell>
          <table:table-cell office:value-type="float" office:value="1950" calcext:value-type="float">
            <text:p>1950</text:p>
          </table:table-cell>
          <table:table-cell/>
          <table:table-cell office:value-type="string" calcext:value-type="string">
            <text:p>Anónimo (Laboratorio fotográfico comercial)</text:p>
          </table:table-cell>
          <table:table-cell/>
          <table:table-cell office:value-type="string" calcext:value-type="string">
            <text:p>Reverso de una impresión fotográfica analógica de mediados del siglo XX, que muestra un borde izquierdo festoneado (dentado) y una solapa perforada en el extremo opuesto. El papel presenta marcas de control de laboratorio, incluyendo el número '47' en una esquina y un código alfanumérico tenue estampado 'F130119', característicos del procesamiento comercial de aficionados.</text:p>
          </table:table-cell>
          <table:table-cell/>
          <table:table-cell office:value-type="string" calcext:value-type="string">
            <text:p>Reverso fotográfico; Borde festoneado; Marcas de laboratorio</text:p>
          </table:table-cell>
          <table:table-cell office:value-type="string" calcext:value-type="string">
            <text:p>Desconocida (Origen comercial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4.jpg</text:p>
          </table:table-cell>
          <table:table-cell office:value-type="string" calcext:value-type="string">
            <text:p>vis4ib</text:p>
          </table:table-cell>
          <table:table-cell office:value-type="string" calcext:value-type="string">
            <text:p>image</text:p>
          </table:table-cell>
          <table:table-cell office:value-type="string" calcext:value-type="string">
            <text:p>/objects/impresion_124.jpg</text:p>
          </table:table-cell>
          <table:table-cell office:value-type="string" calcext:value-type="string">
            <text:p>/objects/small/impresion_124_sm.jpg</text:p>
          </table:table-cell>
          <table:table-cell office:value-type="string" calcext:value-type="string">
            <text:p>/objects/thumbs/impresion_124_th.jpg</text:p>
          </table:table-cell>
          <table:table-cell table:number-columns-repeated="2"/>
          <table:table-cell office:value-type="string" calcext:value-type="string">
            <text:p>Papel fotográfico de base de fibra (FB)</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5</text:p>
          </table:table-cell>
          <table:table-cell office:value-type="string" calcext:value-type="string">
            <text:p>Elecciones federales México 1979</text:p>
          </table:table-cell>
          <table:table-cell office:value-type="float" office:value="1979" calcext:value-type="float">
            <text:p>1979</text:p>
          </table:table-cell>
          <table:table-cell/>
          <table:table-cell office:value-type="string" calcext:value-type="string">
            <text:p>Anónimo</text:p>
          </table:table-cell>
          <table:table-cell/>
          <table:table-cell office:value-type="string" calcext:value-type="string">
            <text:p>Fotografía instantánea que captura a una mujer utilizando un teléfono de línea fija en un entorno administrativo o gubernamental en México. Al fondo, un tablero informativo exhibe carteles de propaganda electoral con el lema 'VOTA EL 1º DE JULIO' y 'POR MEXICO', lo que vincula la imagen directamente con el proceso de las elecciones federales mexicanas de 1979.</text:p>
          </table:table-cell>
          <table:table-cell/>
          <table:table-cell office:value-type="string" calcext:value-type="string">
            <text:p>Elecciones federales México 1979; Telefonía analógica; Fotografía Polaroid</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5.jpg</text:p>
          </table:table-cell>
          <table:table-cell office:value-type="string" calcext:value-type="string">
            <text:p>o6vzu</text:p>
          </table:table-cell>
          <table:table-cell office:value-type="string" calcext:value-type="string">
            <text:p>image</text:p>
          </table:table-cell>
          <table:table-cell office:value-type="string" calcext:value-type="string">
            <text:p>/objects/impresion_125.jpg</text:p>
          </table:table-cell>
          <table:table-cell office:value-type="string" calcext:value-type="string">
            <text:p>/objects/small/impresion_125_sm.jpg</text:p>
          </table:table-cell>
          <table:table-cell office:value-type="string" calcext:value-type="string">
            <text:p>/objects/thumbs/impresion_12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6</text:p>
          </table:table-cell>
          <table:table-cell office:value-type="string" calcext:value-type="string">
            <text:p>Película Kodak</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La imagen muestra un fragmento de película fotográfica montada en un soporte rígido de color negro con la inscripción 'KODAK FILM'. La superficie fotosensible aparece completamente negra, lo que sugiere una falta total de exposición a la luz, una sobreexposición extrema en caso de ser un negativo, o simplemente un fotograma virgen procesado. Representa un artefacto técnico de la era de la fotografía química.</text:p>
          </table:table-cell>
          <table:table-cell/>
          <table:table-cell office:value-type="string" calcext:value-type="string">
            <text:p>Película Kodak; Material fotosensible; Arqueología industrial</text:p>
          </table:table-cell>
          <table:table-cell office:value-type="string" calcext:value-type="string">
            <text:p>Rochester, Nueva York (Sede de Eastman Kodak)</text:p>
          </table:table-cell>
          <table:table-cell office:value-type="float" office:value="43.161" calcext:value-type="float">
            <text:p>43.161</text:p>
          </table:table-cell>
          <table:table-cell office:value-type="float" office:value="-77.6109" calcext:value-type="float">
            <text:p>-77.61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6.jpg</text:p>
          </table:table-cell>
          <table:table-cell office:value-type="string" calcext:value-type="string">
            <text:p>670i5w</text:p>
          </table:table-cell>
          <table:table-cell office:value-type="string" calcext:value-type="string">
            <text:p>image</text:p>
          </table:table-cell>
          <table:table-cell office:value-type="string" calcext:value-type="string">
            <text:p>/objects/impresion_126.jpg</text:p>
          </table:table-cell>
          <table:table-cell office:value-type="string" calcext:value-type="string">
            <text:p>/objects/small/impresion_126_sm.jpg</text:p>
          </table:table-cell>
          <table:table-cell office:value-type="string" calcext:value-type="string">
            <text:p>/objects/thumbs/impresion_1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7</text:p>
          </table:table-cell>
          <table:table-cell office:value-type="string" calcext:value-type="string">
            <text:p>Arquitectura neocolonial</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Una pareja joven posa en traje de baño junto a una piscina en el jardín de una villa de estilo neocolonial. La escena está enmarcada por una densa vegetación tropical, destacando palmeras y una arquitectura de paredes blancas con arcos de medio punto, capturando la estética del turismo de lujo y el estilo de vida de la clase media-alta durante el auge de los destinos de descanso de mediados de siglo.</text:p>
          </table:table-cell>
          <table:table-cell/>
          <table:table-cell office:value-type="string" calcext:value-type="string">
            <text:p>Arquitectura neocolonial; Turismo de mediados de siglo; Ocio y recreación</text:p>
          </table:table-cell>
          <table:table-cell office:value-type="string" calcext:value-type="string">
            <text:p>Cuernavaca, Morelos, México</text:p>
          </table:table-cell>
          <table:table-cell office:value-type="float" office:value="18.9242" calcext:value-type="float">
            <text:p>18.9242</text:p>
          </table:table-cell>
          <table:table-cell office:value-type="float" office:value="-99.2216" calcext:value-type="float">
            <text:p>-99.22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7.jpg</text:p>
          </table:table-cell>
          <table:table-cell office:value-type="string" calcext:value-type="string">
            <text:p>3hiu7j</text:p>
          </table:table-cell>
          <table:table-cell office:value-type="string" calcext:value-type="string">
            <text:p>image</text:p>
          </table:table-cell>
          <table:table-cell office:value-type="string" calcext:value-type="string">
            <text:p>/objects/impresion_127.jpg</text:p>
          </table:table-cell>
          <table:table-cell office:value-type="string" calcext:value-type="string">
            <text:p>/objects/small/impresion_127_sm.jpg</text:p>
          </table:table-cell>
          <table:table-cell office:value-type="string" calcext:value-type="string">
            <text:p>/objects/thumbs/impresion_12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128</text:p>
          </table:table-cell>
          <table:table-cell office:value-type="string" calcext:value-type="string">
            <text:p>Fujifilm FP-100C</text:p>
          </table:table-cell>
          <table:table-cell office:value-type="float" office:value="1993" calcext:value-type="float">
            <text:p>1993</text:p>
          </table:table-cell>
          <table:table-cell/>
          <table:table-cell office:value-type="string" calcext:value-type="string">
            <text:p>Anónimo</text:p>
          </table:table-cell>
          <table:table-cell/>
          <table:table-cell office:value-type="string" calcext:value-type="string">
            <text:p>Registro fotográfico en estado de degradación avanzada sobre soporte de película instantánea. La imagen muestra una base cromática azulada pálida con pérdida casi total de la emulsión fotosensible, conservando únicamente un pequeño fragmento de información visual en el borde inferior que parece representar figuras humanas o un paisaje con tonos cálidos. En el margen derecho se observa una franja negra rugosa correspondiente al residuo del revelador químico del proceso de 'peel-apart'.</text:p>
          </table:table-cell>
          <table:table-cell/>
          <table:table-cell office:value-type="string" calcext:value-type="string">
            <text:p>Fujifilm FP-100C; Fotografía instantánea; Deterioro químico</text:p>
          </table:table-cell>
          <table:table-cell office:value-type="string" calcext:value-type="string">
            <text:p>Desconocida (Material de origen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8.jpg</text:p>
          </table:table-cell>
          <table:table-cell office:value-type="string" calcext:value-type="string">
            <text:p>xdbzau</text:p>
          </table:table-cell>
          <table:table-cell office:value-type="string" calcext:value-type="string">
            <text:p>image</text:p>
          </table:table-cell>
          <table:table-cell office:value-type="string" calcext:value-type="string">
            <text:p>/objects/impresion_128.jpg</text:p>
          </table:table-cell>
          <table:table-cell office:value-type="string" calcext:value-type="string">
            <text:p>/objects/small/impresion_128_sm.jpg</text:p>
          </table:table-cell>
          <table:table-cell office:value-type="string" calcext:value-type="string">
            <text:p>/objects/thumbs/impresion_12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9</text:p>
          </table:table-cell>
          <table:table-cell office:value-type="string" calcext:value-type="string">
            <text:p>Retrato de estudio</text:p>
          </table:table-cell>
          <table:table-cell office:value-type="float" office:value="1964" calcext:value-type="float">
            <text:p>1964</text:p>
          </table:table-cell>
          <table:table-cell/>
          <table:table-cell office:value-type="string" calcext:value-type="string">
            <text:p>Anónimo (Fotógrafo de estudio comercial)</text:p>
          </table:table-cell>
          <table:table-cell/>
          <table:table-cell office:value-type="string" calcext:value-type="string">
            <text:p>Retrato de estudio individual de una mujer joven, capturado a medio cuerpo sobre un fondo neutro moteado. La imagen destaca por el peinado estilo 'bouffant' con puntas hacia afuera (flip), característico de la moda femenina de mediados de la década de 1960, y una vestimenta sencilla que sugiere un retrato escolar o de anuario.</text:p>
          </table:table-cell>
          <table:table-cell/>
          <table:table-cell office:value-type="string" calcext:value-type="string">
            <text:p>Retrato de estudio; Peinado bouffant; Moda años 60</text:p>
          </table:table-cell>
          <table:table-cell office:value-type="string" calcext:value-type="string">
            <text:p>Norteamérica (probablemente Estados Unido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9.jpg</text:p>
          </table:table-cell>
          <table:table-cell office:value-type="string" calcext:value-type="string">
            <text:p>krej9o</text:p>
          </table:table-cell>
          <table:table-cell office:value-type="string" calcext:value-type="string">
            <text:p>image</text:p>
          </table:table-cell>
          <table:table-cell office:value-type="string" calcext:value-type="string">
            <text:p>/objects/impresion_129.jpg</text:p>
          </table:table-cell>
          <table:table-cell office:value-type="string" calcext:value-type="string">
            <text:p>/objects/small/impresion_129_sm.jpg</text:p>
          </table:table-cell>
          <table:table-cell office:value-type="string" calcext:value-type="string">
            <text:p>/objects/thumbs/impresion_12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30</text:p>
          </table:table-cell>
          <table:table-cell office:value-type="string" calcext:value-type="string">
            <text:p>Correspondencia personal</text:p>
          </table:table-cell>
          <table:table-cell office:value-type="float" office:value="1970" calcext:value-type="float">
            <text:p>1970</text:p>
          </table:table-cell>
          <table:table-cell/>
          <table:table-cell office:value-type="string" calcext:value-type="string">
            <text:p>Donna (Anónimo)</text:p>
          </table:table-cell>
          <table:table-cell/>
          <table:table-cell office:value-type="string" calcext:value-type="string">
            <text:p>Reverso de una fotografía o tarjeta personal con un mensaje manuscrito en cursiva. La nota está dirigida a una joven llamada Monica, identificada como sudamericana, por parte de su amiga Donna en el año 1970. El texto menciona experiencias compartidas en una institución educativa referida como 'B.H.S.', probablemente una 'High School' en los Estados Unidos, donde Monica parece estar realizando una estancia o intercambio.</text:p>
          </table:table-cell>
          <table:table-cell/>
          <table:table-cell office:value-type="string" calcext:value-type="string">
            <text:p>Correspondencia personal; Intercambio estudiantil; Cultura juvenil de 1970</text:p>
          </table:table-cell>
          <table:table-cell office:value-type="string" calcext:value-type="string">
            <text:p>Estados Unidos (Lugar exacto indeterminado, referenciado como 'the state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0.jpg</text:p>
          </table:table-cell>
          <table:table-cell office:value-type="string" calcext:value-type="string">
            <text:p>4x4y6d</text:p>
          </table:table-cell>
          <table:table-cell office:value-type="string" calcext:value-type="string">
            <text:p>image</text:p>
          </table:table-cell>
          <table:table-cell office:value-type="string" calcext:value-type="string">
            <text:p>/objects/impresion_130.jpg</text:p>
          </table:table-cell>
          <table:table-cell office:value-type="string" calcext:value-type="string">
            <text:p>/objects/small/impresion_130_sm.jpg</text:p>
          </table:table-cell>
          <table:table-cell office:value-type="string" calcext:value-type="string">
            <text:p>/objects/thumbs/impresion_130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31</text:p>
          </table:table-cell>
          <table:table-cell office:value-type="string" calcext:value-type="string">
            <text:p>Moda eduardiana</text:p>
          </table:table-cell>
          <table:table-cell office:value-type="float" office:value="1900" calcext:value-type="float">
            <text:p>1900</text:p>
          </table:table-cell>
          <table:table-cell/>
          <table:table-cell office:value-type="string" calcext:value-type="string">
            <text:p>Anónimo</text:p>
          </table:table-cell>
          <table:table-cell/>
          <table:table-cell office:value-type="string" calcext:value-type="string">
            <text:p>Retrato de estudio de una mujer joven, capturado en plano medio corto (busto). La retratada luce un peinado recogido típico de la transición entre los siglos XIX y XX, con una raya central y volumen lateral. Viste una prenda de cuello alto rígido, posiblemente una blusa de seda o lana oscura con detalles plisados en el pecho, adornada con una cadena fina y un colgante. La fotografía está montada sobre una cartulina gris de textura rugosa con un borde gofrado decorativo, estilo común en los estudios fotográficos comerciales de la era eduardiana.</text:p>
          </table:table-cell>
          <table:table-cell/>
          <table:table-cell office:value-type="string" calcext:value-type="string">
            <text:p>Moda eduardiana; Retrato de estudio; Fotografía montada</text:p>
          </table:table-cell>
          <table:table-cell office:value-type="string" calcext:value-type="string">
            <text:p>Europa Occidental o América del Norte</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1.jpg</text:p>
          </table:table-cell>
          <table:table-cell office:value-type="string" calcext:value-type="string">
            <text:p>xat68l</text:p>
          </table:table-cell>
          <table:table-cell office:value-type="string" calcext:value-type="string">
            <text:p>image</text:p>
          </table:table-cell>
          <table:table-cell office:value-type="string" calcext:value-type="string">
            <text:p>/objects/impresion_131.jpg</text:p>
          </table:table-cell>
          <table:table-cell office:value-type="string" calcext:value-type="string">
            <text:p>/objects/small/impresion_131_sm.jpg</text:p>
          </table:table-cell>
          <table:table-cell office:value-type="string" calcext:value-type="string">
            <text:p>/objects/thumbs/impresion_131_th.jpg</text:p>
          </table:table-cell>
          <table:table-cell table:number-columns-repeated="2"/>
          <table:table-cell office:value-type="string" calcext:value-type="string">
            <text:p>Impresión de gelatina de plata con virado sepia sobre papel</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table:number-columns-repeated="2" office:value-type="string" calcext:value-type="string">
            <text:p>Negativo</text:p>
          </table:table-cell>
        </table:table-row>
        <table:table-row table:style-name="ro1">
          <table:table-cell office:value-type="string" calcext:value-type="string">
            <text:p>impresion_132</text:p>
          </table:table-cell>
          <table:table-cell office:value-type="string" calcext:value-type="string">
            <text:p>Manuscrito</text:p>
          </table:table-cell>
          <table:table-cell office:value-type="float" office:value="1904" calcext:value-type="float">
            <text:p>1904</text:p>
          </table:table-cell>
          <table:table-cell/>
          <table:table-cell office:value-type="string" calcext:value-type="string">
            <text:p>Anónimo</text:p>
          </table:table-cell>
          <table:table-cell/>
          <table:table-cell office:value-type="string" calcext:value-type="string">
            <text:p>Reverso de una fotografía histórica que presenta una inscripción manuscrita en tinta sobre un soporte de cartulina amarillenta. El texto identifica al sujeto o propietario como 'Guy Kindred', con una fecha precisa del '8 de junio de 1904' y la ubicación 'Brownsville'. El estado de conservación muestra signos de acidificación, foxing y desgaste perimetral, típicos de documentos familiares de principios del siglo XX.</text:p>
          </table:table-cell>
          <table:table-cell/>
          <table:table-cell office:value-type="string" calcext:value-type="string">
            <text:p>Manuscrito; 1904; Brownsville</text:p>
          </table:table-cell>
          <table:table-cell office:value-type="string" calcext:value-type="string">
            <text:p>Brownsville, Texas, Estados Unidos</text:p>
          </table:table-cell>
          <table:table-cell office:value-type="float" office:value="25.9017" calcext:value-type="float">
            <text:p>25.9017</text:p>
          </table:table-cell>
          <table:table-cell office:value-type="float" office:value="-97.4975" calcext:value-type="float">
            <text:p>-97.49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2.jpg</text:p>
          </table:table-cell>
          <table:table-cell office:value-type="string" calcext:value-type="string">
            <text:p>wryclk</text:p>
          </table:table-cell>
          <table:table-cell office:value-type="string" calcext:value-type="string">
            <text:p>image</text:p>
          </table:table-cell>
          <table:table-cell office:value-type="string" calcext:value-type="string">
            <text:p>/objects/impresion_132.jpg</text:p>
          </table:table-cell>
          <table:table-cell office:value-type="string" calcext:value-type="string">
            <text:p>/objects/small/impresion_132_sm.jpg</text:p>
          </table:table-cell>
          <table:table-cell office:value-type="string" calcext:value-type="string">
            <text:p>/objects/thumbs/impresion_132_th.jpg</text:p>
          </table:table-cell>
          <table:table-cell table:number-columns-repeated="2"/>
          <table:table-cell office:value-type="string" calcext:value-type="string">
            <text:p>Soporte de cartulina de alto gramaje</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01</text:p>
          </table:table-cell>
          <table:table-cell office:value-type="string" calcext:value-type="string">
            <text:p>Primera Comunión</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oble de estudio en formato negativo que captura a dos niños vestidos con ajuares de Primera Comunión. Los sujetos portan elementos litúrgicos tradicionales: cirios decorados, misales y rosarios, destacando el brazalete de raso en el brazo izquierdo, un elemento iconográfico esencial de la tradición católica hispana de mediados del siglo XX.</text:p>
          </table:table-cell>
          <table:table-cell/>
          <table:table-cell office:value-type="string" calcext:value-type="string">
            <text:p>Primera Comunión; Retrato de estudio; Negativo fotográfic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1.jpg</text:p>
          </table:table-cell>
          <table:table-cell office:value-type="string" calcext:value-type="string">
            <text:p>kscjb8</text:p>
          </table:table-cell>
          <table:table-cell office:value-type="string" calcext:value-type="string">
            <text:p>image</text:p>
          </table:table-cell>
          <table:table-cell office:value-type="string" calcext:value-type="string">
            <text:p>/objects/negativo_001.jpg</text:p>
          </table:table-cell>
          <table:table-cell office:value-type="string" calcext:value-type="string">
            <text:p>/objects/small/negativo_001_sm.jpg</text:p>
          </table:table-cell>
          <table:table-cell office:value-type="string" calcext:value-type="string">
            <text:p>/objects/thumbs/negativo_001_th.jpg</text:p>
          </table:table-cell>
          <table:table-cell table:number-columns-repeated="2"/>
          <table:table-cell office:value-type="string" calcext:value-type="string">
            <text:p>Negativo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2</text:p>
          </table:table-cell>
          <table:table-cell office:value-type="string" calcext:value-type="string">
            <text:p>Fotografía publicitaria</text:p>
          </table:table-cell>
          <table:table-cell office:value-type="float" office:value="1945" calcext:value-type="float">
            <text:p>1945</text:p>
          </table:table-cell>
          <table:table-cell/>
          <table:table-cell office:value-type="string" calcext:value-type="string">
            <text:p>Agencia Casasola</text:p>
          </table:table-cell>
          <table:table-cell/>
          <table:table-cell office:value-type="string" calcext:value-type="string">
            <text:p>Fotografía de estudio en formato negativo que retrata a un niño sentado frente a un pastel decorado con velas, flanqueado por dos grandes bloques de hielo translúcidos sobre un piso cuadriculado. La composición sugiere un uso publicitario para promocionar la eficacia de la refrigeración doméstica o industrial en la conservación de alimentos festivos, una temática común en la modernización de México durante mediados del siglo XX.</text:p>
          </table:table-cell>
          <table:table-cell/>
          <table:table-cell office:value-type="string" calcext:value-type="string">
            <text:p>Fotografía publicitaria; Refrigeración; Infancia</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2.jpg</text:p>
          </table:table-cell>
          <table:table-cell office:value-type="string" calcext:value-type="string">
            <text:p>2zgjat</text:p>
          </table:table-cell>
          <table:table-cell office:value-type="string" calcext:value-type="string">
            <text:p>image</text:p>
          </table:table-cell>
          <table:table-cell office:value-type="string" calcext:value-type="string">
            <text:p>/objects/negativo_002.jpg</text:p>
          </table:table-cell>
          <table:table-cell office:value-type="string" calcext:value-type="string">
            <text:p>/objects/small/negativo_002_sm.jpg</text:p>
          </table:table-cell>
          <table:table-cell office:value-type="string" calcext:value-type="string">
            <text:p>/objects/thumbs/negativo_00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3</text:p>
          </table:table-cell>
          <table:table-cell office:value-type="string" calcext:value-type="string">
            <text:p>Denali</text:p>
          </table:table-cell>
          <table:table-cell office:value-type="float" office:value="1947" calcext:value-type="float">
            <text:p>1947</text:p>
          </table:table-cell>
          <table:table-cell/>
          <table:table-cell office:value-type="string" calcext:value-type="string">
            <text:p>Bradford Washburn</text:p>
          </table:table-cell>
          <table:table-cell/>
          <table:table-cell office:value-type="string" calcext:value-type="string">
            <text:p>Vista parcial de un pico nevado de alta montaña, identificada como una región del macizo de Denali (Monte McKinley). La imagen muestra el borde superior de un negativo original de gran formato con marcas de registro industriales y una sección de una cumbre alpina glaciada.</text:p>
          </table:table-cell>
          <table:table-cell/>
          <table:table-cell office:value-type="string" calcext:value-type="string">
            <text:p>Denali; Fotografía aérea; Bradford Washburn</text:p>
          </table:table-cell>
          <table:table-cell office:value-type="string" calcext:value-type="string">
            <text:p>Denali National Park, Alaska</text:p>
          </table:table-cell>
          <table:table-cell office:value-type="float" office:value="63.0692" calcext:value-type="float">
            <text:p>63.0692</text:p>
          </table:table-cell>
          <table:table-cell office:value-type="float" office:value="-151.007" calcext:value-type="float">
            <text:p>-151.0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3.jpg</text:p>
          </table:table-cell>
          <table:table-cell office:value-type="string" calcext:value-type="string">
            <text:p>mtv3x8</text:p>
          </table:table-cell>
          <table:table-cell office:value-type="string" calcext:value-type="string">
            <text:p>image</text:p>
          </table:table-cell>
          <table:table-cell office:value-type="string" calcext:value-type="string">
            <text:p>/objects/negativo_003.jpg</text:p>
          </table:table-cell>
          <table:table-cell office:value-type="string" calcext:value-type="string">
            <text:p>/objects/small/negativo_003_sm.jpg</text:p>
          </table:table-cell>
          <table:table-cell office:value-type="string" calcext:value-type="string">
            <text:p>/objects/thumbs/negativo_003_th.jpg</text:p>
          </table:table-cell>
          <table:table-cell table:number-columns-repeated="2"/>
          <table:table-cell office:value-type="string" calcext:value-type="string">
            <text:p>Negativo sobre soporte de acetato de celulosa (Safety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4</text:p>
          </table:table-cell>
          <table:table-cell office:value-type="string" calcext:value-type="string">
            <text:p>Síndrome del vinagre</text:p>
          </table:table-cell>
          <table:table-cell office:value-type="float" office:value="1940" calcext:value-type="float">
            <text:p>1940</text:p>
          </table:table-cell>
          <table:table-cell/>
          <table:table-cell office:value-type="string" calcext:value-type="string">
            <text:p>Anónimo (Atribuible a fotógrafos de la FSA o departamentos de obras públicas)</text:p>
          </table:table-cell>
          <table:table-cell/>
          <table:table-cell office:value-type="string" calcext:value-type="string">
            <text:p>Negativo fotográfico de gran formato que muestra un estado avanzado de deterioro químico conocido como síndrome del vinagre. A pesar de la severa degradación, se pueden distinguir formas geométricas y líneas diagonales que sugieren una estructura de ingeniería industrial o la construcción de un puente, con cables o vigas metálicas que atraviesan la composición.</text:p>
          </table:table-cell>
          <table:table-cell/>
          <table:table-cell office:value-type="string" calcext:value-type="string">
            <text:p>Síndrome del vinagre; Arqueología industrial; Preservación fílmica</text:p>
          </table:table-cell>
          <table:table-cell office:value-type="string" calcext:value-type="string">
            <text:p>Nueva York, Estados Unidos (Zona industrial o puentes del East River)</text:p>
          </table:table-cell>
          <table:table-cell office:value-type="float" office:value="40.7073" calcext:value-type="float">
            <text:p>40.7073</text:p>
          </table:table-cell>
          <table:table-cell office:value-type="float" office:value="-73.9907" calcext:value-type="float">
            <text:p>-73.99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4.jpg</text:p>
          </table:table-cell>
          <table:table-cell office:value-type="string" calcext:value-type="string">
            <text:p>5k1t2p</text:p>
          </table:table-cell>
          <table:table-cell office:value-type="string" calcext:value-type="string">
            <text:p>image</text:p>
          </table:table-cell>
          <table:table-cell office:value-type="string" calcext:value-type="string">
            <text:p>/objects/negativo_004.jpg</text:p>
          </table:table-cell>
          <table:table-cell office:value-type="string" calcext:value-type="string">
            <text:p>/objects/small/negativo_004_sm.jpg</text:p>
          </table:table-cell>
          <table:table-cell office:value-type="string" calcext:value-type="string">
            <text:p>/objects/thumbs/negativo_0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5</text:p>
          </table:table-cell>
          <table:table-cell office:value-type="string" calcext:value-type="string">
            <text:p>Tennessee Valley Authority</text:p>
          </table:table-cell>
          <table:table-cell office:value-type="float" office:value="1934" calcext:value-type="float">
            <text:p>1934</text:p>
          </table:table-cell>
          <table:table-cell/>
          <table:table-cell office:value-type="string" calcext:value-type="string">
            <text:p>Lewis Wickes Hine</text:p>
          </table:table-cell>
          <table:table-cell/>
          <table:table-cell office:value-type="string" calcext:value-type="string">
            <text:p>Fotografía de archivo que muestra el interior de una cocina en el poblado de Norris, Tennessee, una comunidad modelo construida por la Tennessee Valley Authority (TVA) durante la era del New Deal. La imagen captura el diseño funcionalista de la época, destacando la modernidad de los electrodomésticos y gabinetes destinados a demostrar los beneficios de la electrificación rural impulsada por el gobierno de Roosevelt.</text:p>
          </table:table-cell>
          <table:table-cell/>
          <table:table-cell office:value-type="string" calcext:value-type="string">
            <text:p>Tennessee Valley Authority; Norris Tennessee; New Deal Architecture</text:p>
          </table:table-cell>
          <table:table-cell office:value-type="string" calcext:value-type="string">
            <text:p>Norris, Tennessee, EE. UU.</text:p>
          </table:table-cell>
          <table:table-cell office:value-type="float" office:value="36.1992" calcext:value-type="float">
            <text:p>36.1992</text:p>
          </table:table-cell>
          <table:table-cell office:value-type="float" office:value="-84.0664" calcext:value-type="float">
            <text:p>-84.06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5.jpg</text:p>
          </table:table-cell>
          <table:table-cell office:value-type="string" calcext:value-type="string">
            <text:p>e89yep</text:p>
          </table:table-cell>
          <table:table-cell office:value-type="string" calcext:value-type="string">
            <text:p>image</text:p>
          </table:table-cell>
          <table:table-cell office:value-type="string" calcext:value-type="string">
            <text:p>/objects/negativo_005.jpg</text:p>
          </table:table-cell>
          <table:table-cell office:value-type="string" calcext:value-type="string">
            <text:p>/objects/small/negativo_005_sm.jpg</text:p>
          </table:table-cell>
          <table:table-cell office:value-type="string" calcext:value-type="string">
            <text:p>/objects/thumbs/negativo_005_th.jpg</text:p>
          </table:table-cell>
          <table:table-cell table:number-columns-repeated="2"/>
          <table:table-cell office:value-type="string" calcext:value-type="string">
            <text:p>Negativo original en película de nitrato de celulos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6</text:p>
          </table:table-cell>
          <table:table-cell office:value-type="string" calcext:value-type="string">
            <text:p>Deterioro de nitrato</text:p>
          </table:table-cell>
          <table:table-cell office:value-type="float" office:value="1940" calcext:value-type="float">
            <text:p>1940</text:p>
          </table:table-cell>
          <table:table-cell/>
          <table:table-cell office:value-type="string" calcext:value-type="string">
            <text:p>Hermanos Mayo (Agencia)</text:p>
          </table:table-cell>
          <table:table-cell/>
          <table:table-cell office:value-type="string" calcext:value-type="string">
            <text:p>Negativo fotográfico de gran formato en avanzado estado de deterioro químico, perteneciente al archivo documental de la Ciudad de México. La imagen muestra una degradación severa de la emulsión de gelatina, conocida como reticulación y craquelado, junto con la formación de burbujas de gas y moho, lo que hace casi irreconocible el contenido original, el cual parece sugerir estructuras lineales o un paisaje urbano captado por la agencia Hermanos Mayo.</text:p>
          </table:table-cell>
          <table:table-cell/>
          <table:table-cell office:value-type="string" calcext:value-type="string">
            <text:p>Deterioro de nitrato; Hermanos Mayo; Conservación de archivos</text:p>
          </table:table-cell>
          <table:table-cell office:value-type="string" calcext:value-type="string">
            <text:p>Archivo General de la Nación (Palacio de Lecumberri), Ciudad de México</text:p>
          </table:table-cell>
          <table:table-cell office:value-type="float" office:value="19.4352" calcext:value-type="float">
            <text:p>19.4352</text:p>
          </table:table-cell>
          <table:table-cell office:value-type="float" office:value="-99.1122" calcext:value-type="float">
            <text:p>-99.11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6.jpg</text:p>
          </table:table-cell>
          <table:table-cell office:value-type="string" calcext:value-type="string">
            <text:p>tb0o4</text:p>
          </table:table-cell>
          <table:table-cell office:value-type="string" calcext:value-type="string">
            <text:p>image</text:p>
          </table:table-cell>
          <table:table-cell office:value-type="string" calcext:value-type="string">
            <text:p>/objects/negativo_006.jpg</text:p>
          </table:table-cell>
          <table:table-cell office:value-type="string" calcext:value-type="string">
            <text:p>/objects/small/negativo_006_sm.jpg</text:p>
          </table:table-cell>
          <table:table-cell office:value-type="string" calcext:value-type="string">
            <text:p>/objects/thumbs/negativo_006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07</text:p>
          </table:table-cell>
          <table:table-cell office:value-type="string" calcext:value-type="string">
            <text:p>Farm Security Administration</text:p>
          </table:table-cell>
          <table:table-cell office:value-type="float" office:value="1940" calcext:value-type="float">
            <text:p>1940</text:p>
          </table:table-cell>
          <table:table-cell/>
          <table:table-cell office:value-type="string" calcext:value-type="string">
            <text:p>Russell Lee</text:p>
          </table:table-cell>
          <table:table-cell/>
          <table:table-cell office:value-type="string" calcext:value-type="string">
            <text:p>Vista interior de la tienda y oficina de correos en Pie Town, Nuevo México, capturada por Russell Lee en junio de 1940. La imagen muestra los gabinetes de madera y la estufa del establecimiento, que servía como centro comunitario durante la Gran Depresión. La fotografía forma parte del proyecto de la Farm Security Administration (FSA) para documentar la vida rural en Estados Unidos.</text:p>
          </table:table-cell>
          <table:table-cell/>
          <table:table-cell office:value-type="string" calcext:value-type="string">
            <text:p>Farm Security Administration; Vida rural; Pie Town</text:p>
          </table:table-cell>
          <table:table-cell office:value-type="string" calcext:value-type="string">
            <text:p>Pie Town, Condado de Catron, Nuevo México, Estados Unidos</text:p>
          </table:table-cell>
          <table:table-cell office:value-type="float" office:value="34.2978" calcext:value-type="float">
            <text:p>34.2978</text:p>
          </table:table-cell>
          <table:table-cell office:value-type="float" office:value="-108.1345" calcext:value-type="float">
            <text:p>-108.134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7.jpg</text:p>
          </table:table-cell>
          <table:table-cell office:value-type="string" calcext:value-type="string">
            <text:p>jbd7t8</text:p>
          </table:table-cell>
          <table:table-cell office:value-type="string" calcext:value-type="string">
            <text:p>image</text:p>
          </table:table-cell>
          <table:table-cell office:value-type="string" calcext:value-type="string">
            <text:p>/objects/negativo_007.jpg</text:p>
          </table:table-cell>
          <table:table-cell office:value-type="string" calcext:value-type="string">
            <text:p>/objects/small/negativo_007_sm.jpg</text:p>
          </table:table-cell>
          <table:table-cell office:value-type="string" calcext:value-type="string">
            <text:p>/objects/thumbs/negativo_00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8</text:p>
          </table:table-cell>
          <table:table-cell office:value-type="string" calcext:value-type="string">
            <text:p>Northrop N-1M</text:p>
          </table:table-cell>
          <table:table-cell office:value-type="float" office:value="1940" calcext:value-type="float">
            <text:p>1940</text:p>
          </table:table-cell>
          <table:table-cell/>
          <table:table-cell office:value-type="string" calcext:value-type="string">
            <text:p>Fotógrafo corporativo de Northrop Aircraft, Inc.</text:p>
          </table:table-cell>
          <table:table-cell/>
          <table:table-cell office:value-type="string" calcext:value-type="string">
            <text:p>La imagen muestra un negativo de seguridad de acetato de celulosa en un estado avanzado de degradación (síndrome del vinagre), que presenta el fenómeno de 'canalización' o desprendimiento de la emulsión. A pesar del daño, se distingue la silueta geométrica de una aeronave experimental de tipo 'ala volante', probablemente el Northrop N-1M o el N-9M, aeronaves pioneras diseñadas por Jack Northrop para probar el concepto de sustentación total sin fuselaje ni cola convencional.</text:p>
          </table:table-cell>
          <table:table-cell/>
          <table:table-cell office:value-type="string" calcext:value-type="string">
            <text:p>Northrop N-1M; Ala volante; Síndrome del vinagre</text:p>
          </table:table-cell>
          <table:table-cell office:value-type="string" calcext:value-type="string">
            <text:p>Hawthorne, California, EE. UU.</text:p>
          </table:table-cell>
          <table:table-cell office:value-type="float" office:value="33.9237" calcext:value-type="float">
            <text:p>33.9237</text:p>
          </table:table-cell>
          <table:table-cell office:value-type="float" office:value="-118.3323" calcext:value-type="float">
            <text:p>-118.332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8.jpg</text:p>
          </table:table-cell>
          <table:table-cell office:value-type="string" calcext:value-type="string">
            <text:p>upb18i</text:p>
          </table:table-cell>
          <table:table-cell office:value-type="string" calcext:value-type="string">
            <text:p>image</text:p>
          </table:table-cell>
          <table:table-cell office:value-type="string" calcext:value-type="string">
            <text:p>/objects/negativo_008.jpg</text:p>
          </table:table-cell>
          <table:table-cell office:value-type="string" calcext:value-type="string">
            <text:p>/objects/small/negativo_008_sm.jpg</text:p>
          </table:table-cell>
          <table:table-cell office:value-type="string" calcext:value-type="string">
            <text:p>/objects/thumbs/negativo_00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9</text:p>
          </table:table-cell>
          <table:table-cell office:value-type="string" calcext:value-type="string">
            <text:p>Primera Comunión</text:p>
          </table:table-cell>
          <table:table-cell office:value-type="float" office:value="1940" calcext:value-type="float">
            <text:p>1940</text:p>
          </table:table-cell>
          <table:table-cell/>
          <table:table-cell office:value-type="string" calcext:value-type="string">
            <text:p>Agustín Víctor Casasola (Estudio)</text:p>
          </table:table-cell>
          <table:table-cell/>
          <table:table-cell office:value-type="string" calcext:value-type="string">
            <text:p>Un retrato de estudio capturado en un negativo de gran formato que muestra a dos niños, probablemente hermanos, vestidos con trajes de gala tipo 'marinerito', típicos de ceremonias religiosas católicas como la Primera Comunión en México. Los sujetos portan rosarios y lo que parecen ser velas o estandartes ceremoniales, posando frente a un fondo de estudio neutro que presenta un notable patrón de deterioro circular.</text:p>
          </table:table-cell>
          <table:table-cell/>
          <table:table-cell office:value-type="string" calcext:value-type="string">
            <text:p>Primera Comunión; Estudio Casasola; Negativo de seguridad</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9.jpg</text:p>
          </table:table-cell>
          <table:table-cell office:value-type="string" calcext:value-type="string">
            <text:p>40k4in</text:p>
          </table:table-cell>
          <table:table-cell office:value-type="string" calcext:value-type="string">
            <text:p>image</text:p>
          </table:table-cell>
          <table:table-cell office:value-type="string" calcext:value-type="string">
            <text:p>/objects/negativo_009.jpg</text:p>
          </table:table-cell>
          <table:table-cell office:value-type="string" calcext:value-type="string">
            <text:p>/objects/small/negativo_009_sm.jpg</text:p>
          </table:table-cell>
          <table:table-cell office:value-type="string" calcext:value-type="string">
            <text:p>/objects/thumbs/negativo_00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10</text:p>
          </table:table-cell>
          <table:table-cell office:value-type="string" calcext:value-type="string">
            <text:p>Estudio Scurlock</text:p>
          </table:table-cell>
          <table:table-cell office:value-type="float" office:value="1940" calcext:value-type="float">
            <text:p>1940</text:p>
          </table:table-cell>
          <table:table-cell/>
          <table:table-cell office:value-type="string" calcext:value-type="string">
            <text:p>Scurlock Studio (Addison N. Scurlock)</text:p>
          </table:table-cell>
          <table:table-cell/>
          <table:table-cell office:value-type="string" calcext:value-type="string">
            <text:p>Retrato de estudio de una mujer afroamericana, notablemente afectado por un proceso severo de deterioro físico conocido como 'canalización' o desprendimiento de la emulsión. A pesar del daño, se distingue la figura de una persona con un tocado o cofia, característico de los retratos sociales realizados por el estudio Scurlock en Washington D.C.</text:p>
          </table:table-cell>
          <table:table-cell/>
          <table:table-cell office:value-type="string" calcext:value-type="string">
            <text:p>Estudio Scurlock; Deterioro de emulsión; Afrodescendientes</text:p>
          </table:table-cell>
          <table:table-cell office:value-type="string" calcext:value-type="string">
            <text:p>Washington, D.C., Estados Unidos</text:p>
          </table:table-cell>
          <table:table-cell office:value-type="float" office:value="38.9149" calcext:value-type="float">
            <text:p>38.9149</text:p>
          </table:table-cell>
          <table:table-cell office:value-type="float" office:value="-77.0305" calcext:value-type="float">
            <text:p>-77.030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10.jpg</text:p>
          </table:table-cell>
          <table:table-cell office:value-type="string" calcext:value-type="string">
            <text:p>52edd</text:p>
          </table:table-cell>
          <table:table-cell office:value-type="string" calcext:value-type="string">
            <text:p>image</text:p>
          </table:table-cell>
          <table:table-cell office:value-type="string" calcext:value-type="string">
            <text:p>/objects/negativo_010.jpg</text:p>
          </table:table-cell>
          <table:table-cell office:value-type="string" calcext:value-type="string">
            <text:p>/objects/small/negativo_010_sm.jpg</text:p>
          </table:table-cell>
          <table:table-cell office:value-type="string" calcext:value-type="string">
            <text:p>/objects/thumbs/negativo_01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4</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Atribuido al estilo de los Estudios Casasola o similar)</text:p>
          </table:table-cell>
          <table:table-cell/>
          <table:table-cell office:value-type="string" calcext:value-type="string">
            <text:p>Un retrato de estudio en formato de negativo sobre placa de vidrio que muestra a una mujer joven de la época de la transición entre el siglo XIX y XX. La mujer luce un peinado estilo pompadour, muy popular en la década de 1890 y 1900, y viste una blusa de cuello alto con detalles de encaje intrincado y plisado vertical, característica de la moda de la Belle Époque. Destacan sus joyas: una cadena con una cruz y un dije de luna creciente, elementos comunes en la joyería simbólica de finales de la época victoriana.</text:p>
          </table:table-cell>
          <table:table-cell/>
          <table:table-cell office:value-type="string" calcext:value-type="string">
            <text:p>Retrato de estudio; Placa de vidrio; Belle Époque</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4.jpg</text:p>
          </table:table-cell>
          <table:table-cell office:value-type="string" calcext:value-type="string">
            <text:p>7unx4l</text:p>
          </table:table-cell>
          <table:table-cell office:value-type="string" calcext:value-type="string">
            <text:p>image</text:p>
          </table:table-cell>
          <table:table-cell office:value-type="string" calcext:value-type="string">
            <text:p>/objects/negativo_024.jpg</text:p>
          </table:table-cell>
          <table:table-cell office:value-type="string" calcext:value-type="string">
            <text:p>/objects/small/negativo_024_sm.jpg</text:p>
          </table:table-cell>
          <table:table-cell office:value-type="string" calcext:value-type="string">
            <text:p>/objects/thumbs/negativo_024_th.jpg</text:p>
          </table:table-cell>
          <table:table-cell table:number-columns-repeated="2"/>
          <table:table-cell office:value-type="string" calcext:value-type="string">
            <text:p>Negativo de placa de vidrio al gelatino-bromuro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5</text:p>
          </table:table-cell>
          <table:table-cell office:value-type="string" calcext:value-type="string">
            <text:p>Negativo de placa de vidrio</text:p>
          </table:table-cell>
          <table:table-cell office:value-type="float" office:value="1915" calcext:value-type="float">
            <text:p>1915</text:p>
          </table:table-cell>
          <table:table-cell/>
          <table:table-cell office:value-type="string" calcext:value-type="string">
            <text:p>George Grantham Bain (Bain News Service)</text:p>
          </table:table-cell>
          <table:table-cell/>
          <table:table-cell office:value-type="string" calcext:value-type="string">
            <text:p>Una imagen en negativo que muestra a un grupo de hombres, incluyendo a un joven con uniforme de marinero y varios individuos con vestimenta formal de principios del siglo XX, en lo que parece ser una oficina de alistamiento o un entorno institucional naval. Un hombre a la derecha sostiene un libro o registro abierto, sugiriendo un acto administrativo, como una firma de contrato o juramento.</text:p>
          </table:table-cell>
          <table:table-cell/>
          <table:table-cell office:value-type="string" calcext:value-type="string">
            <text:p>Negativo de placa de vidrio; Uniforme naval; Alistamiento militar</text:p>
          </table:table-cell>
          <table:table-cell office:value-type="string" calcext:value-type="string">
            <text:p>Great Lakes Naval Training Station, Illinois, Estados Unidos</text:p>
          </table:table-cell>
          <table:table-cell office:value-type="float" office:value="42.3045" calcext:value-type="float">
            <text:p>42.3045</text:p>
          </table:table-cell>
          <table:table-cell office:value-type="float" office:value="-87.8427" calcext:value-type="float">
            <text:p>-87.842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5.jpg</text:p>
          </table:table-cell>
          <table:table-cell office:value-type="string" calcext:value-type="string">
            <text:p>wpe3y8</text:p>
          </table:table-cell>
          <table:table-cell office:value-type="string" calcext:value-type="string">
            <text:p>image</text:p>
          </table:table-cell>
          <table:table-cell office:value-type="string" calcext:value-type="string">
            <text:p>/objects/negativo_025.jpg</text:p>
          </table:table-cell>
          <table:table-cell office:value-type="string" calcext:value-type="string">
            <text:p>/objects/small/negativo_025_sm.jpg</text:p>
          </table:table-cell>
          <table:table-cell office:value-type="string" calcext:value-type="string">
            <text:p>/objects/thumbs/negativo_025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6</text:p>
          </table:table-cell>
          <table:table-cell office:value-type="string" calcext:value-type="string">
            <text:p>Jubilæumsstævne</text:p>
          </table:table-cell>
          <table:table-cell office:value-type="float" office:value="1930" calcext:value-type="float">
            <text:p>1930</text:p>
          </table:table-cell>
          <table:table-cell/>
          <table:table-cell office:value-type="string" calcext:value-type="string">
            <text:p>Holger Damgaard o agencia Nordfoto</text:p>
          </table:table-cell>
          <table:table-cell/>
          <table:table-cell office:value-type="string" calcext:value-type="string">
            <text:p>Imagen en negativo de la audiencia durante el 'Nordisk Jubilæumsstævne' (Encuentro del Jubileo Nórdico) celebrado en Copenhague en abril de 1930. La fotografía muestra a dignatarios, miembros de la burguesía y posiblemente la realeza danesa (incluyendo figuras que asemejan al Rey Christian X y la Reina Alexandrine) sentados en una tribuna formal. Los asistentes visten galas de etiqueta de finales de los años 20 y principios de los 30, destacando sombreros cloche en las mujeres y esmóquines en los hombres.</text:p>
          </table:table-cell>
          <table:table-cell/>
          <table:table-cell office:value-type="string" calcext:value-type="string">
            <text:p>Jubilæumsstævne; Copenhague; Realeza Danesa</text:p>
          </table:table-cell>
          <table:table-cell office:value-type="string" calcext:value-type="string">
            <text:p>Copenhague, Dinamarca (posiblemente Københavns Rådhus o Idrætsparken)</text:p>
          </table:table-cell>
          <table:table-cell office:value-type="float" office:value="55.6761" calcext:value-type="float">
            <text:p>55.6761</text:p>
          </table:table-cell>
          <table:table-cell office:value-type="float" office:value="12.5683" calcext:value-type="float">
            <text:p>12.56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6.jpg</text:p>
          </table:table-cell>
          <table:table-cell office:value-type="string" calcext:value-type="string">
            <text:p>v5u7gi</text:p>
          </table:table-cell>
          <table:table-cell office:value-type="string" calcext:value-type="string">
            <text:p>image</text:p>
          </table:table-cell>
          <table:table-cell office:value-type="string" calcext:value-type="string">
            <text:p>/objects/negativo_026.jpg</text:p>
          </table:table-cell>
          <table:table-cell office:value-type="string" calcext:value-type="string">
            <text:p>/objects/small/negativo_026_sm.jpg</text:p>
          </table:table-cell>
          <table:table-cell office:value-type="string" calcext:value-type="string">
            <text:p>/objects/thumbs/negativo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7</text:p>
          </table:table-cell>
          <table:table-cell office:value-type="string" calcext:value-type="string">
            <text:p>Negativo de vidri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Un negativo de placa de vidrio que captura una granja tradicional de madera en Nueva Inglaterra durante el invierno. La imagen muestra una estructura de varios niveles con chimeneas y un porche lateral, representativa de la arquitectura rural estadounidense de finales del siglo XIX, con un marcado deterioro químico en los bordes.</text:p>
          </table:table-cell>
          <table:table-cell/>
          <table:table-cell office:value-type="string" calcext:value-type="string">
            <text:p>Negativo de vidrio; Granja histórica; Nueva Inglaterra</text:p>
          </table:table-cell>
          <table:table-cell office:value-type="string" calcext:value-type="string">
            <text:p>Nueva Inglaterra, Estados Unidos</text:p>
          </table:table-cell>
          <table:table-cell office:value-type="float" office:value="43.1939" calcext:value-type="float">
            <text:p>43.1939</text:p>
          </table:table-cell>
          <table:table-cell office:value-type="float" office:value="-71.5724" calcext:value-type="float">
            <text:p>-71.57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7.jpg</text:p>
          </table:table-cell>
          <table:table-cell office:value-type="string" calcext:value-type="string">
            <text:p>sgo26o</text:p>
          </table:table-cell>
          <table:table-cell office:value-type="string" calcext:value-type="string">
            <text:p>image</text:p>
          </table:table-cell>
          <table:table-cell office:value-type="string" calcext:value-type="string">
            <text:p>/objects/negativo_027.jpg</text:p>
          </table:table-cell>
          <table:table-cell office:value-type="string" calcext:value-type="string">
            <text:p>/objects/small/negativo_027_sm.jpg</text:p>
          </table:table-cell>
          <table:table-cell office:value-type="string" calcext:value-type="string">
            <text:p>/objects/thumbs/negativo_027_th.jpg</text:p>
          </table:table-cell>
          <table:table-cell table:number-columns-repeated="2"/>
          <table:table-cell office:value-type="string" calcext:value-type="string">
            <text:p>Placa seca de gelatina sobre vidrio (Gelatin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8</text:p>
          </table:table-cell>
          <table:table-cell office:value-type="string" calcext:value-type="string">
            <text:p>Arquitectura vernacular</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Un negativo de placa de vidrio que captura una escena rural de finales del siglo XIX. Se observa una residencia principal de estilo vernacular norteamericano con un ala lateral y un porche, flanqueada por un gran granero de madera y árboles de hoja caduca sin follaje, lo que sugiere una estación invernal o principios de primavera en una zona templada.</text:p>
          </table:table-cell>
          <table:table-cell/>
          <table:table-cell office:value-type="string" calcext:value-type="string">
            <text:p>Arquitectura vernacular; Negativo sobre vidrio; Vida rural</text:p>
          </table:table-cell>
          <table:table-cell office:value-type="string" calcext:value-type="string">
            <text:p>Nueva Inglaterra, Estados Unidos</text:p>
          </table:table-cell>
          <table:table-cell office:value-type="float" office:value="44" calcext:value-type="float">
            <text:p>44</text:p>
          </table:table-cell>
          <table:table-cell office:value-type="float" office:value="-72" calcext:value-type="float">
            <text:p>-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8.jpg</text:p>
          </table:table-cell>
          <table:table-cell office:value-type="string" calcext:value-type="string">
            <text:p>1unqo</text:p>
          </table:table-cell>
          <table:table-cell office:value-type="string" calcext:value-type="string">
            <text:p>image</text:p>
          </table:table-cell>
          <table:table-cell office:value-type="string" calcext:value-type="string">
            <text:p>/objects/negativo_028.jpg</text:p>
          </table:table-cell>
          <table:table-cell office:value-type="string" calcext:value-type="string">
            <text:p>/objects/small/negativo_028_sm.jpg</text:p>
          </table:table-cell>
          <table:table-cell office:value-type="string" calcext:value-type="string">
            <text:p>/objects/thumbs/negativo_028_th.jpg</text:p>
          </table:table-cell>
          <table:table-cell table:number-columns-repeated="2"/>
          <table:table-cell office:value-type="string" calcext:value-type="string">
            <text:p>Placa seca de gelatina sobre soporte de vidrio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9</text:p>
          </table:table-cell>
          <table:table-cell office:value-type="string" calcext:value-type="string">
            <text:p>Fotoperiodismo</text:p>
          </table:table-cell>
          <table:table-cell office:value-type="float" office:value="1940" calcext:value-type="float">
            <text:p>1940</text:p>
          </table:table-cell>
          <table:table-cell/>
          <table:table-cell office:value-type="string" calcext:value-type="string">
            <text:p>Weegee (Arthur Fellig)</text:p>
          </table:table-cell>
          <table:table-cell/>
          <table:table-cell office:value-type="string" calcext:value-type="string">
            <text:p>Un negativo fotográfico de alto contraste que captura las secuelas de un accidente automovilístico nocturno. La imagen muestra un Ford de mediados de la década de 1930, posiblemente un modelo 1936, con daños estructurales severos en la parte delantera izquierda y el guardabarros. Un hombre permanece de pie junto al vehículo, observando el siniestro bajo la cruda iluminación de un flash de magnesio o bombilla de flash, técnica típica del fotoperiodismo criminal de la época.</text:p>
          </table:table-cell>
          <table:table-cell/>
          <table:table-cell office:value-type="string" calcext:value-type="string">
            <text:p>Fotoperiodismo; Accidente de tráfico; Weegee</text:p>
          </table:table-cell>
          <table:table-cell office:value-type="string" calcext:value-type="string">
            <text:p>Nueva York, Estados Unidos</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9.jpg</text:p>
          </table:table-cell>
          <table:table-cell office:value-type="string" calcext:value-type="string">
            <text:p>89z66</text:p>
          </table:table-cell>
          <table:table-cell office:value-type="string" calcext:value-type="string">
            <text:p>image</text:p>
          </table:table-cell>
          <table:table-cell office:value-type="string" calcext:value-type="string">
            <text:p>/objects/negativo_029.jpg</text:p>
          </table:table-cell>
          <table:table-cell office:value-type="string" calcext:value-type="string">
            <text:p>/objects/small/negativo_029_sm.jpg</text:p>
          </table:table-cell>
          <table:table-cell office:value-type="string" calcext:value-type="string">
            <text:p>/objects/thumbs/negativo_02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0</text:p>
          </table:table-cell>
          <table:table-cell office:value-type="string" calcext:value-type="string">
            <text:p>Accidente automovilístico</text:p>
          </table:table-cell>
          <table:table-cell office:value-type="float" office:value="1934" calcext:value-type="float">
            <text:p>1934</text:p>
          </table:table-cell>
          <table:table-cell/>
          <table:table-cell office:value-type="string" calcext:value-type="string">
            <text:p>Leslie Jones</text:p>
          </table:table-cell>
          <table:table-cell/>
          <table:table-cell office:value-type="string" calcext:value-type="string">
            <text:p>Fotografía en formato negativo que captura la escena de un accidente automovilístico nocturno frente a un establecimiento de comida rápida (posiblemente un 'roadhouse' con letrero de 'HAMBURGERS') en la década de 1930. Se observa un sedán volcado o semi-empotrado y una multitud de espectadores vestidos con la moda típica de la Gran Depresión, incluyendo hombres con sombreros fedora y pantalones de talle alto.</text:p>
          </table:table-cell>
          <table:table-cell/>
          <table:table-cell office:value-type="string" calcext:value-type="string">
            <text:p>Accidente automovilístico; Fotografía de prensa; Gran Depresión</text:p>
          </table:table-cell>
          <table:table-cell office:value-type="string" calcext:value-type="string">
            <text:p>Boston o alrededores, Massachusetts,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0.jpg</text:p>
          </table:table-cell>
          <table:table-cell office:value-type="string" calcext:value-type="string">
            <text:p>s9zy2n</text:p>
          </table:table-cell>
          <table:table-cell office:value-type="string" calcext:value-type="string">
            <text:p>image</text:p>
          </table:table-cell>
          <table:table-cell office:value-type="string" calcext:value-type="string">
            <text:p>/objects/negativo_030.jpg</text:p>
          </table:table-cell>
          <table:table-cell office:value-type="string" calcext:value-type="string">
            <text:p>/objects/small/negativo_030_sm.jpg</text:p>
          </table:table-cell>
          <table:table-cell office:value-type="string" calcext:value-type="string">
            <text:p>/objects/thumbs/negativo_03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1</text:p>
          </table:table-cell>
          <table:table-cell office:value-type="string" calcext:value-type="string">
            <text:p>Arquitectura Colonial</text:p>
          </table:table-cell>
          <table:table-cell office:value-type="float" office:value="1890" calcext:value-type="float">
            <text:p>1890</text:p>
          </table:table-cell>
          <table:table-cell/>
          <table:table-cell office:value-type="string" calcext:value-type="string">
            <text:p>Henry S. Wyer</text:p>
          </table:table-cell>
          <table:table-cell/>
          <table:table-cell office:value-type="string" calcext:value-type="string">
            <text:p>Negativo fotográfico de la Casa Jethro Coffin, conocida como 'The Oldest House', en Nantucket, Massachusetts. La imagen muestra la icónica arquitectura tipo saltbox de finales del siglo XVII bajo condiciones de luz que resaltan su estructura de madera y chimenea central, enmarcada por árboles caducifolios despojados de follaje.</text:p>
          </table:table-cell>
          <table:table-cell/>
          <table:table-cell office:value-type="string" calcext:value-type="string">
            <text:p>Arquitectura Colonial; Negativo de Vidrio; Nantucket</text:p>
          </table:table-cell>
          <table:table-cell office:value-type="string" calcext:value-type="string">
            <text:p>Nantucket, Massachusetts, Estados Unidos</text:p>
          </table:table-cell>
          <table:table-cell office:value-type="float" office:value="41.2882" calcext:value-type="float">
            <text:p>41.2882</text:p>
          </table:table-cell>
          <table:table-cell office:value-type="float" office:value="-70.1064" calcext:value-type="float">
            <text:p>-70.10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1.jpg</text:p>
          </table:table-cell>
          <table:table-cell office:value-type="string" calcext:value-type="string">
            <text:p>ezt4kb</text:p>
          </table:table-cell>
          <table:table-cell office:value-type="string" calcext:value-type="string">
            <text:p>image</text:p>
          </table:table-cell>
          <table:table-cell office:value-type="string" calcext:value-type="string">
            <text:p>/objects/negativo_031.jpg</text:p>
          </table:table-cell>
          <table:table-cell office:value-type="string" calcext:value-type="string">
            <text:p>/objects/small/negativo_031_sm.jpg</text:p>
          </table:table-cell>
          <table:table-cell office:value-type="string" calcext:value-type="string">
            <text:p>/objects/thumbs/negativo_031_th.jpg</text:p>
          </table:table-cell>
          <table:table-cell table:number-columns-repeated="2"/>
          <table:table-cell office:value-type="string" calcext:value-type="string">
            <text:p>Placa negativa de vidrio (dry plate) de gelatina-bromur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32</text:p>
          </table:table-cell>
          <table:table-cell office:value-type="string" calcext:value-type="string">
            <text:p>Mantilla</text:p>
          </table:table-cell>
          <table:table-cell office:value-type="float" office:value="1925" calcext:value-type="float">
            <text:p>1925</text:p>
          </table:table-cell>
          <table:table-cell/>
          <table:table-cell office:value-type="string" calcext:value-type="string">
            <text:p>Agustín Víctor Casasola (Atribuido)</text:p>
          </table:table-cell>
          <table:table-cell/>
          <table:table-cell office:value-type="string" calcext:value-type="string">
            <text:p>Retrato grupal de doce mujeres posando en un espacio arquitectónico de estilo colonial, posiblemente un claustro o patio con arquería de piedra al fondo. La mayoría de las mujeres visten mantillas de encaje negro sobre vestidos formales, una indumentaria tradicionalmente asociada a ceremonias religiosas o eventos sociales de alta alcurnia en el México de principios del siglo XX. La imagen es un negativo fotográfico original donde se distingue claramente la marca de fabricante en el borde lateral.</text:p>
          </table:table-cell>
          <table:table-cell/>
          <table:table-cell office:value-type="string" calcext:value-type="string">
            <text:p>Mantilla; Retrato de grupo; México colonial</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2.jpg</text:p>
          </table:table-cell>
          <table:table-cell office:value-type="string" calcext:value-type="string">
            <text:p>h8fbwc</text:p>
          </table:table-cell>
          <table:table-cell office:value-type="string" calcext:value-type="string">
            <text:p>image</text:p>
          </table:table-cell>
          <table:table-cell office:value-type="string" calcext:value-type="string">
            <text:p>/objects/negativo_032.jpg</text:p>
          </table:table-cell>
          <table:table-cell office:value-type="string" calcext:value-type="string">
            <text:p>/objects/small/negativo_032_sm.jpg</text:p>
          </table:table-cell>
          <table:table-cell office:value-type="string" calcext:value-type="string">
            <text:p>/objects/thumbs/negativo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3</text:p>
          </table:table-cell>
          <table:table-cell office:value-type="string" calcext:value-type="string">
            <text:p>Tehuana</text:p>
          </table:table-cell>
          <table:table-cell office:value-type="float" office:value="1930" calcext:value-type="float">
            <text:p>1930</text:p>
          </table:table-cell>
          <table:table-cell/>
          <table:table-cell office:value-type="string" calcext:value-type="string">
            <text:p>Luis Márquez Romay</text:p>
          </table:table-cell>
          <table:table-cell/>
          <table:table-cell office:value-type="string" calcext:value-type="string">
            <text:p>Negativo fotográfico que retrata a un grupo de mujeres vistiendo el traje tradicional de Tehuana, característico del Istmo de Tehuantepec, Oaxaca. La imagen destaca el uso del 'resplandor' o tocado de encaje, así como huipiles bordados. La composición sugiere un retrato etnográfico o de estudio realizado en un entorno arquitectónico de estilo colonial o neocolonial.</text:p>
          </table:table-cell>
          <table:table-cell/>
          <table:table-cell office:value-type="string" calcext:value-type="string">
            <text:p>Tehuana; Oaxaca; Indumentaria tradicional</text:p>
          </table:table-cell>
          <table:table-cell office:value-type="string" calcext:value-type="string">
            <text:p>Santo Domingo Tehuantepec, Oaxaca, México</text:p>
          </table:table-cell>
          <table:table-cell office:value-type="float" office:value="16.3267" calcext:value-type="float">
            <text:p>16.3267</text:p>
          </table:table-cell>
          <table:table-cell office:value-type="float" office:value="-95.2411" calcext:value-type="float">
            <text:p>-95.24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3.jpg</text:p>
          </table:table-cell>
          <table:table-cell office:value-type="string" calcext:value-type="string">
            <text:p>nrrs4r</text:p>
          </table:table-cell>
          <table:table-cell office:value-type="string" calcext:value-type="string">
            <text:p>image</text:p>
          </table:table-cell>
          <table:table-cell office:value-type="string" calcext:value-type="string">
            <text:p>/objects/negativo_033.jpg</text:p>
          </table:table-cell>
          <table:table-cell office:value-type="string" calcext:value-type="string">
            <text:p>/objects/small/negativo_033_sm.jpg</text:p>
          </table:table-cell>
          <table:table-cell office:value-type="string" calcext:value-type="string">
            <text:p>/objects/thumbs/negativo_03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4</text:p>
          </table:table-cell>
          <table:table-cell office:value-type="string" calcext:value-type="string">
            <text:p>Segunda Guerra Mundial</text:p>
          </table:table-cell>
          <table:table-cell office:value-type="float" office:value="1942" calcext:value-type="float">
            <text:p>1942</text:p>
          </table:table-cell>
          <table:table-cell/>
          <table:table-cell office:value-type="string" calcext:value-type="string">
            <text:p>Agustín Víctor Casasola (Agencia Casasola)</text:p>
          </table:table-cell>
          <table:table-cell/>
          <table:table-cell office:value-type="string" calcext:value-type="string">
            <text:p>Fotografía en negativo que muestra a tres soldados del Ejército de los Estados Unidos sentados en la base de un monumento conmemorativo frente a lo que parece ser la antigua embajada estadounidense en la Ciudad de México. El monumento presenta relieves de soldados de diversas épocas históricas y está coronado por una gran águila calva, símbolo nacional de EE. UU. Al fondo, se observa el acceso principal de un edificio neoclásico con otros militares caminando, sugiriendo una escena de cooperación diplomática o militar durante la era de la Segunda Guerra Mundial.</text:p>
          </table:table-cell>
          <table:table-cell/>
          <table:table-cell office:value-type="string" calcext:value-type="string">
            <text:p>Segunda Guerra Mundial; Ejército de los Estados Unidos; Relaciones México-Estados Unidos</text:p>
          </table:table-cell>
          <table:table-cell office:value-type="string" calcext:value-type="string">
            <text:p>Calle Niza 53, Colonia Juárez, Ciudad de México, México</text:p>
          </table:table-cell>
          <table:table-cell office:value-type="float" office:value="19.4259" calcext:value-type="float">
            <text:p>19.4259</text:p>
          </table:table-cell>
          <table:table-cell office:value-type="float" office:value="-99.1625" calcext:value-type="float">
            <text:p>-99.16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4.jpg</text:p>
          </table:table-cell>
          <table:table-cell office:value-type="string" calcext:value-type="string">
            <text:p>vqkqf8</text:p>
          </table:table-cell>
          <table:table-cell office:value-type="string" calcext:value-type="string">
            <text:p>image</text:p>
          </table:table-cell>
          <table:table-cell office:value-type="string" calcext:value-type="string">
            <text:p>/objects/negativo_034.jpg</text:p>
          </table:table-cell>
          <table:table-cell office:value-type="string" calcext:value-type="string">
            <text:p>/objects/small/negativo_034_sm.jpg</text:p>
          </table:table-cell>
          <table:table-cell office:value-type="string" calcext:value-type="string">
            <text:p>/objects/thumbs/negativo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5</text:p>
          </table:table-cell>
          <table:table-cell office:value-type="string" calcext:value-type="string">
            <text:p>México Posrevolucionario</text:p>
          </table:table-cell>
          <table:table-cell office:value-type="float" office:value="1928" calcext:value-type="float">
            <text:p>1928</text:p>
          </table:table-cell>
          <table:table-cell/>
          <table:table-cell office:value-type="string" calcext:value-type="string">
            <text:p>Agencia Casasola (Atribuido)</text:p>
          </table:table-cell>
          <table:table-cell/>
          <table:table-cell office:value-type="string" calcext:value-type="string">
            <text:p>Fotografía en formato negativo que captura una escena callejera en México el 27 de noviembre de 1928. Se observa a un grupo de personas, incluyendo mujeres con rebozos y hombres con sombreros tradicionales, frente a edificios de arquitectura colonial o decimonónica. La imagen muestra un deterioro químico severo en el centro, típico de la degradación de nitrato o espejeo de plata.</text:p>
          </table:table-cell>
          <table:table-cell/>
          <table:table-cell office:value-type="string" calcext:value-type="string">
            <text:p>México Posrevolucionario; Archivo Casasola; Negativo de nitrat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5.jpg</text:p>
          </table:table-cell>
          <table:table-cell office:value-type="string" calcext:value-type="string">
            <text:p>hm3t8t</text:p>
          </table:table-cell>
          <table:table-cell office:value-type="string" calcext:value-type="string">
            <text:p>image</text:p>
          </table:table-cell>
          <table:table-cell office:value-type="string" calcext:value-type="string">
            <text:p>/objects/negativo_035.jpg</text:p>
          </table:table-cell>
          <table:table-cell office:value-type="string" calcext:value-type="string">
            <text:p>/objects/small/negativo_035_sm.jpg</text:p>
          </table:table-cell>
          <table:table-cell office:value-type="string" calcext:value-type="string">
            <text:p>/objects/thumbs/negativo_03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6</text:p>
          </table:table-cell>
          <table:table-cell office:value-type="string" calcext:value-type="string">
            <text:p>México 1928</text:p>
          </table:table-cell>
          <table:table-cell office:value-type="float" office:value="1928" calcext:value-type="float">
            <text:p>1928</text:p>
          </table:table-cell>
          <table:table-cell/>
          <table:table-cell office:value-type="string" calcext:value-type="string">
            <text:p>Anónimo</text:p>
          </table:table-cell>
          <table:table-cell/>
          <table:table-cell office:value-type="string" calcext:value-type="string">
            <text:p>Fotografía documental capturada en México el 27 de noviembre de 1928. La escena muestra a un grupo de personas, posiblemente campesinos o habitantes rurales, junto a una construcción de madera. La imagen padece de una severa degradación química conocida como espejeo de plata, lo que oculta gran parte de los detalles del primer plano, pero conserva anotaciones manuscritas críticas en el borde del negativo.</text:p>
          </table:table-cell>
          <table:table-cell/>
          <table:table-cell office:value-type="string" calcext:value-type="string">
            <text:p>México 1928; Campesinos; Fotografía de 35mm</text:p>
          </table:table-cell>
          <table:table-cell office:value-type="string" calcext:value-type="string">
            <text:p>México (posiblemente región central o rural)</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6.jpg</text:p>
          </table:table-cell>
          <table:table-cell office:value-type="string" calcext:value-type="string">
            <text:p>0in9bl</text:p>
          </table:table-cell>
          <table:table-cell office:value-type="string" calcext:value-type="string">
            <text:p>image</text:p>
          </table:table-cell>
          <table:table-cell office:value-type="string" calcext:value-type="string">
            <text:p>/objects/negativo_036.jpg</text:p>
          </table:table-cell>
          <table:table-cell office:value-type="string" calcext:value-type="string">
            <text:p>/objects/small/negativo_036_sm.jpg</text:p>
          </table:table-cell>
          <table:table-cell office:value-type="string" calcext:value-type="string">
            <text:p>/objects/thumbs/negativo_03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7</text:p>
          </table:table-cell>
          <table:table-cell office:value-type="string" calcext:value-type="string">
            <text:p>Fascismo</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Negativo fotográfico que muestra un detalle arquitectónico de un relieve esculpido en piedra. La imagen presenta un águila imperial estilizada posada sobre un haz de lictores (fasces), símbolo central del régimen fascista italiano. La composición sugiere un edificio gubernamental de la época, posiblemente una 'Casa del Fascio' o un palacio administrativo, caracterizado por el 'Stile Littorio' que fusionaba el neoclasicismo con el racionalismo arquitectónico.</text:p>
          </table:table-cell>
          <table:table-cell/>
          <table:table-cell office:value-type="string" calcext:value-type="string">
            <text:p>Fascismo; Stile Littorio; Fasces</text:p>
          </table:table-cell>
          <table:table-cell office:value-type="string" calcext:value-type="string">
            <text:p>Roma, Italia</text:p>
          </table:table-cell>
          <table:table-cell office:value-type="float" office:value="41.8902" calcext:value-type="float">
            <text:p>41.8902</text:p>
          </table:table-cell>
          <table:table-cell office:value-type="float" office:value="12.4922" calcext:value-type="float">
            <text:p>12.49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7.jpg</text:p>
          </table:table-cell>
          <table:table-cell office:value-type="string" calcext:value-type="string">
            <text:p>i1s348</text:p>
          </table:table-cell>
          <table:table-cell office:value-type="string" calcext:value-type="string">
            <text:p>image</text:p>
          </table:table-cell>
          <table:table-cell office:value-type="string" calcext:value-type="string">
            <text:p>/objects/negativo_037.jpg</text:p>
          </table:table-cell>
          <table:table-cell office:value-type="string" calcext:value-type="string">
            <text:p>/objects/small/negativo_037_sm.jpg</text:p>
          </table:table-cell>
          <table:table-cell office:value-type="string" calcext:value-type="string">
            <text:p>/objects/thumbs/negativo_03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8</text:p>
          </table:table-cell>
          <table:table-cell office:value-type="string" calcext:value-type="string">
            <text:p>Negativo de acetato</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Negativo fotográfico de gran formato en avanzado estado de degradación química. La imagen original, que parece retratar a un grupo de personas en un entorno exterior o un salón amplio, está casi totalmente oculta por procesos de oxidación de la plata (espejeo) y el deterioro del soporte. La rotulación lateral indica su procedencia industrial de la casa Eastman Kodak.</text:p>
          </table:table-cell>
          <table:table-cell/>
          <table:table-cell office:value-type="string" calcext:value-type="string">
            <text:p>Negativo de acetato; Degradación química; Espejeo de plata</text:p>
          </table:table-cell>
          <table:table-cell office:value-type="string" calcext:value-type="string">
            <text:p>Rochester, Nueva York (Sede de Eastman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8.jpg</text:p>
          </table:table-cell>
          <table:table-cell office:value-type="string" calcext:value-type="string">
            <text:p>kxvv3x</text:p>
          </table:table-cell>
          <table:table-cell office:value-type="string" calcext:value-type="string">
            <text:p>image</text:p>
          </table:table-cell>
          <table:table-cell office:value-type="string" calcext:value-type="string">
            <text:p>/objects/negativo_038.jpg</text:p>
          </table:table-cell>
          <table:table-cell office:value-type="string" calcext:value-type="string">
            <text:p>/objects/small/negativo_038_sm.jpg</text:p>
          </table:table-cell>
          <table:table-cell office:value-type="string" calcext:value-type="string">
            <text:p>/objects/thumbs/negativo_03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39</text:p>
          </table:table-cell>
          <table:table-cell office:value-type="string" calcext:value-type="string">
            <text:p>Cartografía urbana</text:p>
          </table:table-cell>
          <table:table-cell office:value-type="float" office:value="1929" calcext:value-type="float">
            <text:p>1929</text:p>
          </table:table-cell>
          <table:table-cell/>
          <table:table-cell office:value-type="string" calcext:value-type="string">
            <text:p>Dirección de Obras Públicas del Departamento del Distrito Federal</text:p>
          </table:table-cell>
          <table:table-cell/>
          <table:table-cell office:value-type="string" calcext:value-type="string">
            <text:p>Registro fotográfico de un plano técnico urbano de la Plaza de la Penitenciaría en la Ciudad de México. El documento muestra la lotificación y alineación de calles (como San Antonio Abad) realizado por la Dirección de Obras Públicas del Departamento del Distrito Federal en mayo de 1929.</text:p>
          </table:table-cell>
          <table:table-cell/>
          <table:table-cell office:value-type="string" calcext:value-type="string">
            <text:p>Cartografía urbana; Ciudad de México; Penitenciaría de Lecumberri</text:p>
          </table:table-cell>
          <table:table-cell office:value-type="string" calcext:value-type="string">
            <text:p>Plaza de la Penitenciaría (Lecumberri), Ciudad de México, México.</text:p>
          </table:table-cell>
          <table:table-cell office:value-type="float" office:value="19.435" calcext:value-type="float">
            <text:p>19.435</text:p>
          </table:table-cell>
          <table:table-cell office:value-type="float" office:value="-99.115" calcext:value-type="float">
            <text:p>-99.1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9.jpg</text:p>
          </table:table-cell>
          <table:table-cell office:value-type="string" calcext:value-type="string">
            <text:p>a2twqs</text:p>
          </table:table-cell>
          <table:table-cell office:value-type="string" calcext:value-type="string">
            <text:p>image</text:p>
          </table:table-cell>
          <table:table-cell office:value-type="string" calcext:value-type="string">
            <text:p>/objects/negativo_039.jpg</text:p>
          </table:table-cell>
          <table:table-cell office:value-type="string" calcext:value-type="string">
            <text:p>/objects/small/negativo_039_sm.jpg</text:p>
          </table:table-cell>
          <table:table-cell office:value-type="string" calcext:value-type="string">
            <text:p>/objects/thumbs/negativo_03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0</text:p>
          </table:table-cell>
          <table:table-cell office:value-type="string" calcext:value-type="string">
            <text:p>Planificación Urbana</text:p>
          </table:table-cell>
          <table:table-cell office:value-type="float" office:value="1930" calcext:value-type="float">
            <text:p>1930</text:p>
          </table:table-cell>
          <table:table-cell/>
          <table:table-cell office:value-type="string" calcext:value-type="string">
            <text:p>Anónimo (Personal técnico del Departamento del Distrito Federal)</text:p>
          </table:table-cell>
          <table:table-cell/>
          <table:table-cell office:value-type="string" calcext:value-type="string">
            <text:p>Fragmento de una película negativa de gran formato que registra un plano técnico de alineamiento urbano. La imagen muestra detalles de lotificación y trazado de calles, identificándose específicamente la 'Calle de los Albañiles' y referencias a 'lotes sin fincar', lo que sugiere un documento catastral o de planificación de crecimiento urbano de mediados del siglo XX.</text:p>
          </table:table-cell>
          <table:table-cell/>
          <table:table-cell office:value-type="string" calcext:value-type="string">
            <text:p>Planificación Urbana; Catastro; Cartografía</text:p>
          </table:table-cell>
          <table:table-cell office:value-type="string" calcext:value-type="string">
            <text:p>Ciudad de México, México</text:p>
          </table:table-cell>
          <table:table-cell office:value-type="float" office:value="19.4447" calcext:value-type="float">
            <text:p>19.4447</text:p>
          </table:table-cell>
          <table:table-cell office:value-type="float" office:value="-99.1175" calcext:value-type="float">
            <text:p>-99.11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0.jpg</text:p>
          </table:table-cell>
          <table:table-cell office:value-type="string" calcext:value-type="string">
            <text:p>1o18a</text:p>
          </table:table-cell>
          <table:table-cell office:value-type="string" calcext:value-type="string">
            <text:p>image</text:p>
          </table:table-cell>
          <table:table-cell office:value-type="string" calcext:value-type="string">
            <text:p>/objects/negativo_040.jpg</text:p>
          </table:table-cell>
          <table:table-cell office:value-type="string" calcext:value-type="string">
            <text:p>/objects/small/negativo_040_sm.jpg</text:p>
          </table:table-cell>
          <table:table-cell office:value-type="string" calcext:value-type="string">
            <text:p>/objects/thumbs/negativo_040_th.jpg</text:p>
          </table:table-cell>
          <table:table-cell table:number-columns-repeated="2"/>
          <table:table-cell office:value-type="string" calcext:value-type="string">
            <text:p>Película negativa de hoja (shee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1</text:p>
          </table:table-cell>
          <table:table-cell office:value-type="string" calcext:value-type="string">
            <text:p>Fotografía vernácula</text:p>
          </table:table-cell>
          <table:table-cell office:value-type="float" office:value="1952" calcext:value-type="float">
            <text:p>1952</text:p>
          </table:table-cell>
          <table:table-cell/>
          <table:table-cell office:value-type="string" calcext:value-type="string">
            <text:p>Anónimo</text:p>
          </table:table-cell>
          <table:table-cell/>
          <table:table-cell office:value-type="string" calcext:value-type="string">
            <text:p>Dos tiras de película de formato medio que documentan escenas de la vida doméstica y ceremonial de una familia estadounidense de mediados del siglo XX. La tira superior muestra una ceremonia formal en interiores, posiblemente una boda o rito de iniciación religiosa, con sujetos vestidos de gala y decoraciones florales. La tira inferior presenta retratos grupales informales al aire libre frente a una residencia suburbana, destacando un automóvil de la época y vestimenta casual de verano.</text:p>
          </table:table-cell>
          <table:table-cell/>
          <table:table-cell office:value-type="string" calcext:value-type="string">
            <text:p>Fotografía vernácula; Cultura suburbana; Retrato familiar</text:p>
          </table:table-cell>
          <table:table-cell office:value-type="string" calcext:value-type="string">
            <text:p>Estados Unidos (Región del Medio Oeste o Costa 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1.jpg</text:p>
          </table:table-cell>
          <table:table-cell office:value-type="string" calcext:value-type="string">
            <text:p>38kqqk</text:p>
          </table:table-cell>
          <table:table-cell office:value-type="string" calcext:value-type="string">
            <text:p>image</text:p>
          </table:table-cell>
          <table:table-cell office:value-type="string" calcext:value-type="string">
            <text:p>/objects/negativo_041.jpg</text:p>
          </table:table-cell>
          <table:table-cell office:value-type="string" calcext:value-type="string">
            <text:p>/objects/small/negativo_041_sm.jpg</text:p>
          </table:table-cell>
          <table:table-cell office:value-type="string" calcext:value-type="string">
            <text:p>/objects/thumbs/negativo_04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2</text:p>
          </table:table-cell>
          <table:table-cell office:value-type="string" calcext:value-type="string">
            <text:p>Fotografía familiar</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oméstico en negativo que muestra a una mujer y a un niño posando con un perro frente a la entrada de una residencia de ladrillo. La imagen captura una escena típica de la vida suburbana de la posguerra, destacando la vestimenta de la época y la arquitectura residencial estadounidense de mediados de siglo.</text:p>
          </table:table-cell>
          <table:table-cell/>
          <table:table-cell office:value-type="string" calcext:value-type="string">
            <text:p>Fotografía familiar; Arquitectura suburbana; Vida cotidiana</text:p>
          </table:table-cell>
          <table:table-cell office:value-type="string" calcext:value-type="string">
            <text:p>Estados Unidos (región del Medio Oeste o Costa Este)</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2.jpg</text:p>
          </table:table-cell>
          <table:table-cell office:value-type="string" calcext:value-type="string">
            <text:p>y27qd</text:p>
          </table:table-cell>
          <table:table-cell office:value-type="string" calcext:value-type="string">
            <text:p>image</text:p>
          </table:table-cell>
          <table:table-cell office:value-type="string" calcext:value-type="string">
            <text:p>/objects/negativo_042.jpg</text:p>
          </table:table-cell>
          <table:table-cell office:value-type="string" calcext:value-type="string">
            <text:p>/objects/small/negativo_042_sm.jpg</text:p>
          </table:table-cell>
          <table:table-cell office:value-type="string" calcext:value-type="string">
            <text:p>/objects/thumbs/negativo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3</text:p>
          </table:table-cell>
          <table:table-cell office:value-type="string" calcext:value-type="string">
            <text:p>Época de Oro del cine mexicano</text:p>
          </table:table-cell>
          <table:table-cell office:value-type="float" office:value="1945" calcext:value-type="float">
            <text:p>1945</text:p>
          </table:table-cell>
          <table:table-cell/>
          <table:table-cell office:value-type="string" calcext:value-type="string">
            <text:p>Víctor Herrera</text:p>
          </table:table-cell>
          <table:table-cell/>
          <table:table-cell office:value-type="string" calcext:value-type="string">
            <text:p>Retrato fotográfico en negativo de la actriz y cantante Libertad Lamarque, figura icónica de la Época de Oro del cine mexicano. La imagen, capturada en un estilo de iluminación expresionista de estudio, muestra a la artista con vestimenta elegante y joyas, reflejando el glamour cinematográfico de mediados del siglo XX.</text:p>
          </table:table-cell>
          <table:table-cell/>
          <table:table-cell office:value-type="string" calcext:value-type="string">
            <text:p>Época de Oro del cine mexicano; Libertad Lamarque; Retrato de estudi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3.jpg</text:p>
          </table:table-cell>
          <table:table-cell office:value-type="string" calcext:value-type="string">
            <text:p>ghzba6a</text:p>
          </table:table-cell>
          <table:table-cell office:value-type="string" calcext:value-type="string">
            <text:p>image</text:p>
          </table:table-cell>
          <table:table-cell office:value-type="string" calcext:value-type="string">
            <text:p>/objects/negativo_043.jpg</text:p>
          </table:table-cell>
          <table:table-cell office:value-type="string" calcext:value-type="string">
            <text:p>/objects/small/negativo_043_sm.jpg</text:p>
          </table:table-cell>
          <table:table-cell office:value-type="string" calcext:value-type="string">
            <text:p>/objects/thumbs/negativo_043_th.jpg</text:p>
          </table:table-cell>
          <table:table-cell table:number-columns-repeated="2"/>
          <table:table-cell office:value-type="string" calcext:value-type="string">
            <text:p>Negativo de hoja (sheet film) de formato grande</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4</text:p>
          </table:table-cell>
          <table:table-cell office:value-type="string" calcext:value-type="string">
            <text:p>Arquitectura modernista</text:p>
          </table:table-cell>
          <table:table-cell office:value-type="float" office:value="1950" calcext:value-type="float">
            <text:p>1950</text:p>
          </table:table-cell>
          <table:table-cell/>
          <table:table-cell office:value-type="string" calcext:value-type="string">
            <text:p>Hermanos Mayo (atribución probable)</text:p>
          </table:table-cell>
          <table:table-cell/>
          <table:table-cell office:value-type="string" calcext:value-type="string">
            <text:p>Fotografía de archivo que muestra un detalle arquitectónico de una estructura cóncava con nervaduras rítmicas, posiblemente de hormigón armado, capturada bajo una iluminación dramática que enfatiza el claroscuro. En el margen derecho se aprecia de forma parcial y desenfocada la figura de una persona con indumentaria oscura. La imagen está registrada en una placa de película de seguridad (Safety Film), evidenciada por las marcas de borde y las muescas de identificación de emulsión en la esquina superior izquierda, elementos técnicos característicos de la fotografía profesional de mediados del siglo XX.</text:p>
          </table:table-cell>
          <table:table-cell/>
          <table:table-cell office:value-type="string" calcext:value-type="string">
            <text:p>Arquitectura modernista; Kodak Safety Film; Fotografía de archiv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4.jpg</text:p>
          </table:table-cell>
          <table:table-cell office:value-type="string" calcext:value-type="string">
            <text:p>vq7a84</text:p>
          </table:table-cell>
          <table:table-cell office:value-type="string" calcext:value-type="string">
            <text:p>image</text:p>
          </table:table-cell>
          <table:table-cell office:value-type="string" calcext:value-type="string">
            <text:p>/objects/negativo_044.jpg</text:p>
          </table:table-cell>
          <table:table-cell office:value-type="string" calcext:value-type="string">
            <text:p>/objects/small/negativo_044_sm.jpg</text:p>
          </table:table-cell>
          <table:table-cell office:value-type="string" calcext:value-type="string">
            <text:p>/objects/thumbs/negativo_044_th.jpg</text:p>
          </table:table-cell>
          <table:table-cell table:number-columns-repeated="2"/>
          <table:table-cell office:value-type="string" calcext:value-type="string">
            <text:p>Película negativa de placa (shee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5</text:p>
          </table:table-cell>
          <table:table-cell office:value-type="string" calcext:value-type="string">
            <text:p>Alfred Hitchcock</text:p>
          </table:table-cell>
          <table:table-cell office:value-type="float" office:value="1955" calcext:value-type="float">
            <text:p>1955</text:p>
          </table:table-cell>
          <table:table-cell/>
          <table:table-cell office:value-type="string" calcext:value-type="string">
            <text:p>Anónimo (Fotógrafo de estudio de Paramount o Universal)</text:p>
          </table:table-cell>
          <table:table-cell/>
          <table:table-cell office:value-type="string" calcext:value-type="string">
            <text:p>Negativo fotográfico de perfil que muestra la silueta característica de Alfred Hitchcock. La imagen presenta un alto contraste y un tono rojizo, típico de las máscaras de color o películas de artes gráficas utilizadas en la preimpresión y la producción cinematográfica de mediados del siglo XX.</text:p>
          </table:table-cell>
          <table:table-cell/>
          <table:table-cell office:value-type="string" calcext:value-type="string">
            <text:p>Alfred Hitchcock; Negativo de placa; Perfil iconográfico</text:p>
          </table:table-cell>
          <table:table-cell office:value-type="string" calcext:value-type="string">
            <text:p>Hollywood, Los Ángeles, California</text:p>
          </table:table-cell>
          <table:table-cell office:value-type="float" office:value="34.0928" calcext:value-type="float">
            <text:p>34.0928</text:p>
          </table:table-cell>
          <table:table-cell office:value-type="float" office:value="-118.3287" calcext:value-type="float">
            <text:p>-118.32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5.jpg</text:p>
          </table:table-cell>
          <table:table-cell office:value-type="string" calcext:value-type="string">
            <text:p>4uu7dd</text:p>
          </table:table-cell>
          <table:table-cell office:value-type="string" calcext:value-type="string">
            <text:p>image</text:p>
          </table:table-cell>
          <table:table-cell office:value-type="string" calcext:value-type="string">
            <text:p>/objects/negativo_045.jpg</text:p>
          </table:table-cell>
          <table:table-cell office:value-type="string" calcext:value-type="string">
            <text:p>/objects/small/negativo_045_sm.jpg</text:p>
          </table:table-cell>
          <table:table-cell office:value-type="string" calcext:value-type="string">
            <text:p>/objects/thumbs/negativo_045_th.jpg</text:p>
          </table:table-cell>
          <table:table-cell table:number-columns-repeated="2"/>
          <table:table-cell office:value-type="string" calcext:value-type="string">
            <text:p>Película de seguridad (Safety Film) de acetato de celulos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6</text:p>
          </table:table-cell>
          <table:table-cell office:value-type="string" calcext:value-type="string">
            <text:p>Esquí</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Fotografía en negativo que muestra a una mujer posando con esquís y bastones en lo que parece ser una estación de esquí o zona recreativa invernal. En el fondo se observan otros esquiadores, una colina con pinos y, en los bordes laterales, vehículos de mediados del siglo XX estacionados en la nieve.</text:p>
          </table:table-cell>
          <table:table-cell/>
          <table:table-cell office:value-type="string" calcext:value-type="string">
            <text:p>Esquí; Turismo invernal; Moda deportiva</text:p>
          </table:table-cell>
          <table:table-cell office:value-type="string" calcext:value-type="string">
            <text:p>Nueva Inglaterra, Estados Unidos (probablemente Vermont o New Hampshire)</text:p>
          </table:table-cell>
          <table:table-cell office:value-type="float" office:value="44.4654" calcext:value-type="float">
            <text:p>44.4654</text:p>
          </table:table-cell>
          <table:table-cell office:value-type="float" office:value="-72.6845" calcext:value-type="float">
            <text:p>-72.684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6.jpg</text:p>
          </table:table-cell>
          <table:table-cell office:value-type="string" calcext:value-type="string">
            <text:p>3a8aff</text:p>
          </table:table-cell>
          <table:table-cell office:value-type="string" calcext:value-type="string">
            <text:p>image</text:p>
          </table:table-cell>
          <table:table-cell office:value-type="string" calcext:value-type="string">
            <text:p>/objects/negativo_046.jpg</text:p>
          </table:table-cell>
          <table:table-cell office:value-type="string" calcext:value-type="string">
            <text:p>/objects/small/negativo_046_sm.jpg</text:p>
          </table:table-cell>
          <table:table-cell office:value-type="string" calcext:value-type="string">
            <text:p>/objects/thumbs/negativo_046_th.jpg</text:p>
          </table:table-cell>
          <table:table-cell table:number-columns-repeated="2"/>
          <table:table-cell office:value-type="string" calcext:value-type="string">
            <text:p>Negativo de película de blanco y negr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7</text:p>
          </table:table-cell>
          <table:table-cell office:value-type="string" calcext:value-type="string">
            <text:p>Arquitectura Reina Ana</text:p>
          </table:table-cell>
          <table:table-cell office:value-type="float" office:value="1945" calcext:value-type="float">
            <text:p>1945</text:p>
          </table:table-cell>
          <table:table-cell/>
          <table:table-cell office:value-type="string" calcext:value-type="string">
            <text:p>Anónimo (Atribuible al Historic American Buildings Survey)</text:p>
          </table:table-cell>
          <table:table-cell/>
          <table:table-cell office:value-type="string" calcext:value-type="string">
            <text:p>Dos vistas en negativo de una residencia señorial de estilo Reina Ana (Queen Anne) en los Estados Unidos. La estructura presenta elementos clásicos de la arquitectura victoriana tardía, incluyendo un porche envolvente con columnas torneadas, frontones decorados con entramados de madera (stick-work) y múltiples chimeneas de ladrillo, capturada probablemente durante un relevamiento documental de arquitectura histórica.</text:p>
          </table:table-cell>
          <table:table-cell/>
          <table:table-cell office:value-type="string" calcext:value-type="string">
            <text:p>Arquitectura Reina Ana; Negativo de Seguridad; Patrimonio Histórico</text:p>
          </table:table-cell>
          <table:table-cell office:value-type="string" calcext:value-type="string">
            <text:p>Nueva Inglaterra,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7.jpg</text:p>
          </table:table-cell>
          <table:table-cell office:value-type="string" calcext:value-type="string">
            <text:p>v51b6b</text:p>
          </table:table-cell>
          <table:table-cell office:value-type="string" calcext:value-type="string">
            <text:p>image</text:p>
          </table:table-cell>
          <table:table-cell office:value-type="string" calcext:value-type="string">
            <text:p>/objects/negativo_047.jpg</text:p>
          </table:table-cell>
          <table:table-cell office:value-type="string" calcext:value-type="string">
            <text:p>/objects/small/negativo_047_sm.jpg</text:p>
          </table:table-cell>
          <table:table-cell office:value-type="string" calcext:value-type="string">
            <text:p>/objects/thumbs/negativo_04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8</text:p>
          </table:table-cell>
          <table:table-cell office:value-type="string" calcext:value-type="string">
            <text:p>Yucatán</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Tiras de negativos de 35mm que documentan un viaje por la Península de Yucatán, México. Las imágenes capturan escenas de turistas visitando zonas arqueológicas (posiblemente Uxmal o Chichén Itzá), vistas de arquitectura colonial incluyendo una iglesia con cúpulas, y escenas de la vida cotidiana urbana donde destaca un comercio local de calzado y mototaxis característicos de la región.</text:p>
          </table:table-cell>
          <table:table-cell/>
          <table:table-cell office:value-type="string" calcext:value-type="string">
            <text:p>Yucatán; Arqueología; Vida cotidiana</text:p>
          </table:table-cell>
          <table:table-cell office:value-type="string" calcext:value-type="string">
            <text:p>Izamal y alrededores, Yucatán, México</text:p>
          </table:table-cell>
          <table:table-cell office:value-type="float" office:value="20.9311" calcext:value-type="float">
            <text:p>20.9311</text:p>
          </table:table-cell>
          <table:table-cell office:value-type="float" office:value="-89.0181" calcext:value-type="float">
            <text:p>-89.018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8.jpg</text:p>
          </table:table-cell>
          <table:table-cell office:value-type="string" calcext:value-type="string">
            <text:p>4yfs1g</text:p>
          </table:table-cell>
          <table:table-cell office:value-type="string" calcext:value-type="string">
            <text:p>image</text:p>
          </table:table-cell>
          <table:table-cell office:value-type="string" calcext:value-type="string">
            <text:p>/objects/negativo_048.jpg</text:p>
          </table:table-cell>
          <table:table-cell office:value-type="string" calcext:value-type="string">
            <text:p>/objects/small/negativo_048_sm.jpg</text:p>
          </table:table-cell>
          <table:table-cell office:value-type="string" calcext:value-type="string">
            <text:p>/objects/thumbs/negativo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9</text:p>
          </table:table-cell>
          <table:table-cell office:value-type="string" calcext:value-type="string">
            <text:p>Fotografía vernácula</text:p>
          </table:table-cell>
          <table:table-cell office:value-type="float" office:value="1950" calcext:value-type="float">
            <text:p>1950</text:p>
          </table:table-cell>
          <table:table-cell/>
          <table:table-cell office:value-type="string" calcext:value-type="string">
            <text:p>Anónimo (Fotografía familiar)</text:p>
          </table:table-cell>
          <table:table-cell/>
          <table:table-cell office:value-type="string" calcext:value-type="string">
            <text:p>Dos tiras de negativos fotográficos en blanco y negro que muestran escenas de la infancia en un entorno doméstico exterior. Las imágenes capturan a niños pequeños posando y jugando junto a un muro de piedra rústica y una estructura decorativa que asemeja un pozo o casita de juegos, reflejando la vida familiar cotidiana de mediados del siglo XX.</text:p>
          </table:table-cell>
          <table:table-cell/>
          <table:table-cell office:value-type="string" calcext:value-type="string">
            <text:p>Fotografía vernácula; Infancia; Medio formato</text:p>
          </table:table-cell>
          <table:table-cell office:value-type="string" calcext:value-type="string">
            <text:p>Estados Unidos (Región suburbana)</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9.jpg</text:p>
          </table:table-cell>
          <table:table-cell office:value-type="string" calcext:value-type="string">
            <text:p>iv69o2</text:p>
          </table:table-cell>
          <table:table-cell office:value-type="string" calcext:value-type="string">
            <text:p>image</text:p>
          </table:table-cell>
          <table:table-cell office:value-type="string" calcext:value-type="string">
            <text:p>/objects/negativo_049.jpg</text:p>
          </table:table-cell>
          <table:table-cell office:value-type="string" calcext:value-type="string">
            <text:p>/objects/small/negativo_049_sm.jpg</text:p>
          </table:table-cell>
          <table:table-cell office:value-type="string" calcext:value-type="string">
            <text:p>/objects/thumbs/negativo_049_th.jpg</text:p>
          </table:table-cell>
          <table:table-cell table:number-columns-repeated="2"/>
          <table:table-cell office:value-type="string" calcext:value-type="string">
            <text:p>Negativos de rollo en blanco y negr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0</text:p>
          </table:table-cell>
          <table:table-cell office:value-type="string" calcext:value-type="string">
            <text:p>Ausable Chasm</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 hombre posa sentado sobre una valla de madera blanca frente a la icónica señalización de entrada a Ausable Chasm en el estado de Nueva York. La imagen, capturada como un negativo fotográfico, muestra la infraestructura turística de mediados del siglo XX, destacando el cartel promocional que ofrece aparcamiento gratuito y acceso a la tienda de regalos de este famoso monumento natural.</text:p>
          </table:table-cell>
          <table:table-cell/>
          <table:table-cell office:value-type="string" calcext:value-type="string">
            <text:p>Ausable Chasm; Turismo; Señalización</text:p>
          </table:table-cell>
          <table:table-cell office:value-type="string" calcext:value-type="string">
            <text:p>Ausable Chasm, Keeseville, Nueva York, EE. UU.</text:p>
          </table:table-cell>
          <table:table-cell office:value-type="float" office:value="44.5242" calcext:value-type="float">
            <text:p>44.5242</text:p>
          </table:table-cell>
          <table:table-cell office:value-type="float" office:value="-73.4619" calcext:value-type="float">
            <text:p>-73.461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0.jpg</text:p>
          </table:table-cell>
          <table:table-cell office:value-type="string" calcext:value-type="string">
            <text:p>zersr2</text:p>
          </table:table-cell>
          <table:table-cell office:value-type="string" calcext:value-type="string">
            <text:p>image</text:p>
          </table:table-cell>
          <table:table-cell office:value-type="string" calcext:value-type="string">
            <text:p>/objects/negativo_050.jpg</text:p>
          </table:table-cell>
          <table:table-cell office:value-type="string" calcext:value-type="string">
            <text:p>/objects/small/negativo_050_sm.jpg</text:p>
          </table:table-cell>
          <table:table-cell office:value-type="string" calcext:value-type="string">
            <text:p>/objects/thumbs/negativo_05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1</text:p>
          </table:table-cell>
          <table:table-cell office:value-type="string" calcext:value-type="string">
            <text:p>Negativo de gelatina</text:p>
          </table:table-cell>
          <table:table-cell office:value-type="float" office:value="1948" calcext:value-type="float">
            <text:p>1948</text:p>
          </table:table-cell>
          <table:table-cell/>
          <table:table-cell office:value-type="string" calcext:value-type="string">
            <text:p>Anónimo (Fotografía vernácula)</text:p>
          </table:table-cell>
          <table:table-cell/>
          <table:table-cell office:value-type="string" calcext:value-type="string">
            <text:p>Negativo fotográfico que muestra a una mujer joven caminando por una zona comercial urbana. En el fondo se aprecia una arquitectura de edificios de ladrillo de estilo comercial del siglo XIX, con tiendas en la planta baja y ventanas de guillotina ornamentadas en los pisos superiores. La imagen es un negativo original, visible por la inversión de densidades y la muesca de identificación en el borde izquierdo.</text:p>
          </table:table-cell>
          <table:table-cell/>
          <table:table-cell office:value-type="string" calcext:value-type="string">
            <text:p>Negativo de gelatina; Arquitectura comercial americana; Moda femenina 1940s</text:p>
          </table:table-cell>
          <table:table-cell office:value-type="string" calcext:value-type="string">
            <text:p>Medio Oeste de los Estados Unidos (ej. Ohio o Illinois)</text:p>
          </table:table-cell>
          <table:table-cell office:value-type="float" office:value="40.4173" calcext:value-type="float">
            <text:p>40.4173</text:p>
          </table:table-cell>
          <table:table-cell office:value-type="float" office:value="-82.9071" calcext:value-type="float">
            <text:p>-82.907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1.jpg</text:p>
          </table:table-cell>
          <table:table-cell office:value-type="string" calcext:value-type="string">
            <text:p>1sjk2o</text:p>
          </table:table-cell>
          <table:table-cell office:value-type="string" calcext:value-type="string">
            <text:p>image</text:p>
          </table:table-cell>
          <table:table-cell office:value-type="string" calcext:value-type="string">
            <text:p>/objects/negativo_051.jpg</text:p>
          </table:table-cell>
          <table:table-cell office:value-type="string" calcext:value-type="string">
            <text:p>/objects/small/negativo_051_sm.jpg</text:p>
          </table:table-cell>
          <table:table-cell office:value-type="string" calcext:value-type="string">
            <text:p>/objects/thumbs/negativo_051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52</text:p>
          </table:table-cell>
          <table:table-cell office:value-type="string" calcext:value-type="string">
            <text:p>Automóvil de época</text:p>
          </table:table-cell>
          <table:table-cell office:value-type="float" office:value="1935" calcext:value-type="float">
            <text:p>1935</text:p>
          </table:table-cell>
          <table:table-cell/>
          <table:table-cell office:value-type="string" calcext:value-type="string">
            <text:p>Anónimo</text:p>
          </table:table-cell>
          <table:table-cell/>
          <table:table-cell office:value-type="string" calcext:value-type="string">
            <text:p>Un retrato informal de un hombre posando junto a un automóvil de finales de los años 30 en una calle residencial flanqueada por edificios de ladrillo de estilo federal o georgiano.</text:p>
          </table:table-cell>
          <table:table-cell/>
          <table:table-cell office:value-type="string" calcext:value-type="string">
            <text:p>Automóvil de época; Negativo fotográfico; Arquitectura urbana</text:p>
          </table:table-cell>
          <table:table-cell office:value-type="string" calcext:value-type="string">
            <text:p>Noreste de Estados Unidos (región del Atlántico Medio)</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2.jpg</text:p>
          </table:table-cell>
          <table:table-cell office:value-type="string" calcext:value-type="string">
            <text:p>h2foi6</text:p>
          </table:table-cell>
          <table:table-cell office:value-type="string" calcext:value-type="string">
            <text:p>image</text:p>
          </table:table-cell>
          <table:table-cell office:value-type="string" calcext:value-type="string">
            <text:p>/objects/negativo_052.jpg</text:p>
          </table:table-cell>
          <table:table-cell office:value-type="string" calcext:value-type="string">
            <text:p>/objects/small/negativo_052_sm.jpg</text:p>
          </table:table-cell>
          <table:table-cell office:value-type="string" calcext:value-type="string">
            <text:p>/objects/thumbs/negativo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3</text:p>
          </table:table-cell>
          <table:table-cell office:value-type="string" calcext:value-type="string">
            <text:p>Retrato infantil</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Un retrato familiar en formato negativo que muestra a tres niños sentados en las escaleras de lo que parece ser un jardín formal o una finca privada. Los niños están dispuestos en niveles, con el más pequeño en primer plano, rodeados de una vegetación densa y árboles que sugieren un entorno rural o suburbano de mediados del siglo XX.</text:p>
          </table:table-cell>
          <table:table-cell/>
          <table:table-cell office:value-type="string" calcext:value-type="string">
            <text:p>Retrato infantil; Negativo fotográfico; Moda mediados de siglo</text:p>
          </table:table-cell>
          <table:table-cell office:value-type="string" calcext:value-type="string">
            <text:p>Región de Nueva Inglaterra,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3.jpg</text:p>
          </table:table-cell>
          <table:table-cell office:value-type="string" calcext:value-type="string">
            <text:p>uwfwhv</text:p>
          </table:table-cell>
          <table:table-cell office:value-type="string" calcext:value-type="string">
            <text:p>image</text:p>
          </table:table-cell>
          <table:table-cell office:value-type="string" calcext:value-type="string">
            <text:p>/objects/negativo_053.jpg</text:p>
          </table:table-cell>
          <table:table-cell office:value-type="string" calcext:value-type="string">
            <text:p>/objects/small/negativo_053_sm.jpg</text:p>
          </table:table-cell>
          <table:table-cell office:value-type="string" calcext:value-type="string">
            <text:p>/objects/thumbs/negativo_05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4</text:p>
          </table:table-cell>
          <table:table-cell office:value-type="string" calcext:value-type="string">
            <text:p>Armada Imperial Japonesa</text:p>
          </table:table-cell>
          <table:table-cell office:value-type="float" office:value="1928" calcext:value-type="float">
            <text:p>1928</text:p>
          </table:table-cell>
          <table:table-cell/>
          <table:table-cell office:value-type="string" calcext:value-type="string">
            <text:p>Fotógrafo oficial de la Agencia de la Casa Imperial (Kunaich?)</text:p>
          </table:table-cell>
          <table:table-cell/>
          <table:table-cell office:value-type="string" calcext:value-type="string">
            <text:p>Negativo fotográfico de un retrato grupal de gala que muestra a altos mandos de la Armada Imperial Japonesa junto al Emperador Hirohito (probablemente como joven soberano o Príncipe Regente). Los oficiales lucen uniformes de etiqueta con bicornios emplumados, charreteras de alto rango, condecoraciones estatales y sables tipo kyu-gunto, posando en lo que parece ser una estancia del Palacio Imperial o una dependencia militar de alto nivel.</text:p>
          </table:table-cell>
          <table:table-cell/>
          <table:table-cell office:value-type="string" calcext:value-type="string">
            <text:p>Armada Imperial Japonesa; Emperador Hirohito; Uniforme de gala</text:p>
          </table:table-cell>
          <table:table-cell office:value-type="string" calcext:value-type="string">
            <text:p>Palacio Imperial (K?kyo), Tokio, Japón</text:p>
          </table:table-cell>
          <table:table-cell office:value-type="float" office:value="35.6852" calcext:value-type="float">
            <text:p>35.6852</text:p>
          </table:table-cell>
          <table:table-cell office:value-type="float" office:value="139.7528" calcext:value-type="float">
            <text:p>139.752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4.jpg</text:p>
          </table:table-cell>
          <table:table-cell office:value-type="string" calcext:value-type="string">
            <text:p>37cnvd</text:p>
          </table:table-cell>
          <table:table-cell office:value-type="string" calcext:value-type="string">
            <text:p>image</text:p>
          </table:table-cell>
          <table:table-cell office:value-type="string" calcext:value-type="string">
            <text:p>/objects/negativo_054.jpg</text:p>
          </table:table-cell>
          <table:table-cell office:value-type="string" calcext:value-type="string">
            <text:p>/objects/small/negativo_054_sm.jpg</text:p>
          </table:table-cell>
          <table:table-cell office:value-type="string" calcext:value-type="string">
            <text:p>/objects/thumbs/negativo_054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5</text:p>
          </table:table-cell>
          <table:table-cell office:value-type="string" calcext:value-type="string">
            <text:p>Uniformes de gala</text:p>
          </table:table-cell>
          <table:table-cell office:value-type="float" office:value="1900" calcext:value-type="float">
            <text:p>1900</text:p>
          </table:table-cell>
          <table:table-cell/>
          <table:table-cell office:value-type="string" calcext:value-type="string">
            <text:p>Agustín Víctor Casasola</text:p>
          </table:table-cell>
          <table:table-cell/>
          <table:table-cell office:value-type="string" calcext:value-type="string">
            <text:p>Retrato grupal de altos mandos militares y diplomáticos posando en un entorno oficial de gala. La imagen es un negativo fotográfico analógico que presenta un deterioro físico avanzado, caracterizado por deformaciones térmicas y espejeo de plata, lo que sugiere una conservación precaria del soporte original.</text:p>
          </table:table-cell>
          <table:table-cell/>
          <table:table-cell office:value-type="string" calcext:value-type="string">
            <text:p>Uniformes de gala; Porfiriato; Negativo de nitrato</text:p>
          </table:table-cell>
          <table:table-cell office:value-type="string" calcext:value-type="string">
            <text:p>Ciudad de México, México (Probablemente Castillo de Chapultepec)</text:p>
          </table:table-cell>
          <table:table-cell office:value-type="float" office:value="19.403" calcext:value-type="float">
            <text:p>19.403</text:p>
          </table:table-cell>
          <table:table-cell office:value-type="float" office:value="-99.182" calcext:value-type="float">
            <text:p>-99.18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5.jpg</text:p>
          </table:table-cell>
          <table:table-cell office:value-type="string" calcext:value-type="string">
            <text:p>zceojs</text:p>
          </table:table-cell>
          <table:table-cell office:value-type="string" calcext:value-type="string">
            <text:p>image</text:p>
          </table:table-cell>
          <table:table-cell office:value-type="string" calcext:value-type="string">
            <text:p>/objects/negativo_055.jpg</text:p>
          </table:table-cell>
          <table:table-cell office:value-type="string" calcext:value-type="string">
            <text:p>/objects/small/negativo_055_sm.jpg</text:p>
          </table:table-cell>
          <table:table-cell office:value-type="string" calcext:value-type="string">
            <text:p>/objects/thumbs/negativo_055_th.jpg</text:p>
          </table:table-cell>
          <table:table-cell table:number-columns-repeated="2"/>
          <table:table-cell office:value-type="string" calcext:value-type="string">
            <text:p>Película flexible de gran format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56</text:p>
          </table:table-cell>
          <table:table-cell office:value-type="string" calcext:value-type="string">
            <text:p>Arquitectura vernácula</text:p>
          </table:table-cell>
          <table:table-cell office:value-type="float" office:value="1930" calcext:value-type="float">
            <text:p>1930</text:p>
          </table:table-cell>
          <table:table-cell/>
          <table:table-cell office:value-type="string" calcext:value-type="string">
            <text:p>Anónimo (Atribuible a fotógrafos de la Agencia Casasola o cronistas locales)</text:p>
          </table:table-cell>
          <table:table-cell/>
          <table:table-cell office:value-type="string" calcext:value-type="string">
            <text:p>Negativo fotográfico que muestra una escena de la vida cotidiana frente a una casona de arquitectura neoclásica rural o provincial. La imagen captura una calle empedrada donde se observa una fachada larga con ventanas protegidas por rejas de hierro forjado, desde las cuales varias personas observan el exterior. En uno de los accesos principales, se distinguen dos figuras masculinas con vestimenta formal de la época, incluyendo sombreros. La estructura del edificio, con sus cornisas prominentes y refuerzos de piedra en las esquinas, es característica de los centros históricos del centro de México.</text:p>
          </table:table-cell>
          <table:table-cell/>
          <table:table-cell office:value-type="string" calcext:value-type="string">
            <text:p>Arquitectura vernácula; Vida cotidiana; Negativo de nitrato</text:p>
          </table:table-cell>
          <table:table-cell office:value-type="string" calcext:value-type="string">
            <text:p>Región del Bajío, probablemente Querétaro o Guanajuato, México</text:p>
          </table:table-cell>
          <table:table-cell office:value-type="float" office:value="20.5881" calcext:value-type="float">
            <text:p>20.5881</text:p>
          </table:table-cell>
          <table:table-cell office:value-type="float" office:value="-100.3899" calcext:value-type="float">
            <text:p>-100.389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6.jpg</text:p>
          </table:table-cell>
          <table:table-cell office:value-type="string" calcext:value-type="string">
            <text:p>xwaf1</text:p>
          </table:table-cell>
          <table:table-cell office:value-type="string" calcext:value-type="string">
            <text:p>image</text:p>
          </table:table-cell>
          <table:table-cell office:value-type="string" calcext:value-type="string">
            <text:p>/objects/negativo_056.jpg</text:p>
          </table:table-cell>
          <table:table-cell office:value-type="string" calcext:value-type="string">
            <text:p>/objects/small/negativo_056_sm.jpg</text:p>
          </table:table-cell>
          <table:table-cell office:value-type="string" calcext:value-type="string">
            <text:p>/objects/thumbs/negativo_05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7</text:p>
          </table:table-cell>
          <table:table-cell office:value-type="string" calcext:value-type="string">
            <text:p>Moda inverna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Retrato en negativo de una mujer joven vestida con indumentaria invernal de finales de la década de 1920 o principios de 1930. La sujeto posa en una acera de hormigón frente a una residencia de estilo estadounidense, rodeada de árboles sin follaje, lo que indica una escena de invierno en una zona residencial de América del Norte.</text:p>
          </table:table-cell>
          <table:table-cell/>
          <table:table-cell office:value-type="string" calcext:value-type="string">
            <text:p>Moda invernal; Negativo fotográfico; Arquitectura residencial</text:p>
          </table:table-cell>
          <table:table-cell office:value-type="string" calcext:value-type="string">
            <text:p>Medio Oeste, Estados Unidos (posiblemente Illinois o Michigan)</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7.jpg</text:p>
          </table:table-cell>
          <table:table-cell office:value-type="string" calcext:value-type="string">
            <text:p>e5clji</text:p>
          </table:table-cell>
          <table:table-cell office:value-type="string" calcext:value-type="string">
            <text:p>image</text:p>
          </table:table-cell>
          <table:table-cell office:value-type="string" calcext:value-type="string">
            <text:p>/objects/negativo_057.jpg</text:p>
          </table:table-cell>
          <table:table-cell office:value-type="string" calcext:value-type="string">
            <text:p>/objects/small/negativo_057_sm.jpg</text:p>
          </table:table-cell>
          <table:table-cell office:value-type="string" calcext:value-type="string">
            <text:p>/objects/thumbs/negativo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8</text:p>
          </table:table-cell>
          <table:table-cell office:value-type="string" calcext:value-type="string">
            <text:p>Moda de verano 1950</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grupal de cuatro mujeres jóvenes sentadas al aire libre durante un período de ocio o vacaciones. La imagen es un negativo fotográfico que muestra a las figuras con ropa informal de verano, incluyendo camisetas de tirantes, pantalones estampados y un vestido de lunares. Al fondo se observa una estructura residencial con revestimiento de madera y la silueta de un automóvil con diseño aerodinámico característico de la posguerra.</text:p>
          </table:table-cell>
          <table:table-cell/>
          <table:table-cell office:value-type="string" calcext:value-type="string">
            <text:p>Moda de verano 1950; Fotografía vernácula; Retrato de grupo</text:p>
          </table:table-cell>
          <table:table-cell office:value-type="string" calcext:value-type="string">
            <text:p>Estados Unidos, región del Noreste</text:p>
          </table:table-cell>
          <table:table-cell office:value-type="float" office:value="41" calcext:value-type="float">
            <text:p>41</text:p>
          </table:table-cell>
          <table:table-cell office:value-type="float" office:value="-72" calcext:value-type="float">
            <text:p>-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8.jpg</text:p>
          </table:table-cell>
          <table:table-cell office:value-type="string" calcext:value-type="string">
            <text:p>48soha</text:p>
          </table:table-cell>
          <table:table-cell office:value-type="string" calcext:value-type="string">
            <text:p>image</text:p>
          </table:table-cell>
          <table:table-cell office:value-type="string" calcext:value-type="string">
            <text:p>/objects/negativo_058.jpg</text:p>
          </table:table-cell>
          <table:table-cell office:value-type="string" calcext:value-type="string">
            <text:p>/objects/small/negativo_058_sm.jpg</text:p>
          </table:table-cell>
          <table:table-cell office:value-type="string" calcext:value-type="string">
            <text:p>/objects/thumbs/negativo_05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9</text:p>
          </table:table-cell>
          <table:table-cell office:value-type="string" calcext:value-type="string">
            <text:p>Arquitectura Reina Ana</text:p>
          </table:table-cell>
          <table:table-cell office:value-type="float" office:value="1927" calcext:value-type="float">
            <text:p>1927</text:p>
          </table:table-cell>
          <table:table-cell/>
          <table:table-cell office:value-type="string" calcext:value-type="string">
            <text:p>Anónimo</text:p>
          </table:table-cell>
          <table:table-cell/>
          <table:table-cell office:value-type="string" calcext:value-type="string">
            <text:p>Imagen en negativo que muestra a dos jóvenes posando frente a una residencia de estilo Reina Ana (Queen Anne) durante el invierno. Las figuras visten abrigos de lana con cuellos de piel y sombreros tipo cloché, característicos de la moda femenina de finales de la década de 1920. El entorno presenta nieve en el suelo y una arquitectura residencial suburbana típica del noreste de Estados Unidos o Canadá, destacando una torre de esquina y un porche envolvente.</text:p>
          </table:table-cell>
          <table:table-cell/>
          <table:table-cell office:value-type="string" calcext:value-type="string">
            <text:p>Arquitectura Reina Ana; Sombrero Cloché</text:p>
          </table:table-cell>
          <table:table-cell office:value-type="string" calcext:value-type="string">
            <text:p>Saint Paul, Minnesota, Estados Unidos</text:p>
          </table:table-cell>
          <table:table-cell office:value-type="float" office:value="44.9537" calcext:value-type="float">
            <text:p>44.9537</text:p>
          </table:table-cell>
          <table:table-cell office:value-type="float" office:value="-93.09" calcext:value-type="float">
            <text:p>-93.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9.jpg</text:p>
          </table:table-cell>
          <table:table-cell office:value-type="string" calcext:value-type="string">
            <text:p>evgx6</text:p>
          </table:table-cell>
          <table:table-cell office:value-type="string" calcext:value-type="string">
            <text:p>image</text:p>
          </table:table-cell>
          <table:table-cell office:value-type="string" calcext:value-type="string">
            <text:p>/objects/negativo_059.jpg</text:p>
          </table:table-cell>
          <table:table-cell office:value-type="string" calcext:value-type="string">
            <text:p>/objects/small/negativo_059_sm.jpg</text:p>
          </table:table-cell>
          <table:table-cell office:value-type="string" calcext:value-type="string">
            <text:p>/objects/thumbs/negativo_05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0</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Dos fotogramas consecutivos de un negativo fotográfico en blanco y negro que retratan a un niño pequeño sentado en un muro de mampostería de piedra. El sujeto viste una indumentaria clásica de mediados del siglo XX, compuesta por una camisa oscura, pantalones cortos y calcetines altos a la rodilla con zapatos oscuros. El fondo presenta una entrada residencial y vegetación densa, capturando una escena típica de la vida doméstica privada de posguerra.</text:p>
          </table:table-cell>
          <table:table-cell/>
          <table:table-cell office:value-type="string" calcext:value-type="string">
            <text:p>Retrato infantil; Negativo fotográfico; Fotografía vernácula</text:p>
          </table:table-cell>
          <table:table-cell office:value-type="string" calcext:value-type="string">
            <text:p>Entorno residencial suburbano, posiblemente en la región del Atlántico Medio, Estados Unidos.</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0.jpg</text:p>
          </table:table-cell>
          <table:table-cell office:value-type="string" calcext:value-type="string">
            <text:p>ywqwqp</text:p>
          </table:table-cell>
          <table:table-cell office:value-type="string" calcext:value-type="string">
            <text:p>image</text:p>
          </table:table-cell>
          <table:table-cell office:value-type="string" calcext:value-type="string">
            <text:p>/objects/negativo_060.jpg</text:p>
          </table:table-cell>
          <table:table-cell office:value-type="string" calcext:value-type="string">
            <text:p>/objects/small/negativo_060_sm.jpg</text:p>
          </table:table-cell>
          <table:table-cell office:value-type="string" calcext:value-type="string">
            <text:p>/objects/thumbs/negativo_06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1</text:p>
          </table:table-cell>
          <table:table-cell office:value-type="string" calcext:value-type="string">
            <text:p>Retrato infanti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Un negativo fotográfico de carácter doméstico que captura a tres niños sentados en un banco de madera en un entorno exterior, posiblemente un patio o terraza. El niño de la izquierda sostiene una muñeca, mientras que los otros dos visten ropa de invierno o entretiempo, destacando una chaqueta de punto y boinas. La escena está rodeada de plantas en macetas y un barril metálico, elementos típicos de la vida cotidiana de clase media de mediados del siglo XX.</text:p>
          </table:table-cell>
          <table:table-cell/>
          <table:table-cell office:value-type="string" calcext:value-type="string">
            <text:p>Retrato infantil; Negativo fotográfico; Vida cotidiana</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1.jpg</text:p>
          </table:table-cell>
          <table:table-cell office:value-type="string" calcext:value-type="string">
            <text:p>lxxngm</text:p>
          </table:table-cell>
          <table:table-cell office:value-type="string" calcext:value-type="string">
            <text:p>image</text:p>
          </table:table-cell>
          <table:table-cell office:value-type="string" calcext:value-type="string">
            <text:p>/objects/negativo_061.jpg</text:p>
          </table:table-cell>
          <table:table-cell office:value-type="string" calcext:value-type="string">
            <text:p>/objects/small/negativo_061_sm.jpg</text:p>
          </table:table-cell>
          <table:table-cell office:value-type="string" calcext:value-type="string">
            <text:p>/objects/thumbs/negativo_06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2</text:p>
          </table:table-cell>
          <table:table-cell office:value-type="string" calcext:value-type="string">
            <text:p>Retrato de estudio</text:p>
          </table:table-cell>
          <table:table-cell office:value-type="float" office:value="1965" calcext:value-type="float">
            <text:p>1965</text:p>
          </table:table-cell>
          <table:table-cell/>
          <table:table-cell office:value-type="string" calcext:value-type="string">
            <text:p>Francisco Herrera (Estudio Herrera)</text:p>
          </table:table-cell>
          <table:table-cell/>
          <table:table-cell office:value-type="string" calcext:value-type="string">
            <text:p>Retrato de estudio en formato negativo de una mujer de mediana edad, caracterizado por un peinado estilo bouffant o cardado voluminoso típico de la moda de mediados de los años 60. La mujer viste una chaqueta de pana (corduroy) con cuello amplio. En el margen inferior derecho se aprecia la firma 'Herrera', que identifica la autoría de uno de los estudios fotográficos más prestigiosos de la época en el ámbito hispanohablante.</text:p>
          </table:table-cell>
          <table:table-cell/>
          <table:table-cell office:value-type="string" calcext:value-type="string">
            <text:p>Retrato de estudio; Negativo fotográfico; Moda años 60</text:p>
          </table:table-cell>
          <table:table-cell office:value-type="string" calcext:value-type="string">
            <text:p>Madrid, España</text:p>
          </table:table-cell>
          <table:table-cell office:value-type="float" office:value="40.4167" calcext:value-type="float">
            <text:p>40.4167</text:p>
          </table:table-cell>
          <table:table-cell office:value-type="float" office:value="-3.7033" calcext:value-type="float">
            <text:p>-3.70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2.jpg</text:p>
          </table:table-cell>
          <table:table-cell office:value-type="string" calcext:value-type="string">
            <text:p>wutup5</text:p>
          </table:table-cell>
          <table:table-cell office:value-type="string" calcext:value-type="string">
            <text:p>image</text:p>
          </table:table-cell>
          <table:table-cell office:value-type="string" calcext:value-type="string">
            <text:p>/objects/negativo_062.jpg</text:p>
          </table:table-cell>
          <table:table-cell office:value-type="string" calcext:value-type="string">
            <text:p>/objects/small/negativo_062_sm.jpg</text:p>
          </table:table-cell>
          <table:table-cell office:value-type="string" calcext:value-type="string">
            <text:p>/objects/thumbs/negativo_06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73</text:p>
          </table:table-cell>
          <table:table-cell office:value-type="string" calcext:value-type="string">
            <text:p>Escena doméstic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Tiras de negativos de color que capturan escenas domésticas y celebraciones familiares. Se observan tres secuencias distintas: un intercambio de regalos de Navidad frente a una chimenea de piedra, una fiesta de cumpleaños infantil con un pastel que lleva la inscripción 'Felicidades Alejandra', y retratos de una mujer en un comedor con decoración típica de los años 70.</text:p>
          </table:table-cell>
          <table:table-cell/>
          <table:table-cell office:value-type="string" calcext:value-type="string">
            <text:p>Escena doméstica; Celebración familiar; Película 126</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3.jpg</text:p>
          </table:table-cell>
          <table:table-cell office:value-type="string" calcext:value-type="string">
            <text:p>h2rkon</text:p>
          </table:table-cell>
          <table:table-cell office:value-type="string" calcext:value-type="string">
            <text:p>image</text:p>
          </table:table-cell>
          <table:table-cell office:value-type="string" calcext:value-type="string">
            <text:p>/objects/negativo_073.jpg</text:p>
          </table:table-cell>
          <table:table-cell office:value-type="string" calcext:value-type="string">
            <text:p>/objects/small/negativo_073_sm.jpg</text:p>
          </table:table-cell>
          <table:table-cell office:value-type="string" calcext:value-type="string">
            <text:p>/objects/thumbs/negativo_073_th.jpg</text:p>
          </table:table-cell>
          <table:table-cell table:number-columns-repeated="2"/>
          <table:table-cell office:value-type="string" calcext:value-type="string">
            <text:p>Negativo de color en formato 126 (cartucho Instamatic)</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4</text:p>
          </table:table-cell>
          <table:table-cell office:value-type="string" calcext:value-type="string">
            <text:p>Celebración familiar</text:p>
          </table:table-cell>
          <table:table-cell office:value-type="float" office:value="1974" calcext:value-type="float">
            <text:p>1974</text:p>
          </table:table-cell>
          <table:table-cell/>
          <table:table-cell office:value-type="string" calcext:value-type="string">
            <text:p>Anónimo</text:p>
          </table:table-cell>
          <table:table-cell/>
          <table:table-cell office:value-type="string" calcext:value-type="string">
            <text:p>Dos tiras de película negativa en color que documentan una celebración familiar doméstica, posiblemente un cumpleaños o reunión festiva. Las imágenes muestran a un grupo intergeneracional de personas en el interior de una vivienda, interactuando alrededor de una mesa con un pastel de varios niveles y refrescos, capturando momentos espontáneos típicos de la fotografía de aficionados de finales del siglo XX.</text:p>
          </table:table-cell>
          <table:table-cell/>
          <table:table-cell office:value-type="string" calcext:value-type="string">
            <text:p>Celebración familiar; Cultura doméstica; Fotografía Instamatic</text:p>
          </table:table-cell>
          <table:table-cell office:value-type="string" calcext:value-type="string">
            <text:p>Estados Unidos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4.jpg</text:p>
          </table:table-cell>
          <table:table-cell office:value-type="string" calcext:value-type="string">
            <text:p>mgbjj9</text:p>
          </table:table-cell>
          <table:table-cell office:value-type="string" calcext:value-type="string">
            <text:p>image</text:p>
          </table:table-cell>
          <table:table-cell office:value-type="string" calcext:value-type="string">
            <text:p>/objects/negativo_074.jpg</text:p>
          </table:table-cell>
          <table:table-cell office:value-type="string" calcext:value-type="string">
            <text:p>/objects/small/negativo_074_sm.jpg</text:p>
          </table:table-cell>
          <table:table-cell office:value-type="string" calcext:value-type="string">
            <text:p>/objects/thumbs/negativo_074_th.jpg</text:p>
          </table:table-cell>
          <table:table-cell table:number-columns-repeated="2"/>
          <table:table-cell office:value-type="string" calcext:value-type="string">
            <text:p>Película negativa en color de formato 126 (Instamatic)</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75</text:p>
          </table:table-cell>
          <table:table-cell office:value-type="string" calcext:value-type="string">
            <text:p>Retrato nup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de estudio de una pareja de recién casados capturado en una película negativa en color. El hombre viste un traje formal con pajarita y la mujer porta un velo con aplicaciones florales y un ramo, característico de las ceremonias nupciales de mediados del siglo XX.</text:p>
          </table:table-cell>
          <table:table-cell/>
          <table:table-cell office:value-type="string" calcext:value-type="string">
            <text:p>Retrato nupcial; Negativo de color; Fotografía de estudio</text:p>
          </table:table-cell>
          <table:table-cell office:value-type="string" calcext:value-type="string">
            <text:p>Estados Unidos (Probable entorno urbano 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5.jpg</text:p>
          </table:table-cell>
          <table:table-cell office:value-type="string" calcext:value-type="string">
            <text:p>gssq1k</text:p>
          </table:table-cell>
          <table:table-cell office:value-type="string" calcext:value-type="string">
            <text:p>image</text:p>
          </table:table-cell>
          <table:table-cell office:value-type="string" calcext:value-type="string">
            <text:p>/objects/negativo_075.jpg</text:p>
          </table:table-cell>
          <table:table-cell office:value-type="string" calcext:value-type="string">
            <text:p>/objects/small/negativo_075_sm.jpg</text:p>
          </table:table-cell>
          <table:table-cell office:value-type="string" calcext:value-type="string">
            <text:p>/objects/thumbs/negativo_07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6</text:p>
          </table:table-cell>
          <table:table-cell office:value-type="string" calcext:value-type="string">
            <text:p>Retrato de boda</text:p>
          </table:table-cell>
          <table:table-cell office:value-type="float" office:value="1948" calcext:value-type="float">
            <text:p>1948</text:p>
          </table:table-cell>
          <table:table-cell/>
          <table:table-cell office:value-type="string" calcext:value-type="string">
            <text:p>Anónimo (Estudio fotográfico profesional)</text:p>
          </table:table-cell>
          <table:table-cell/>
          <table:table-cell office:value-type="string" calcext:value-type="string">
            <text:p>Retrato de estudio en negativo de una pareja de recién casados. El hombre viste un frac formal con pajarita y un boutonniere oscuro, mientras que la mujer luce un vestido de novia de mangas largas con detalles bordados en el cuello y puños, complementado con un velo de tul sujeto por una tiara floral y un ramo de flores mixtas.</text:p>
          </table:table-cell>
          <table:table-cell/>
          <table:table-cell office:value-type="string" calcext:value-type="string">
            <text:p>Retrato de boda; Negativo de gran formato; Fotografía de estudio</text:p>
          </table:table-cell>
          <table:table-cell office:value-type="string" calcext:value-type="string">
            <text:p>Estados Unidos (Probablemente Rochester, Nueva York, o contexto urbano similar)</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6.jpg</text:p>
          </table:table-cell>
          <table:table-cell office:value-type="string" calcext:value-type="string">
            <text:p>dloy2g</text:p>
          </table:table-cell>
          <table:table-cell office:value-type="string" calcext:value-type="string">
            <text:p>image</text:p>
          </table:table-cell>
          <table:table-cell office:value-type="string" calcext:value-type="string">
            <text:p>/objects/negativo_076.jpg</text:p>
          </table:table-cell>
          <table:table-cell office:value-type="string" calcext:value-type="string">
            <text:p>/objects/small/negativo_076_sm.jpg</text:p>
          </table:table-cell>
          <table:table-cell office:value-type="string" calcext:value-type="string">
            <text:p>/objects/thumbs/negativo_07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77</text:p>
          </table:table-cell>
          <table:table-cell office:value-type="string" calcext:value-type="string">
            <text:p>Moda nup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Un retrato de estudio de una novia, capturado en un negativo de color de gran formato. La mujer luce un vestido de encaje con cuello alto y un velo translúcido, sosteniendo una rosa, en una composición típica de la fotografía social de mediados del siglo XX.</text:p>
          </table:table-cell>
          <table:table-cell/>
          <table:table-cell office:value-type="string" calcext:value-type="string">
            <text:p>Moda nupcial; Negativo en color; Retrato de estudio</text:p>
          </table:table-cell>
          <table:table-cell office:value-type="string" calcext:value-type="string">
            <text:p>Rochester, Nueva York, EE. UU. (Sede de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7.jpg</text:p>
          </table:table-cell>
          <table:table-cell office:value-type="string" calcext:value-type="string">
            <text:p>c28wfs</text:p>
          </table:table-cell>
          <table:table-cell office:value-type="string" calcext:value-type="string">
            <text:p>image</text:p>
          </table:table-cell>
          <table:table-cell office:value-type="string" calcext:value-type="string">
            <text:p>/objects/negativo_077.jpg</text:p>
          </table:table-cell>
          <table:table-cell office:value-type="string" calcext:value-type="string">
            <text:p>/objects/small/negativo_077_sm.jpg</text:p>
          </table:table-cell>
          <table:table-cell office:value-type="string" calcext:value-type="string">
            <text:p>/objects/thumbs/negativo_077_th.jpg</text:p>
          </table:table-cell>
          <table:table-cell table:number-columns-repeated="2"/>
          <table:table-cell office:value-type="string" calcext:value-type="string">
            <text:p>Placa de negativo en color (sheet film) de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8</text:p>
          </table:table-cell>
          <table:table-cell office:value-type="string" calcext:value-type="string">
            <text:p>Retrato nupcial</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Negativo en color de un retrato de estudio que muestra a una mujer joven vestida de novia. El sujeto presenta un peinado voluminoso estilo 'bouffant' o 'beehive' propio de la moda de mediados de los años 60, complementado con un velo de tul y un tocado de flores oscuras. El fondo consiste en un papel tapiz con patrones florales tipo damasco, típico de los estudios fotográficos comerciales de la época.</text:p>
          </table:table-cell>
          <table:table-cell/>
          <table:table-cell office:value-type="string" calcext:value-type="string">
            <text:p>Retrato nupcial; Moda femenina 1960; Kodak Safety Film</text:p>
          </table:table-cell>
          <table:table-cell office:value-type="string" calcext:value-type="string">
            <text:p>Estudio fotográfico, Estados Unidos</text:p>
          </table:table-cell>
          <table:table-cell office:value-type="float" office:value="38.8951" calcext:value-type="float">
            <text:p>38.8951</text:p>
          </table:table-cell>
          <table:table-cell office:value-type="float" office:value="-77.0364" calcext:value-type="float">
            <text:p>-77.03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8.jpg</text:p>
          </table:table-cell>
          <table:table-cell office:value-type="string" calcext:value-type="string">
            <text:p>l2rard</text:p>
          </table:table-cell>
          <table:table-cell office:value-type="string" calcext:value-type="string">
            <text:p>image</text:p>
          </table:table-cell>
          <table:table-cell office:value-type="string" calcext:value-type="string">
            <text:p>/objects/negativo_078.jpg</text:p>
          </table:table-cell>
          <table:table-cell office:value-type="string" calcext:value-type="string">
            <text:p>/objects/small/negativo_078_sm.jpg</text:p>
          </table:table-cell>
          <table:table-cell office:value-type="string" calcext:value-type="string">
            <text:p>/objects/thumbs/negativo_078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79</text:p>
          </table:table-cell>
          <table:table-cell office:value-type="string" calcext:value-type="string">
            <text:p>Negativo de color</text:p>
          </table:table-cell>
          <table:table-cell office:value-type="float" office:value="1950" calcext:value-type="float">
            <text:p>1950</text:p>
          </table:table-cell>
          <table:table-cell/>
          <table:table-cell office:value-type="string" calcext:value-type="string">
            <text:p>Anónimo (Estudio fotográfico profesional)</text:p>
          </table:table-cell>
          <table:table-cell/>
          <table:table-cell office:value-type="string" calcext:value-type="string">
            <text:p>Retrato de estudio de un hombre joven vestido con un esmoquin blanco (dinner jacket) de verano, pajarita negra y un boutonniere floral. La imagen es un negativo de color de gran formato, característico de la fotografía publicitaria o de celebridades de mediados del siglo XX.</text:p>
          </table:table-cell>
          <table:table-cell/>
          <table:table-cell office:value-type="string" calcext:value-type="string">
            <text:p>Negativo de color; Esmoquin blanco; Fotografía de estudio</text:p>
          </table:table-cell>
          <table:table-cell office:value-type="string" calcext:value-type="string">
            <text:p>Los Ángeles, California (Estudios de Hollywood)</text:p>
          </table:table-cell>
          <table:table-cell office:value-type="float" office:value="34.0928" calcext:value-type="float">
            <text:p>34.0928</text:p>
          </table:table-cell>
          <table:table-cell office:value-type="float" office:value="-118.3287" calcext:value-type="float">
            <text:p>-118.32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9.jpg</text:p>
          </table:table-cell>
          <table:table-cell office:value-type="string" calcext:value-type="string">
            <text:p>ilzqyp</text:p>
          </table:table-cell>
          <table:table-cell office:value-type="string" calcext:value-type="string">
            <text:p>image</text:p>
          </table:table-cell>
          <table:table-cell office:value-type="string" calcext:value-type="string">
            <text:p>/objects/negativo_079.jpg</text:p>
          </table:table-cell>
          <table:table-cell office:value-type="string" calcext:value-type="string">
            <text:p>/objects/small/negativo_079_sm.jpg</text:p>
          </table:table-cell>
          <table:table-cell office:value-type="string" calcext:value-type="string">
            <text:p>/objects/thumbs/negativo_07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0</text:p>
          </table:table-cell>
          <table:table-cell office:value-type="string" calcext:value-type="string">
            <text:p>Arquitectura Neoclásica</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Tira de negativos de película de 35 mm en color que documenta una visita turística a los complejos palaciegos de San Petersburgo. La secuencia incluye vistas de arquitectura neoclásica, estatuas monumentales (incluyendo una representación de las Tres Gracias) y retratos de un hombre joven con vestimenta casual de finales del siglo XX.</text:p>
          </table:table-cell>
          <table:table-cell/>
          <table:table-cell office:value-type="string" calcext:value-type="string">
            <text:p>Arquitectura Neoclásica; Tsárskoye Seló; Kodak Pro 100</text:p>
          </table:table-cell>
          <table:table-cell office:value-type="string" calcext:value-type="string">
            <text:p>Pushkin (Tsárskoye Seló), San Petersburgo, Rusia</text:p>
          </table:table-cell>
          <table:table-cell office:value-type="float" office:value="59.7161" calcext:value-type="float">
            <text:p>59.7161</text:p>
          </table:table-cell>
          <table:table-cell office:value-type="float" office:value="30.3955" calcext:value-type="float">
            <text:p>30.39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0.jpg</text:p>
          </table:table-cell>
          <table:table-cell office:value-type="string" calcext:value-type="string">
            <text:p>j3wpo9</text:p>
          </table:table-cell>
          <table:table-cell office:value-type="string" calcext:value-type="string">
            <text:p>image</text:p>
          </table:table-cell>
          <table:table-cell office:value-type="string" calcext:value-type="string">
            <text:p>/objects/negativo_080.jpg</text:p>
          </table:table-cell>
          <table:table-cell office:value-type="string" calcext:value-type="string">
            <text:p>/objects/small/negativo_080_sm.jpg</text:p>
          </table:table-cell>
          <table:table-cell office:value-type="string" calcext:value-type="string">
            <text:p>/objects/thumbs/negativo_08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81</text:p>
          </table:table-cell>
          <table:table-cell office:value-type="string" calcext:value-type="string">
            <text:p>Museología</text:p>
          </table:table-cell>
          <table:table-cell office:value-type="float" office:value="2002" calcext:value-type="float">
            <text:p>2002</text:p>
          </table:table-cell>
          <table:table-cell/>
          <table:table-cell office:value-type="string" calcext:value-type="string">
            <text:p>Anónimo</text:p>
          </table:table-cell>
          <table:table-cell/>
          <table:table-cell office:value-type="string" calcext:value-type="string">
            <text:p>Tira de negativos de 35mm en color que muestra el interior de una galería de arte contemporáneo o museo. Las imágenes capturan detalles arquitectónicos, vigas estructurales, sistemas de iluminación de riel y una serie de obras fotográficas enmarcadas expuestas en una pared. En uno de los fotogramas se observa a personas sentadas, lo que sugiere un espacio público de carácter cultural durante una exhibición.</text:p>
          </table:table-cell>
          <table:table-cell/>
          <table:table-cell office:value-type="string" calcext:value-type="string">
            <text:p>Museología; Arquitectura contemporánea; Kodak Portra 400VC</text:p>
          </table:table-cell>
          <table:table-cell office:value-type="string" calcext:value-type="string">
            <text:p>Londres, Reino Unido (Tate Modern o similar)</text:p>
          </table:table-cell>
          <table:table-cell office:value-type="float" office:value="51.5076" calcext:value-type="float">
            <text:p>51.5076</text:p>
          </table:table-cell>
          <table:table-cell office:value-type="float" office:value="-0.0994" calcext:value-type="float">
            <text:p>-0.09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1.jpg</text:p>
          </table:table-cell>
          <table:table-cell office:value-type="string" calcext:value-type="string">
            <text:p>d74xpg</text:p>
          </table:table-cell>
          <table:table-cell office:value-type="string" calcext:value-type="string">
            <text:p>image</text:p>
          </table:table-cell>
          <table:table-cell office:value-type="string" calcext:value-type="string">
            <text:p>/objects/negativo_081.jpg</text:p>
          </table:table-cell>
          <table:table-cell office:value-type="string" calcext:value-type="string">
            <text:p>/objects/small/negativo_081_sm.jpg</text:p>
          </table:table-cell>
          <table:table-cell office:value-type="string" calcext:value-type="string">
            <text:p>/objects/thumbs/negativo_081_th.jpg</text:p>
          </table:table-cell>
          <table:table-cell table:number-columns-repeated="2"/>
          <table:table-cell office:value-type="string" calcext:value-type="string">
            <text:p>Película negativa de color en formato de 35mm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82</text:p>
          </table:table-cell>
          <table:table-cell office:value-type="string" calcext:value-type="string">
            <text:p>Fotografía industrial</text:p>
          </table:table-cell>
          <table:table-cell office:value-type="float" office:value="2002" calcext:value-type="float">
            <text:p>2002</text:p>
          </table:table-cell>
          <table:table-cell/>
          <table:table-cell office:value-type="string" calcext:value-type="string">
            <text:p>Anónimo (Fotógrafo industrial o documental)</text:p>
          </table:table-cell>
          <table:table-cell/>
          <table:table-cell office:value-type="string" calcext:value-type="string">
            <text:p>Tira de película negativa en color de 35 mm que muestra una secuencia de cinco fotogramas (del 32 al 36). Las imágenes incluyen retratos casuales de dos personas sentadas, una escena urbana con un autobús y señalética corporativa (posiblemente de BP), vistas de azoteas industriales con equipos de ventilación o climatización, y lo que parece ser maquinaria pesada o rollos de material en un entorno de fábrica.</text:p>
          </table:table-cell>
          <table:table-cell/>
          <table:table-cell office:value-type="string" calcext:value-type="string">
            <text:p>Fotografía industrial; Kodak Portra 400VC; Paisaje urbano</text:p>
          </table:table-cell>
          <table:table-cell office:value-type="string" calcext:value-type="string">
            <text:p>Londres, Reino Unido</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2.jpg</text:p>
          </table:table-cell>
          <table:table-cell office:value-type="string" calcext:value-type="string">
            <text:p>n9oy9l</text:p>
          </table:table-cell>
          <table:table-cell office:value-type="string" calcext:value-type="string">
            <text:p>image</text:p>
          </table:table-cell>
          <table:table-cell office:value-type="string" calcext:value-type="string">
            <text:p>/objects/negativo_082.jpg</text:p>
          </table:table-cell>
          <table:table-cell office:value-type="string" calcext:value-type="string">
            <text:p>/objects/small/negativo_082_sm.jpg</text:p>
          </table:table-cell>
          <table:table-cell office:value-type="string" calcext:value-type="string">
            <text:p>/objects/thumbs/negativo_08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3</text:p>
          </table:table-cell>
          <table:table-cell office:value-type="string" calcext:value-type="string">
            <text:p>Retrato de estudio</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de estudio de una mujer joven con vestimenta de inspiración edwardiana, caracterizada por un cuello alto de encaje y un tocado floral. La imagen es un negativo a color con la inscripción de borde 'KODAK SAFETY FILM', lo que sitúa la toma técnica en la segunda mitad del siglo XX como una recreación estilística.</text:p>
          </table:table-cell>
          <table:table-cell/>
          <table:table-cell office:value-type="string" calcext:value-type="string">
            <text:p>Retrato de estudio; Moda Edwardiana; Negativo a color</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3.jpg</text:p>
          </table:table-cell>
          <table:table-cell office:value-type="string" calcext:value-type="string">
            <text:p>xvdzv</text:p>
          </table:table-cell>
          <table:table-cell office:value-type="string" calcext:value-type="string">
            <text:p>image</text:p>
          </table:table-cell>
          <table:table-cell office:value-type="string" calcext:value-type="string">
            <text:p>/objects/negativo_083.jpg</text:p>
          </table:table-cell>
          <table:table-cell office:value-type="string" calcext:value-type="string">
            <text:p>/objects/small/negativo_083_sm.jpg</text:p>
          </table:table-cell>
          <table:table-cell office:value-type="string" calcext:value-type="string">
            <text:p>/objects/thumbs/negativo_083_th.jpg</text:p>
          </table:table-cell>
          <table:table-cell table:number-columns-repeated="2"/>
          <table:table-cell office:value-type="string" calcext:value-type="string">
            <text:p>Negativo a color de formato medio o placa de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4</text:p>
          </table:table-cell>
          <table:table-cell office:value-type="string" calcext:value-type="string">
            <text:p>Mezquita de Córdoba</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Tira de película negativa en color que muestra varias tomas del interior de la Mezquita-Catedral de Córdoba. Se aprecian claramente los arcos de herradura polilobulados con dovelas alternas de color rojo y blanco, así como el detalle del Mihrab de Al-Hakam II, una de las obras cumbres del arte omeya en España.</text:p>
          </table:table-cell>
          <table:table-cell/>
          <table:table-cell office:value-type="string" calcext:value-type="string">
            <text:p>Mezquita de Córdoba; Arquitectura Omeya; Mihrab</text:p>
          </table:table-cell>
          <table:table-cell office:value-type="string" calcext:value-type="string">
            <text:p>Córdoba, España</text:p>
          </table:table-cell>
          <table:table-cell office:value-type="float" office:value="37.8789" calcext:value-type="float">
            <text:p>37.8789</text:p>
          </table:table-cell>
          <table:table-cell office:value-type="float" office:value="-4.7794" calcext:value-type="float">
            <text:p>-4.77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4.jpg</text:p>
          </table:table-cell>
          <table:table-cell office:value-type="string" calcext:value-type="string">
            <text:p>xm0ql</text:p>
          </table:table-cell>
          <table:table-cell office:value-type="string" calcext:value-type="string">
            <text:p>image</text:p>
          </table:table-cell>
          <table:table-cell office:value-type="string" calcext:value-type="string">
            <text:p>/objects/negativo_084.jpg</text:p>
          </table:table-cell>
          <table:table-cell office:value-type="string" calcext:value-type="string">
            <text:p>/objects/small/negativo_084_sm.jpg</text:p>
          </table:table-cell>
          <table:table-cell office:value-type="string" calcext:value-type="string">
            <text:p>/objects/thumbs/negativo_08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5</text:p>
          </table:table-cell>
          <table:table-cell office:value-type="string" calcext:value-type="string">
            <text:p>Boda</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Retrato formal de una novia junto a una acompañante femenina en el interior de una vivienda o estudio doméstico. La imagen es un negativo de color que muestra el peinado 'beehive' y la moda nupcial de transición entre finales de los años 60 y principios de los 70, caracterizada por cuellos altos y encaje detallado.</text:p>
          </table:table-cell>
          <table:table-cell/>
          <table:table-cell office:value-type="string" calcext:value-type="string">
            <text:p>Boda; Moda nupcial; Negativo de color</text:p>
          </table:table-cell>
          <table:table-cell office:value-type="string" calcext:value-type="string">
            <text:p>Estados Unidos (Probable)</text:p>
          </table:table-cell>
          <table:table-cell office:value-type="float" office:value="43.161" calcext:value-type="float">
            <text:p>43.161</text:p>
          </table:table-cell>
          <table:table-cell office:value-type="float" office:value="-77.6109" calcext:value-type="float">
            <text:p>-77.61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5.jpg</text:p>
          </table:table-cell>
          <table:table-cell office:value-type="string" calcext:value-type="string">
            <text:p>kgndgo</text:p>
          </table:table-cell>
          <table:table-cell office:value-type="string" calcext:value-type="string">
            <text:p>image</text:p>
          </table:table-cell>
          <table:table-cell office:value-type="string" calcext:value-type="string">
            <text:p>/objects/negativo_085.jpg</text:p>
          </table:table-cell>
          <table:table-cell office:value-type="string" calcext:value-type="string">
            <text:p>/objects/small/negativo_085_sm.jpg</text:p>
          </table:table-cell>
          <table:table-cell office:value-type="string" calcext:value-type="string">
            <text:p>/objects/thumbs/negativo_08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6</text:p>
          </table:table-cell>
          <table:table-cell office:value-type="string" calcext:value-type="string">
            <text:p>Arquitectura mudéja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Tira de película negativa en color de 35mm que contiene vistas turísticas. El fotograma de la derecha muestra a dos personas sentadas junto a una fuente en un jardín de estilo mediterráneo. El fotograma del extremo izquierdo revela detalles arquitectónicos de estilo mudéjar, con arcos de herradura y yeserías intrincadas características de palacios andalusíes.</text:p>
          </table:table-cell>
          <table:table-cell/>
          <table:table-cell office:value-type="string" calcext:value-type="string">
            <text:p>Arquitectura mudéjar; Fotografía analógica; Turismo cultural</text:p>
          </table:table-cell>
          <table:table-cell office:value-type="string" calcext:value-type="string">
            <text:p>La Alhambra, Granada, España</text:p>
          </table:table-cell>
          <table:table-cell office:value-type="float" office:value="37.176" calcext:value-type="float">
            <text:p>37.176</text:p>
          </table:table-cell>
          <table:table-cell office:value-type="float" office:value="-3.5881" calcext:value-type="float">
            <text:p>-3.588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6.jpg</text:p>
          </table:table-cell>
          <table:table-cell office:value-type="string" calcext:value-type="string">
            <text:p>dowatp</text:p>
          </table:table-cell>
          <table:table-cell office:value-type="string" calcext:value-type="string">
            <text:p>image</text:p>
          </table:table-cell>
          <table:table-cell office:value-type="string" calcext:value-type="string">
            <text:p>/objects/negativo_086.jpg</text:p>
          </table:table-cell>
          <table:table-cell office:value-type="string" calcext:value-type="string">
            <text:p>/objects/small/negativo_086_sm.jpg</text:p>
          </table:table-cell>
          <table:table-cell office:value-type="string" calcext:value-type="string">
            <text:p>/objects/thumbs/negativo_086_th.jpg</text:p>
          </table:table-cell>
          <table:table-cell table:number-columns-repeated="2"/>
          <table:table-cell office:value-type="string" calcext:value-type="string">
            <text:p>Tira de negativo de color de 35mm (formato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7</text:p>
          </table:table-cell>
          <table:table-cell office:value-type="string" calcext:value-type="string">
            <text:p>El Tajín</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Conjunto de tiras de negativos fotográficos que documentan un viaje familiar a la zona arqueológica de El Tajín y una zona costera adyacente. En el primer fotograma de la fila superior (marcado como 16) se distingue claramente la Pirámide de los Nichos, icono de la cultura totonaca. El resto de los negativos muestran escenas de ocio en la playa, incluyendo un bote de pesca, personas bañándose y niños construyendo castillos de arena, lo que sugiere un itinerario turístico típico del Golfo de México.</text:p>
          </table:table-cell>
          <table:table-cell/>
          <table:table-cell office:value-type="string" calcext:value-type="string">
            <text:p>El Tajín; Pirámide de los Nichos; Turismo arqueológico</text:p>
          </table:table-cell>
          <table:table-cell office:value-type="string" calcext:value-type="string">
            <text:p>Papantla de Olarte, Veracruz, México</text:p>
          </table:table-cell>
          <table:table-cell office:value-type="float" office:value="20.4461" calcext:value-type="float">
            <text:p>20.4461</text:p>
          </table:table-cell>
          <table:table-cell office:value-type="float" office:value="-97.3772" calcext:value-type="float">
            <text:p>-97.37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7.jpg</text:p>
          </table:table-cell>
          <table:table-cell office:value-type="string" calcext:value-type="string">
            <text:p>gfdjgcg</text:p>
          </table:table-cell>
          <table:table-cell office:value-type="string" calcext:value-type="string">
            <text:p>image</text:p>
          </table:table-cell>
          <table:table-cell office:value-type="string" calcext:value-type="string">
            <text:p>/objects/negativo_087.jpg</text:p>
          </table:table-cell>
          <table:table-cell office:value-type="string" calcext:value-type="string">
            <text:p>/objects/small/negativo_087_sm.jpg</text:p>
          </table:table-cell>
          <table:table-cell office:value-type="string" calcext:value-type="string">
            <text:p>/objects/thumbs/negativo_087_th.jpg</text:p>
          </table:table-cell>
          <table:table-cell table:number-columns-repeated="2"/>
          <table:table-cell office:value-type="string" calcext:value-type="string">
            <text:p>Negativo de color en tiras de formato 126 (sistema Kodapak)</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8</text:p>
          </table:table-cell>
          <table:table-cell office:value-type="string" calcext:value-type="string">
            <text:p>George Eastman House</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Tira de negativos a color en formato 110 que documenta una visita a Rochester, Nueva York. Las imágenes capturan hitos locales, destacando notablemente la George Eastman House (Museo Internacional de Fotografía y Cine) y establecimientos comerciales contemporáneos como un supermercado Wegmans y un restaurante McDonald's.</text:p>
          </table:table-cell>
          <table:table-cell/>
          <table:table-cell office:value-type="string" calcext:value-type="string">
            <text:p>George Eastman House; Rochester New York; Película formato 110</text:p>
          </table:table-cell>
          <table:table-cell office:value-type="string" calcext:value-type="string">
            <text:p>George Eastman Museum, 900 East Avenue, Rochester, NY, EE. UU.</text:p>
          </table:table-cell>
          <table:table-cell office:value-type="float" office:value="43.1525" calcext:value-type="float">
            <text:p>43.1525</text:p>
          </table:table-cell>
          <table:table-cell office:value-type="float" office:value="-77.5801" calcext:value-type="float">
            <text:p>-77.580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8.jpg</text:p>
          </table:table-cell>
          <table:table-cell office:value-type="string" calcext:value-type="string">
            <text:p>0ec1i</text:p>
          </table:table-cell>
          <table:table-cell office:value-type="string" calcext:value-type="string">
            <text:p>image</text:p>
          </table:table-cell>
          <table:table-cell office:value-type="string" calcext:value-type="string">
            <text:p>/objects/negativo_088.jpg</text:p>
          </table:table-cell>
          <table:table-cell office:value-type="string" calcext:value-type="string">
            <text:p>/objects/small/negativo_088_sm.jpg</text:p>
          </table:table-cell>
          <table:table-cell office:value-type="string" calcext:value-type="string">
            <text:p>/objects/thumbs/negativo_08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9</text:p>
          </table:table-cell>
          <table:table-cell office:value-type="string" calcext:value-type="string">
            <text:p>George Eastman House</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Tira de película negativa en color de 35mm que contiene diversas vistas urbanas de Rochester, Nueva York. Se identifica claramente un fotograma con el letrero del George Eastman House (actualmente George Eastman Museum) en su ubicación del 900 de East Avenue, además de comercios locales como un supermercado Wegmans con farmacia y un concesionario Volvo.</text:p>
          </table:table-cell>
          <table:table-cell/>
          <table:table-cell office:value-type="string" calcext:value-type="string">
            <text:p>George Eastman House; Rochester NY; Negativo color 35mm</text:p>
          </table:table-cell>
          <table:table-cell office:value-type="string" calcext:value-type="string">
            <text:p>George Eastman Museum, Rochester, Nueva York, EE. UU.</text:p>
          </table:table-cell>
          <table:table-cell office:value-type="float" office:value="43.1522" calcext:value-type="float">
            <text:p>43.1522</text:p>
          </table:table-cell>
          <table:table-cell office:value-type="float" office:value="-77.5802" calcext:value-type="float">
            <text:p>-77.580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9.jpg</text:p>
          </table:table-cell>
          <table:table-cell office:value-type="string" calcext:value-type="string">
            <text:p>rzzhxs</text:p>
          </table:table-cell>
          <table:table-cell office:value-type="string" calcext:value-type="string">
            <text:p>image</text:p>
          </table:table-cell>
          <table:table-cell office:value-type="string" calcext:value-type="string">
            <text:p>/objects/negativo_089.jpg</text:p>
          </table:table-cell>
          <table:table-cell office:value-type="string" calcext:value-type="string">
            <text:p>/objects/small/negativo_089_sm.jpg</text:p>
          </table:table-cell>
          <table:table-cell office:value-type="string" calcext:value-type="string">
            <text:p>/objects/thumbs/negativo_08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0</text:p>
          </table:table-cell>
          <table:table-cell office:value-type="string" calcext:value-type="string">
            <text:p>Película negativa de 35mm</text:p>
          </table:table-cell>
          <table:table-cell office:value-type="float" office:value="1990" calcext:value-type="float">
            <text:p>1990</text:p>
          </table:table-cell>
          <table:table-cell/>
          <table:table-cell office:value-type="string" calcext:value-type="string">
            <text:p>Anónimo</text:p>
          </table:table-cell>
          <table:table-cell/>
          <table:table-cell office:value-type="string" calcext:value-type="string">
            <text:p>Registros fotográficos privados capturados en película negativa que muestran la dualidad entre la vida doméstica íntima y la vida social institucional. La parte superior muestra un entorno familiar con niños y regalos en un salón, mientras que la sección inferior documenta una ceremonia litúrgica (posiblemente un bautizo o confirmación) en el altar de una iglesia, reflejando las costumbres sociales y la cultura visual de finales del siglo XX.</text:p>
          </table:table-cell>
          <table:table-cell/>
          <table:table-cell office:value-type="string" calcext:value-type="string">
            <text:p>Película negativa de 35mm; Vida cotidiana; Ceremonia religiosa</text:p>
          </table:table-cell>
          <table:table-cell office:value-type="string" calcext:value-type="string">
            <text:p>Desconocida (Probablemente entorno occident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0.jpg</text:p>
          </table:table-cell>
          <table:table-cell office:value-type="string" calcext:value-type="string">
            <text:p>q99dqm</text:p>
          </table:table-cell>
          <table:table-cell office:value-type="string" calcext:value-type="string">
            <text:p>image</text:p>
          </table:table-cell>
          <table:table-cell office:value-type="string" calcext:value-type="string">
            <text:p>/objects/negativo_090.jpg</text:p>
          </table:table-cell>
          <table:table-cell office:value-type="string" calcext:value-type="string">
            <text:p>/objects/small/negativo_090_sm.jpg</text:p>
          </table:table-cell>
          <table:table-cell office:value-type="string" calcext:value-type="string">
            <text:p>/objects/thumbs/negativo_09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1</text:p>
          </table:table-cell>
          <table:table-cell office:value-type="string" calcext:value-type="string">
            <text:p>Negativo de color</text:p>
          </table:table-cell>
          <table:table-cell office:value-type="float" office:value="1998" calcext:value-type="float">
            <text:p>1998</text:p>
          </table:table-cell>
          <table:table-cell/>
          <table:table-cell office:value-type="string" calcext:value-type="string">
            <text:p>Anónimo</text:p>
          </table:table-cell>
          <table:table-cell/>
          <table:table-cell office:value-type="string" calcext:value-type="string">
            <text:p>Dos tiras de película negativa en color de 35mm que capturan escenas urbanas y arquitectónicas. La tira superior muestra un muro de piedra de estilo colonial y un área de almacenamiento desordenada con plásticos azules. La tira inferior documenta una azotea con estructuras triangulares que parecen ser calentadores solares o tragaluces, con personas y edificios de fondo en un entorno urbano latinoamericano.</text:p>
          </table:table-cell>
          <table:table-cell/>
          <table:table-cell office:value-type="string" calcext:value-type="string">
            <text:p>Negativo de color; Azotea urbana; Arquitectura colonial</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1.jpg</text:p>
          </table:table-cell>
          <table:table-cell office:value-type="string" calcext:value-type="string">
            <text:p>tjn5rb</text:p>
          </table:table-cell>
          <table:table-cell office:value-type="string" calcext:value-type="string">
            <text:p>image</text:p>
          </table:table-cell>
          <table:table-cell office:value-type="string" calcext:value-type="string">
            <text:p>/objects/negativo_091.jpg</text:p>
          </table:table-cell>
          <table:table-cell office:value-type="string" calcext:value-type="string">
            <text:p>/objects/small/negativo_091_sm.jpg</text:p>
          </table:table-cell>
          <table:table-cell office:value-type="string" calcext:value-type="string">
            <text:p>/objects/thumbs/negativo_09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92</text:p>
          </table:table-cell>
          <table:table-cell office:value-type="string" calcext:value-type="string">
            <text:p>Agfacolor CN17</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Dos tiras de película negativa en color de 35 mm que muestran escenas de ocio y retratos cotidianos en un entorno europeo. Las imágenes superiores capturan un parque o jardín con una estructura de arcos decorativos y cisnes en un estanque. Las imágenes inferiores incluyen retratos de mujeres con vestimenta característica de mediados del siglo XX y una escena nocturna junto a una farola de diseño clásico.</text:p>
          </table:table-cell>
          <table:table-cell/>
          <table:table-cell office:value-type="string" calcext:value-type="string">
            <text:p>Agfacolor CN17; Fotografía de aficionados; Alemania Occidental</text:p>
          </table:table-cell>
          <table:table-cell office:value-type="string" calcext:value-type="string">
            <text:p>Alemania (RFA), posiblemente en la región de Renania o Baviera.</text:p>
          </table:table-cell>
          <table:table-cell office:value-type="float" office:value="51.0333" calcext:value-type="float">
            <text:p>51.0333</text:p>
          </table:table-cell>
          <table:table-cell office:value-type="float" office:value="7" calcext:value-type="float">
            <text:p>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2.jpg</text:p>
          </table:table-cell>
          <table:table-cell office:value-type="string" calcext:value-type="string">
            <text:p>u4e8cp</text:p>
          </table:table-cell>
          <table:table-cell office:value-type="string" calcext:value-type="string">
            <text:p>image</text:p>
          </table:table-cell>
          <table:table-cell office:value-type="string" calcext:value-type="string">
            <text:p>/objects/negativo_092.jpg</text:p>
          </table:table-cell>
          <table:table-cell office:value-type="string" calcext:value-type="string">
            <text:p>/objects/small/negativo_092_sm.jpg</text:p>
          </table:table-cell>
          <table:table-cell office:value-type="string" calcext:value-type="string">
            <text:p>/objects/thumbs/negativo_09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3</text:p>
          </table:table-cell>
          <table:table-cell office:value-type="string" calcext:value-type="string">
            <text:p>Ilford XP2 Supe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Dos tiras de negativos de película de 35 mm que documentan un evento académico o profesional, posiblemente un taller o simposio. Las imágenes muestran vistas de un patio con arquitectura institucional tradicional (estilo 'Collegiate Gothic'), interiores de una biblioteca o archivo con retratos históricos en las paredes, y grupos de personas portando acreditaciones modernas (lanyards) mientras interactúan con documentos o equipos.</text:p>
          </table:table-cell>
          <table:table-cell/>
          <table:table-cell office:value-type="string" calcext:value-type="string">
            <text:p>Ilford XP2 Super; Fotografía académica; Archivo fotográfico</text:p>
          </table:table-cell>
          <table:table-cell office:value-type="string" calcext:value-type="string">
            <text:p>Oxford, Reino Unido (Probablemente una de las facultades de la Universidad de Oxford)</text:p>
          </table:table-cell>
          <table:table-cell office:value-type="float" office:value="51.754816" calcext:value-type="float">
            <text:p>51.754816</text:p>
          </table:table-cell>
          <table:table-cell office:value-type="float" office:value="-1.254367" calcext:value-type="float">
            <text:p>-1.25436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3.jpg</text:p>
          </table:table-cell>
          <table:table-cell office:value-type="string" calcext:value-type="string">
            <text:p>s9mabh</text:p>
          </table:table-cell>
          <table:table-cell office:value-type="string" calcext:value-type="string">
            <text:p>image</text:p>
          </table:table-cell>
          <table:table-cell office:value-type="string" calcext:value-type="string">
            <text:p>/objects/negativo_093.jpg</text:p>
          </table:table-cell>
          <table:table-cell office:value-type="string" calcext:value-type="string">
            <text:p>/objects/small/negativo_093_sm.jpg</text:p>
          </table:table-cell>
          <table:table-cell office:value-type="string" calcext:value-type="string">
            <text:p>/objects/thumbs/negativo_09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94</text:p>
          </table:table-cell>
          <table:table-cell office:value-type="string" calcext:value-type="string">
            <text:p>Fotografía vernacula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Dos tiras de película negativa de 35mm que muestran escenas de la vida cotidiana de principios del siglo XXI. Las imágenes capturan un entorno doméstico con una persona utilizando una computadora portátil, retratos informales de una mujer joven en lo que parece ser una cafetería o 'diner', y detalles de la mesa con tazas de café. El estilo es puramente vernacular, documentando momentos privados y sociales sin una intención artística formal aparente.</text:p>
          </table:table-cell>
          <table:table-cell/>
          <table:table-cell office:value-type="string" calcext:value-type="string">
            <text:p>Fotografía vernacular; Ilford XP2 Super; Cultura digital temprana</text:p>
          </table:table-cell>
          <table:table-cell office:value-type="string" calcext:value-type="string">
            <text:p>Noreste de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4.jpg</text:p>
          </table:table-cell>
          <table:table-cell office:value-type="string" calcext:value-type="string">
            <text:p>jwl707</text:p>
          </table:table-cell>
          <table:table-cell office:value-type="string" calcext:value-type="string">
            <text:p>image</text:p>
          </table:table-cell>
          <table:table-cell office:value-type="string" calcext:value-type="string">
            <text:p>/objects/negativo_094.jpg</text:p>
          </table:table-cell>
          <table:table-cell office:value-type="string" calcext:value-type="string">
            <text:p>/objects/small/negativo_094_sm.jpg</text:p>
          </table:table-cell>
          <table:table-cell office:value-type="string" calcext:value-type="string">
            <text:p>/objects/thumbs/negativo_09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5</text:p>
          </table:table-cell>
          <table:table-cell office:value-type="string" calcext:value-type="string">
            <text:p>Museo Frida Kahlo</text:p>
          </table:table-cell>
          <table:table-cell office:value-type="float" office:value="1998" calcext:value-type="float">
            <text:p>1998</text:p>
          </table:table-cell>
          <table:table-cell/>
          <table:table-cell office:value-type="string" calcext:value-type="string">
            <text:p>Anónimo</text:p>
          </table:table-cell>
          <table:table-cell/>
          <table:table-cell office:value-type="string" calcext:value-type="string">
            <text:p>Dos tiras de película negativa de color de 35mm que documentan una serie de escenas urbanas y museográficas. La secuencia incluye vistas de plazas públicas, monumentos y, notablemente, el patio interior y laboratorio de conservación de la Casa Azul, el Museo Frida Kahlo en Coyoacán.</text:p>
          </table:table-cell>
          <table:table-cell/>
          <table:table-cell office:value-type="string" calcext:value-type="string">
            <text:p>Museo Frida Kahlo; Coyoacán; Fotografía analógica</text:p>
          </table:table-cell>
          <table:table-cell office:value-type="string" calcext:value-type="string">
            <text:p>Museo Frida Kahlo (La Casa Azul) y Jardín Hidalgo, Coyoacán, Ciudad de México.</text:p>
          </table:table-cell>
          <table:table-cell office:value-type="float" office:value="19.3551" calcext:value-type="float">
            <text:p>19.3551</text:p>
          </table:table-cell>
          <table:table-cell office:value-type="float" office:value="-99.1625" calcext:value-type="float">
            <text:p>-99.16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5.jpg</text:p>
          </table:table-cell>
          <table:table-cell office:value-type="string" calcext:value-type="string">
            <text:p>l9hvgd</text:p>
          </table:table-cell>
          <table:table-cell office:value-type="string" calcext:value-type="string">
            <text:p>image</text:p>
          </table:table-cell>
          <table:table-cell office:value-type="string" calcext:value-type="string">
            <text:p>/objects/negativo_095.jpg</text:p>
          </table:table-cell>
          <table:table-cell office:value-type="string" calcext:value-type="string">
            <text:p>/objects/small/negativo_095_sm.jpg</text:p>
          </table:table-cell>
          <table:table-cell office:value-type="string" calcext:value-type="string">
            <text:p>/objects/thumbs/negativo_09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6</text:p>
          </table:table-cell>
          <table:table-cell office:value-type="string" calcext:value-type="string">
            <text:p>Taxco de Alarcón</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Secuencia de negativos en color de 35mm que documentan un viaje turístico por Taxco de Alarcón, Guerrero, México. Las imágenes muestran vistas de la arquitectura colonial churrigueresca, incluyendo la Parroquia de Santa Prisca y San Sebastián (fotograma 20), así como edificios históricos con arquerías de piedra y mampostería característicos de la región. Se observan figuras femeninas vestidas con moda de finales de la década de 1960 o principios de los 70, posando frente a miradores y estructuras monumentales como la Ex-Hacienda del Chorrillo o edificios similares de la época minera.</text:p>
          </table:table-cell>
          <table:table-cell/>
          <table:table-cell office:value-type="string" calcext:value-type="string">
            <text:p>Taxco de Alarcón; Arquitectura Barroca; Turismo en México</text:p>
          </table:table-cell>
          <table:table-cell office:value-type="string" calcext:value-type="string">
            <text:p>Taxco de Alarcón, Guerrero, México</text:p>
          </table:table-cell>
          <table:table-cell office:value-type="float" office:value="18.5562" calcext:value-type="float">
            <text:p>18.5562</text:p>
          </table:table-cell>
          <table:table-cell office:value-type="float" office:value="-99.6048" calcext:value-type="float">
            <text:p>-99.60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6.jpg</text:p>
          </table:table-cell>
          <table:table-cell office:value-type="string" calcext:value-type="string">
            <text:p>1keyvk</text:p>
          </table:table-cell>
          <table:table-cell office:value-type="string" calcext:value-type="string">
            <text:p>image</text:p>
          </table:table-cell>
          <table:table-cell office:value-type="string" calcext:value-type="string">
            <text:p>/objects/negativo_096.jpg</text:p>
          </table:table-cell>
          <table:table-cell office:value-type="string" calcext:value-type="string">
            <text:p>/objects/small/negativo_096_sm.jpg</text:p>
          </table:table-cell>
          <table:table-cell office:value-type="string" calcext:value-type="string">
            <text:p>/objects/thumbs/negativo_096_th.jpg</text:p>
          </table:table-cell>
          <table:table-cell table:number-columns-repeated="2"/>
          <table:table-cell office:value-type="string" calcext:value-type="string">
            <text:p>Tira de película negativa de color de 35 mm (formato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1</text:p>
          </table:table-cell>
          <table:table-cell office:value-type="string" calcext:value-type="string">
            <text:p>Anatomía humana</text:p>
          </table:table-cell>
          <table:table-cell office:value-type="float" office:value="1930" calcext:value-type="float">
            <text:p>1930</text:p>
          </table:table-cell>
          <table:table-cell/>
          <table:table-cell office:value-type="string" calcext:value-type="string">
            <text:p>Anónimo (Basado en ilustraciones de G. Devy para L. Testut)</text:p>
          </table:table-cell>
          <table:table-cell/>
          <table:table-cell office:value-type="string" calcext:value-type="string">
            <text:p>Fotografía de una placa didáctica o diapositiva que reproduce una ilustración médica del hueso palatino derecho en su aspecto exterior. La imagen muestra detalles anatómicos precisos con etiquetas en latín y explicaciones en español, indicando una escala de 5/3. Forma parte de un conjunto de materiales educativos utilizados para la enseñanza de la osteología en facultades de medicina.</text:p>
          </table:table-cell>
          <table:table-cell/>
          <table:table-cell office:value-type="string" calcext:value-type="string">
            <text:p>Anatomía humana; Material didáctico; Osteología</text:p>
          </table:table-cell>
          <table:table-cell office:value-type="string" calcext:value-type="string">
            <text:p>Madrid, España (Facultad de Medicina, Universidad Complutense)</text:p>
          </table:table-cell>
          <table:table-cell office:value-type="float" office:value="40.4503" calcext:value-type="float">
            <text:p>40.4503</text:p>
          </table:table-cell>
          <table:table-cell office:value-type="float" office:value="-3.7262" calcext:value-type="float">
            <text:p>-3.726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1.jpg</text:p>
          </table:table-cell>
          <table:table-cell office:value-type="string" calcext:value-type="string">
            <text:p>q27g9g</text:p>
          </table:table-cell>
          <table:table-cell office:value-type="string" calcext:value-type="string">
            <text:p>image</text:p>
          </table:table-cell>
          <table:table-cell office:value-type="string" calcext:value-type="string">
            <text:p>/objects/transparencia_001.jpg</text:p>
          </table:table-cell>
          <table:table-cell office:value-type="string" calcext:value-type="string">
            <text:p>/objects/small/transparencia_001_sm.jpg</text:p>
          </table:table-cell>
          <table:table-cell office:value-type="string" calcext:value-type="string">
            <text:p>/objects/thumbs/transparencia_001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2</text:p>
          </table:table-cell>
          <table:table-cell office:value-type="string" calcext:value-type="string">
            <text:p>Anatomía Humana</text:p>
          </table:table-cell>
          <table:table-cell office:value-type="float" office:value="1960" calcext:value-type="float">
            <text:p>1960</text:p>
          </table:table-cell>
          <table:table-cell/>
          <table:table-cell office:value-type="string" calcext:value-type="string">
            <text:p>Johannes Sobotta (Ilustrador original)</text:p>
          </table:table-cell>
          <table:table-cell/>
          <table:table-cell office:value-type="string" calcext:value-type="string">
            <text:p>Reproducción fotográfica en diapositiva de una lámina anatómica que muestra la vista anterior del esternón humano (sternum), incluyendo detalles del manubrio, el cuerpo y el proceso xifoides, con terminología en latín y español. Este tipo de material era fundamental para la enseñanza médica universitaria antes de la digitalización, basado comúnmente en los grabados del Atlas de Anatomía de Johannes Sobotta.</text:p>
          </table:table-cell>
          <table:table-cell/>
          <table:table-cell office:value-type="string" calcext:value-type="string">
            <text:p>Anatomía Humana; Material Didáctico; Osteología</text:p>
          </table:table-cell>
          <table:table-cell office:value-type="string" calcext:value-type="string">
            <text:p>Facultad de Medicina, Universidad Complutense de Madrid, España</text:p>
          </table:table-cell>
          <table:table-cell office:value-type="float" office:value="40.4455" calcext:value-type="float">
            <text:p>40.4455</text:p>
          </table:table-cell>
          <table:table-cell office:value-type="float" office:value="-3.7268" calcext:value-type="float">
            <text:p>-3.726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2.jpg</text:p>
          </table:table-cell>
          <table:table-cell office:value-type="string" calcext:value-type="string">
            <text:p>wj1n8h</text:p>
          </table:table-cell>
          <table:table-cell office:value-type="string" calcext:value-type="string">
            <text:p>image</text:p>
          </table:table-cell>
          <table:table-cell office:value-type="string" calcext:value-type="string">
            <text:p>/objects/transparencia_002.jpg</text:p>
          </table:table-cell>
          <table:table-cell office:value-type="string" calcext:value-type="string">
            <text:p>/objects/small/transparencia_002_sm.jpg</text:p>
          </table:table-cell>
          <table:table-cell office:value-type="string" calcext:value-type="string">
            <text:p>/objects/thumbs/transparencia_00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3</text:p>
          </table:table-cell>
          <table:table-cell office:value-type="string" calcext:value-type="string">
            <text:p>Anatomía humana</text:p>
          </table:table-cell>
          <table:table-cell office:value-type="float" office:value="1950" calcext:value-type="float">
            <text:p>1950</text:p>
          </table:table-cell>
          <table:table-cell/>
          <table:table-cell office:value-type="string" calcext:value-type="string">
            <text:p>Johannes Sobotta (Ilustrador original) / Anónimo (Fotógrafo)</text:p>
          </table:table-cell>
          <table:table-cell/>
          <table:table-cell office:value-type="string" calcext:value-type="string">
            <text:p>Reproducción fotográfica en formato de diapositiva de una lámina anatómica que ilustra la mandíbula de un anciano (mandíbula senil). La imagen muestra la pérdida del proceso alveolar y los dientes debido a la edad, con etiquetas en latín y descripción en español, utilizada probablemente como material didáctico médico.</text:p>
          </table:table-cell>
          <table:table-cell/>
          <table:table-cell office:value-type="string" calcext:value-type="string">
            <text:p>Anatomía humana; Osteología; Material educativo</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3.jpg</text:p>
          </table:table-cell>
          <table:table-cell office:value-type="string" calcext:value-type="string">
            <text:p>fwtdtx</text:p>
          </table:table-cell>
          <table:table-cell office:value-type="string" calcext:value-type="string">
            <text:p>image</text:p>
          </table:table-cell>
          <table:table-cell office:value-type="string" calcext:value-type="string">
            <text:p>/objects/transparencia_003.jpg</text:p>
          </table:table-cell>
          <table:table-cell office:value-type="string" calcext:value-type="string">
            <text:p>/objects/small/transparencia_003_sm.jpg</text:p>
          </table:table-cell>
          <table:table-cell office:value-type="string" calcext:value-type="string">
            <text:p>/objects/thumbs/transparencia_00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4</text:p>
          </table:table-cell>
          <table:table-cell office:value-type="string" calcext:value-type="string">
            <text:p>Anatomía humana</text:p>
          </table:table-cell>
          <table:table-cell office:value-type="float" office:value="1970" calcext:value-type="float">
            <text:p>1970</text:p>
          </table:table-cell>
          <table:table-cell/>
          <table:table-cell office:value-type="string" calcext:value-type="string">
            <text:p>Nush Process S.A. (Laboratorio); Ilustración de L. Testut / A. Latarjet</text:p>
          </table:table-cell>
          <table:table-cell/>
          <table:table-cell office:value-type="string" calcext:value-type="string">
            <text:p>Diapositiva educativa que muestra una ilustración anatómica detallada de los músculos profundos de la región nucal, específicamente los músculos breves del occipucio (suboccipitales). La imagen es una reproducción fotográfica de una lámina de un tratado clásico de medicina, montada en un soporte de laboratorio profesional para su uso en proyecciones académicas. Se observa que el texto y la imagen están invertidos horizontalmente debido a un error de montaje en el marco.</text:p>
          </table:table-cell>
          <table:table-cell/>
          <table:table-cell office:value-type="string" calcext:value-type="string">
            <text:p>Anatomía humana; Material didáctico; Músculos suboccipitales</text:p>
          </table:table-cell>
          <table:table-cell office:value-type="string" calcext:value-type="string">
            <text:p>Barcelona, España</text:p>
          </table:table-cell>
          <table:table-cell office:value-type="float" office:value="41.3951" calcext:value-type="float">
            <text:p>41.3951</text:p>
          </table:table-cell>
          <table:table-cell office:value-type="float" office:value="2.1611" calcext:value-type="float">
            <text:p>2.16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4.jpg</text:p>
          </table:table-cell>
          <table:table-cell office:value-type="string" calcext:value-type="string">
            <text:p>itut7</text:p>
          </table:table-cell>
          <table:table-cell office:value-type="string" calcext:value-type="string">
            <text:p>image</text:p>
          </table:table-cell>
          <table:table-cell office:value-type="string" calcext:value-type="string">
            <text:p>/objects/transparencia_004.jpg</text:p>
          </table:table-cell>
          <table:table-cell office:value-type="string" calcext:value-type="string">
            <text:p>/objects/small/transparencia_004_sm.jpg</text:p>
          </table:table-cell>
          <table:table-cell office:value-type="string" calcext:value-type="string">
            <text:p>/objects/thumbs/transparencia_0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5</text:p>
          </table:table-cell>
          <table:table-cell office:value-type="string" calcext:value-type="string">
            <text:p>Anatomía humana</text:p>
          </table:table-cell>
          <table:table-cell office:value-type="float" office:value="1950" calcext:value-type="float">
            <text:p>1950</text:p>
          </table:table-cell>
          <table:table-cell/>
          <table:table-cell office:value-type="string" calcext:value-type="string">
            <text:p>Basado en ilustraciones de Johannes Sobotta; autor de la diapositiva anónimo</text:p>
          </table:table-cell>
          <table:table-cell/>
          <table:table-cell office:value-type="string" calcext:value-type="string">
            <text:p>Ilustración técnica anatómica del hueso palatino derecho (os palatinum) en su aspecto medial y posterior, montada en una diapositiva pedagógica. La imagen detalla estructuras clave como el proceso orbital, el proceso esfenoidal y la lámina horizontal mediante etiquetas en latín y líneas guía, con una escala de ampliación de 5/3.</text:p>
          </table:table-cell>
          <table:table-cell/>
          <table:table-cell office:value-type="string" calcext:value-type="string">
            <text:p>Anatomía humana; Material pedagógico; Osteología</text:p>
          </table:table-cell>
          <table:table-cell office:value-type="string" calcext:value-type="string">
            <text:p>Madrid, España</text:p>
          </table:table-cell>
          <table:table-cell office:value-type="float" office:value="40.4439" calcext:value-type="float">
            <text:p>40.4439</text:p>
          </table:table-cell>
          <table:table-cell office:value-type="float" office:value="-3.7258" calcext:value-type="float">
            <text:p>-3.72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5.jpg</text:p>
          </table:table-cell>
          <table:table-cell office:value-type="string" calcext:value-type="string">
            <text:p>bbs4qa</text:p>
          </table:table-cell>
          <table:table-cell office:value-type="string" calcext:value-type="string">
            <text:p>image</text:p>
          </table:table-cell>
          <table:table-cell office:value-type="string" calcext:value-type="string">
            <text:p>/objects/transparencia_005.jpg</text:p>
          </table:table-cell>
          <table:table-cell office:value-type="string" calcext:value-type="string">
            <text:p>/objects/small/transparencia_005_sm.jpg</text:p>
          </table:table-cell>
          <table:table-cell office:value-type="string" calcext:value-type="string">
            <text:p>/objects/thumbs/transparencia_00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6</text:p>
          </table:table-cell>
          <table:table-cell office:value-type="string" calcext:value-type="string">
            <text:p>Anatomía Humana</text:p>
          </table:table-cell>
          <table:table-cell office:value-type="float" office:value="1930" calcext:value-type="float">
            <text:p>1930</text:p>
          </table:table-cell>
          <table:table-cell/>
          <table:table-cell office:value-type="string" calcext:value-type="string">
            <text:p>Johannes Sobotta (Ilustrador original) / Editorial Labor</text:p>
          </table:table-cell>
          <table:table-cell/>
          <table:table-cell office:value-type="string" calcext:value-type="string">
            <text:p>Ilustración anatómica detallada de la sexta vértebra cervical (C6) vista desde su cara superior, perteneciente a un atlas médico de principios del siglo XX. La imagen presenta nomenclatura bilingüe (latín y español) con etiquetas precisas que señalan estructuras como el foramen vertebral, el proceso espinoso y el cuerpo vertebral, manteniendo una escala de 1:1 respecto al tamaño natural.</text:p>
          </table:table-cell>
          <table:table-cell/>
          <table:table-cell office:value-type="string" calcext:value-type="string">
            <text:p>Anatomía Humana; Osteología; Ilustración Médica</text:p>
          </table:table-cell>
          <table:table-cell office:value-type="string" calcext:value-type="string">
            <text:p>Barcelona, España</text:p>
          </table:table-cell>
          <table:table-cell office:value-type="float" office:value="41.3851" calcext:value-type="float">
            <text:p>41.3851</text:p>
          </table:table-cell>
          <table:table-cell office:value-type="float" office:value="2.1734" calcext:value-type="float">
            <text:p>2.17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6.jpg</text:p>
          </table:table-cell>
          <table:table-cell office:value-type="string" calcext:value-type="string">
            <text:p>ls1g3p</text:p>
          </table:table-cell>
          <table:table-cell office:value-type="string" calcext:value-type="string">
            <text:p>image</text:p>
          </table:table-cell>
          <table:table-cell office:value-type="string" calcext:value-type="string">
            <text:p>/objects/transparencia_006.jpg</text:p>
          </table:table-cell>
          <table:table-cell office:value-type="string" calcext:value-type="string">
            <text:p>/objects/small/transparencia_006_sm.jpg</text:p>
          </table:table-cell>
          <table:table-cell office:value-type="string" calcext:value-type="string">
            <text:p>/objects/thumbs/transparencia_006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7</text:p>
          </table:table-cell>
          <table:table-cell office:value-type="string" calcext:value-type="string">
            <text:p>Keystone View Company</text:p>
          </table:table-cell>
          <table:table-cell office:value-type="float" office:value="1910" calcext:value-type="float">
            <text:p>1910</text:p>
          </table:table-cell>
          <table:table-cell/>
          <table:table-cell office:value-type="string" calcext:value-type="string">
            <text:p>Keystone View Company (Estudios Meadville, PA)</text:p>
          </table:table-cell>
          <table:table-cell/>
          <table:table-cell office:value-type="string" calcext:value-type="string">
            <text:p>Una diapositiva de linterna mágica (lantern slide) coloreada a mano producida por la Keystone View Company. La imagen muestra una vivienda de madera de una familia indígena del Ártico (identificada históricamente como 'Eskimo' en el soporte), con un cercado de estacas de madera y estanterías de secado externas, reflejando la transición arquitectónica de los pueblos originarios tras el contacto comercial en Alaska.</text:p>
          </table:table-cell>
          <table:table-cell/>
          <table:table-cell office:value-type="string" calcext:value-type="string">
            <text:p>Keystone View Company; Arquitectura Ártica; Diapositiva de linterna</text:p>
          </table:table-cell>
          <table:table-cell office:value-type="string" calcext:value-type="string">
            <text:p>Alaska, Estados Unidos (Probablemente región de Nome o Point Barrow)</text:p>
          </table:table-cell>
          <table:table-cell office:value-type="float" office:value="64.5011" calcext:value-type="float">
            <text:p>64.5011</text:p>
          </table:table-cell>
          <table:table-cell office:value-type="float" office:value="-165.4064" calcext:value-type="float">
            <text:p>-165.40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7.jpg</text:p>
          </table:table-cell>
          <table:table-cell office:value-type="string" calcext:value-type="string">
            <text:p>5apxcl</text:p>
          </table:table-cell>
          <table:table-cell office:value-type="string" calcext:value-type="string">
            <text:p>image</text:p>
          </table:table-cell>
          <table:table-cell office:value-type="string" calcext:value-type="string">
            <text:p>/objects/transparencia_007.jpg</text:p>
          </table:table-cell>
          <table:table-cell office:value-type="string" calcext:value-type="string">
            <text:p>/objects/small/transparencia_007_sm.jpg</text:p>
          </table:table-cell>
          <table:table-cell office:value-type="string" calcext:value-type="string">
            <text:p>/objects/thumbs/transparencia_007_th.jpg</text:p>
          </table:table-cell>
          <table:table-cell table:number-columns-repeated="2"/>
          <table:table-cell office:value-type="string" calcext:value-type="string">
            <text:p>Placa de vidrio para linterna mágica (3</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8</text:p>
          </table:table-cell>
          <table:table-cell office:value-type="string" calcext:value-type="string">
            <text:p>Pajar</text:p>
          </table:table-cell>
          <table:table-cell office:value-type="float" office:value="1890" calcext:value-type="float">
            <text:p>1890</text:p>
          </table:table-cell>
          <table:table-cell/>
          <table:table-cell office:value-type="string" calcext:value-type="string">
            <text:p>Anónimo (Colección del Brooklyn Museum)</text:p>
          </table:table-cell>
          <table:table-cell/>
          <table:table-cell office:value-type="string" calcext:value-type="string">
            <text:p>Fotografía histórica de una mujer joven posando junto a un pajar de gran tamaño y un muro de piedra en un entorno rural. La imagen está capturada en una placa de linterna mágica, caracterizada por su marco negro y esquinas redondeadas, mostrando la vida agraria y la vestimenta típica de finales del siglo XIX en el noreste de Estados Unidos.</text:p>
          </table:table-cell>
          <table:table-cell/>
          <table:table-cell office:value-type="string" calcext:value-type="string">
            <text:p>Pajar; Vida rural; Linterna mágica</text:p>
          </table:table-cell>
          <table:table-cell office:value-type="string" calcext:value-type="string">
            <text:p>Estado de Nueva York (posiblemente Long Island o el Valle del Hudson), EE. UU.</text:p>
          </table:table-cell>
          <table:table-cell office:value-type="float" office:value="41.5236" calcext:value-type="float">
            <text:p>41.5236</text:p>
          </table:table-cell>
          <table:table-cell office:value-type="float" office:value="-74.0215" calcext:value-type="float">
            <text:p>-74.02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8.jpg</text:p>
          </table:table-cell>
          <table:table-cell office:value-type="string" calcext:value-type="string">
            <text:p>2un3do</text:p>
          </table:table-cell>
          <table:table-cell office:value-type="string" calcext:value-type="string">
            <text:p>image</text:p>
          </table:table-cell>
          <table:table-cell office:value-type="string" calcext:value-type="string">
            <text:p>/objects/transparencia_008.jpg</text:p>
          </table:table-cell>
          <table:table-cell office:value-type="string" calcext:value-type="string">
            <text:p>/objects/small/transparencia_008_sm.jpg</text:p>
          </table:table-cell>
          <table:table-cell office:value-type="string" calcext:value-type="string">
            <text:p>/objects/thumbs/transparencia_008_th.jpg</text:p>
          </table:table-cell>
          <table:table-cell table:number-columns-repeated="2"/>
          <table:table-cell office:value-type="string" calcext:value-type="string">
            <text:p>Placa de vidrio para linterna mágica de 3</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9</text:p>
          </table:table-cell>
          <table:table-cell office:value-type="string" calcext:value-type="string">
            <text:p>Parque Nacional Yellowstone</text:p>
          </table:table-cell>
          <table:table-cell office:value-type="float" office:value="1890" calcext:value-type="float">
            <text:p>1890</text:p>
          </table:table-cell>
          <table:table-cell/>
          <table:table-cell office:value-type="string" calcext:value-type="string">
            <text:p>F. Jay Haynes (Haynes Studios)</text:p>
          </table:table-cell>
          <table:table-cell/>
          <table:table-cell office:value-type="string" calcext:value-type="string">
            <text:p>Fotografía histórica de la erupción de un géiser en el Parque Nacional Yellowstone, capturada en una placa de linterna mágica. La imagen muestra una columna densa de vapor y agua emergiendo cerca de la orilla de un río, con un denso bosque de coníferas en el fondo, característico de la cuenca del río Firehole.</text:p>
          </table:table-cell>
          <table:table-cell/>
          <table:table-cell office:value-type="string" calcext:value-type="string">
            <text:p>Parque Nacional Yellowstone; Géiser; Linterna Mágica</text:p>
          </table:table-cell>
          <table:table-cell office:value-type="string" calcext:value-type="string">
            <text:p>Upper Geyser Basin, Parque Nacional Yellowstone, Wyoming, Estados Unidos.</text:p>
          </table:table-cell>
          <table:table-cell office:value-type="float" office:value="44.4758" calcext:value-type="float">
            <text:p>44.4758</text:p>
          </table:table-cell>
          <table:table-cell office:value-type="float" office:value="-110.835" calcext:value-type="float">
            <text:p>-110.83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9.jpg</text:p>
          </table:table-cell>
          <table:table-cell office:value-type="string" calcext:value-type="string">
            <text:p>a4br3q</text:p>
          </table:table-cell>
          <table:table-cell office:value-type="string" calcext:value-type="string">
            <text:p>image</text:p>
          </table:table-cell>
          <table:table-cell office:value-type="string" calcext:value-type="string">
            <text:p>/objects/transparencia_009.jpg</text:p>
          </table:table-cell>
          <table:table-cell office:value-type="string" calcext:value-type="string">
            <text:p>/objects/small/transparencia_009_sm.jpg</text:p>
          </table:table-cell>
          <table:table-cell office:value-type="string" calcext:value-type="string">
            <text:p>/objects/thumbs/transparencia_009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0</text:p>
          </table:table-cell>
          <table:table-cell office:value-type="string" calcext:value-type="string">
            <text:p>Placa de vidrio</text:p>
          </table:table-cell>
          <table:table-cell office:value-type="float" office:value="1900" calcext:value-type="float">
            <text:p>1900</text:p>
          </table:table-cell>
          <table:table-cell/>
          <table:table-cell office:value-type="string" calcext:value-type="string">
            <text:p>Anónimo (Atribuido a la colección del Rijksmuseum)</text:p>
          </table:table-cell>
          <table:table-cell/>
          <table:table-cell office:value-type="string" calcext:value-type="string">
            <text:p>Negativo fotográfico en placa de vidrio que muestra un camino rural en un entorno tropical, flanqueado por palmeras y vegetación densa. En la parte inferior izquierda se distinguen dos figuras humanas con vestimenta de principios del siglo XX, posiblemente colonos o exploradores, situados junto a lo que parece ser una estructura ligera o valla. La imagen presenta la inversión tonal propia de un negativo y signos de deterioro químico en los bordes de la emulsión.</text:p>
          </table:table-cell>
          <table:table-cell/>
          <table:table-cell office:value-type="string" calcext:value-type="string">
            <text:p>Placa de vidrio; Paisaje tropical; Fotografía colonial</text:p>
          </table:table-cell>
          <table:table-cell office:value-type="string" calcext:value-type="string">
            <text:p>Paramaribo, Surinam</text:p>
          </table:table-cell>
          <table:table-cell office:value-type="float" office:value="5.8666" calcext:value-type="float">
            <text:p>5.8666</text:p>
          </table:table-cell>
          <table:table-cell office:value-type="float" office:value="-55.1666" calcext:value-type="float">
            <text:p>-55.166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0.jpg</text:p>
          </table:table-cell>
          <table:table-cell office:value-type="string" calcext:value-type="string">
            <text:p>mc0csn</text:p>
          </table:table-cell>
          <table:table-cell office:value-type="string" calcext:value-type="string">
            <text:p>image</text:p>
          </table:table-cell>
          <table:table-cell office:value-type="string" calcext:value-type="string">
            <text:p>/objects/transparencia_010.jpg</text:p>
          </table:table-cell>
          <table:table-cell office:value-type="string" calcext:value-type="string">
            <text:p>/objects/small/transparencia_010_sm.jpg</text:p>
          </table:table-cell>
          <table:table-cell office:value-type="string" calcext:value-type="string">
            <text:p>/objects/thumbs/transparencia_010_th.jpg</text:p>
          </table:table-cell>
          <table:table-cell table:number-columns-repeated="2"/>
          <table:table-cell office:value-type="string" calcext:value-type="string">
            <text:p>Soporte de vidrio (placa sec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1</text:p>
          </table:table-cell>
          <table:table-cell office:value-type="string" calcext:value-type="string">
            <text:p>Autocromo</text:p>
          </table:table-cell>
          <table:table-cell office:value-type="float" office:value="1913" calcext:value-type="float">
            <text:p>1913</text:p>
          </table:table-cell>
          <table:table-cell/>
          <table:table-cell office:value-type="string" calcext:value-type="string">
            <text:p>Auguste Léon</text:p>
          </table:table-cell>
          <table:table-cell/>
          <table:table-cell office:value-type="string" calcext:value-type="string">
            <text:p>Un autocromo de principios del siglo XX que captura a dos hombres con vestimenta formal oscura y sombreros de pie en un camino rural flanqueado por una densa vegetación tropical, destacando palmeras cocoteras. En el margen derecho se aprecia un animal de pastoreo, posiblemente un buey, integrando un elemento bucólico a la escena. La imagen es un registro documental de la expedición de los 'Archivos del Planeta' en el Caribe.</text:p>
          </table:table-cell>
          <table:table-cell/>
          <table:table-cell office:value-type="string" calcext:value-type="string">
            <text:p>Autocromo; Cuba colonial; Paisaje tropical</text:p>
          </table:table-cell>
          <table:table-cell office:value-type="string" calcext:value-type="string">
            <text:p>Matanzas, Cuba</text:p>
          </table:table-cell>
          <table:table-cell office:value-type="float" office:value="23.0411" calcext:value-type="float">
            <text:p>23.0411</text:p>
          </table:table-cell>
          <table:table-cell office:value-type="float" office:value="-81.5775" calcext:value-type="float">
            <text:p>-81.57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1.jpg</text:p>
          </table:table-cell>
          <table:table-cell office:value-type="string" calcext:value-type="string">
            <text:p>gezrwl</text:p>
          </table:table-cell>
          <table:table-cell office:value-type="string" calcext:value-type="string">
            <text:p>image</text:p>
          </table:table-cell>
          <table:table-cell office:value-type="string" calcext:value-type="string">
            <text:p>/objects/transparencia_011.jpg</text:p>
          </table:table-cell>
          <table:table-cell office:value-type="string" calcext:value-type="string">
            <text:p>/objects/small/transparencia_011_sm.jpg</text:p>
          </table:table-cell>
          <table:table-cell office:value-type="string" calcext:value-type="string">
            <text:p>/objects/thumbs/transparencia_011_th.jpg</text:p>
          </table:table-cell>
          <table:table-cell table:number-columns-repeated="2"/>
          <table:table-cell office:value-type="string" calcext:value-type="string">
            <text:p>Placa de vidrio de autocromo (Lumière Autochrome)</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2</text:p>
          </table:table-cell>
          <table:table-cell office:value-type="string" calcext:value-type="string">
            <text:p>Paisaje tropical</text:p>
          </table:table-cell>
          <table:table-cell office:value-type="float" office:value="1890" calcext:value-type="float">
            <text:p>1890</text:p>
          </table:table-cell>
          <table:table-cell/>
          <table:table-cell office:value-type="string" calcext:value-type="string">
            <text:p>Anónimo (Círculo de fotógrafos del Tropenmuseum)</text:p>
          </table:table-cell>
          <table:table-cell/>
          <table:table-cell office:value-type="string" calcext:value-type="string">
            <text:p>Negativo fotográfico sobre placa de vidrio que muestra un paisaje de palmeras cocoteras (Cocos nucifera) en las antiguas Indias Orientales Neerlandesas. La imagen captura la densa vegetación tropical típica de las expediciones botánicas y etnográficas de finales del siglo XIX, reflejando el interés colonial por documentar los recursos naturales y la geografía de la región de Java o Sumatra.</text:p>
          </table:table-cell>
          <table:table-cell/>
          <table:table-cell office:value-type="string" calcext:value-type="string">
            <text:p>Paisaje tropical; Placa de vidrio; Indias Orientales Neerlandesas</text:p>
          </table:table-cell>
          <table:table-cell office:value-type="string" calcext:value-type="string">
            <text:p>Isla de Java, Indonesia</text:p>
          </table:table-cell>
          <table:table-cell office:value-type="float" office:value="-7.2575" calcext:value-type="float">
            <text:p>-7.2575</text:p>
          </table:table-cell>
          <table:table-cell office:value-type="float" office:value="112.7521" calcext:value-type="float">
            <text:p>112.75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2.jpg</text:p>
          </table:table-cell>
          <table:table-cell office:value-type="string" calcext:value-type="string">
            <text:p>xo4kk</text:p>
          </table:table-cell>
          <table:table-cell office:value-type="string" calcext:value-type="string">
            <text:p>image</text:p>
          </table:table-cell>
          <table:table-cell office:value-type="string" calcext:value-type="string">
            <text:p>/objects/transparencia_012.jpg</text:p>
          </table:table-cell>
          <table:table-cell office:value-type="string" calcext:value-type="string">
            <text:p>/objects/small/transparencia_012_sm.jpg</text:p>
          </table:table-cell>
          <table:table-cell office:value-type="string" calcext:value-type="string">
            <text:p>/objects/thumbs/transparencia_01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3</text:p>
          </table:table-cell>
          <table:table-cell office:value-type="string" calcext:value-type="string">
            <text:p>Palmeras</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Fotografía monocromática que captura un grupo denso de palmeras (Cocos nucifera) bajo un cielo nublado o sobreexpuesto. La imagen presenta un estado avanzado de deterioro físico, caracterizado por el desprendimiento de la emulsión y manchas de oxidación química en los márgenes superior e inferior, lo que sugiere una conservación deficiente en ambientes húmedos y cálidos.</text:p>
          </table:table-cell>
          <table:table-cell/>
          <table:table-cell office:value-type="string" calcext:value-type="string">
            <text:p>Palmeras; Paisaje tropical; Deterioro fotográfico</text:p>
          </table:table-cell>
          <table:table-cell office:value-type="string" calcext:value-type="string">
            <text:p>Región del Caribe o Sureste Mexicano (Yucatán)</text:p>
          </table:table-cell>
          <table:table-cell office:value-type="float" office:value="20.9673" calcext:value-type="float">
            <text:p>20.9673</text:p>
          </table:table-cell>
          <table:table-cell office:value-type="float" office:value="-89.5925" calcext:value-type="float">
            <text:p>-89.59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3.jpg</text:p>
          </table:table-cell>
          <table:table-cell office:value-type="string" calcext:value-type="string">
            <text:p>w5tiox</text:p>
          </table:table-cell>
          <table:table-cell office:value-type="string" calcext:value-type="string">
            <text:p>image</text:p>
          </table:table-cell>
          <table:table-cell office:value-type="string" calcext:value-type="string">
            <text:p>/objects/transparencia_013.jpg</text:p>
          </table:table-cell>
          <table:table-cell office:value-type="string" calcext:value-type="string">
            <text:p>/objects/small/transparencia_013_sm.jpg</text:p>
          </table:table-cell>
          <table:table-cell office:value-type="string" calcext:value-type="string">
            <text:p>/objects/thumbs/transparencia_013_th.jpg</text:p>
          </table:table-cell>
          <table:table-cell table:number-columns-repeated="2"/>
          <table:table-cell office:value-type="string" calcext:value-type="string">
            <text:p>Negativo o impresión sobre soporte flexible</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transparencia_014</text:p>
          </table:table-cell>
          <table:table-cell office:value-type="string" calcext:value-type="string">
            <text:p>Retrato históric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Retrato de un hombre de mediana edad, posiblemente un intelectual o académico español, sentado en un sillón clásico mientras lee un libro. La imagen es una transparencia en color que muestra un avanzado estado de degradación cromática conocido como 'magenta shift', característico de las emulsiones fotográficas de mediados del siglo XX donde los colorantes amarillos y cian se han desvanecido.</text:p>
          </table:table-cell>
          <table:table-cell/>
          <table:table-cell office:value-type="string" calcext:value-type="string">
            <text:p>Retrato histórico; Cultura del siglo XX; Proceso Ektachrome</text:p>
          </table:table-cell>
          <table:table-cell office:value-type="string" calcext:value-type="string">
            <text:p>Madrid, España</text:p>
          </table:table-cell>
          <table:table-cell office:value-type="float" office:value="40.4167" calcext:value-type="float">
            <text:p>40.4167</text:p>
          </table:table-cell>
          <table:table-cell office:value-type="float" office:value="-3.7033" calcext:value-type="float">
            <text:p>-3.70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4.jpg</text:p>
          </table:table-cell>
          <table:table-cell office:value-type="string" calcext:value-type="string">
            <text:p>xp208l</text:p>
          </table:table-cell>
          <table:table-cell office:value-type="string" calcext:value-type="string">
            <text:p>image</text:p>
          </table:table-cell>
          <table:table-cell office:value-type="string" calcext:value-type="string">
            <text:p>/objects/transparencia_014.jpg</text:p>
          </table:table-cell>
          <table:table-cell office:value-type="string" calcext:value-type="string">
            <text:p>/objects/small/transparencia_014_sm.jpg</text:p>
          </table:table-cell>
          <table:table-cell office:value-type="string" calcext:value-type="string">
            <text:p>/objects/thumbs/transparencia_01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15</text:p>
          </table:table-cell>
          <table:table-cell office:value-type="string" calcext:value-type="string">
            <text:p>Mid-century modern</text:p>
          </table:table-cell>
          <table:table-cell office:value-type="float" office:value="1960" calcext:value-type="float">
            <text:p>1960</text:p>
          </table:table-cell>
          <table:table-cell/>
          <table:table-cell office:value-type="string" calcext:value-type="string">
            <text:p>Anónimo (Fotógrafo comercial de Eastman Kodak)</text:p>
          </table:table-cell>
          <table:table-cell/>
          <table:table-cell office:value-type="string" calcext:value-type="string">
            <text:p>Fotografía publicitaria de estudio que presenta un conjunto de mobiliario de salón de estilo 'Mid-century modern'. La composición incluye un sofá de tres plazas y un sillón individual tapizados en material sintético o cuero rojizo, acompañados por una mesa auxiliar con lámpara y dos grabados de temática clásica en la pared. El encuadre y la iluminación son típicos de los catálogos de diseño de interiores estadounidenses de la posguerra.</text:p>
          </table:table-cell>
          <table:table-cell/>
          <table:table-cell office:value-type="string" calcext:value-type="string">
            <text:p>Mid-century modern; Fotografía publicitaria; Diseño de interiores</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5.jpg</text:p>
          </table:table-cell>
          <table:table-cell office:value-type="string" calcext:value-type="string">
            <text:p>fqmmb</text:p>
          </table:table-cell>
          <table:table-cell office:value-type="string" calcext:value-type="string">
            <text:p>image</text:p>
          </table:table-cell>
          <table:table-cell office:value-type="string" calcext:value-type="string">
            <text:p>/objects/transparencia_015.jpg</text:p>
          </table:table-cell>
          <table:table-cell office:value-type="string" calcext:value-type="string">
            <text:p>/objects/small/transparencia_015_sm.jpg</text:p>
          </table:table-cell>
          <table:table-cell office:value-type="string" calcext:value-type="string">
            <text:p>/objects/thumbs/transparencia_01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6</text:p>
          </table:table-cell>
          <table:table-cell office:value-type="string" calcext:value-type="string">
            <text:p>Chaim Weizmann</text:p>
          </table:table-cell>
          <table:table-cell office:value-type="float" office:value="1948" calcext:value-type="float">
            <text:p>1948</text:p>
          </table:table-cell>
          <table:table-cell/>
          <table:table-cell office:value-type="string" calcext:value-type="string">
            <text:p>G. Eric and Edith Matson (Matson Photograph Service)</text:p>
          </table:table-cell>
          <table:table-cell/>
          <table:table-cell office:value-type="string" calcext:value-type="string">
            <text:p>Retrato formal del Dr. Chaim Weizmann, eminente científico y líder sionista que se convirtió en el primer presidente del Estado de Israel en 1949. La imagen lo captura en una pose intelectual clásica, sentado en un sillón y leyendo un libro, probablemente en su biblioteca privada.</text:p>
          </table:table-cell>
          <table:table-cell/>
          <table:table-cell office:value-type="string" calcext:value-type="string">
            <text:p>Chaim Weizmann; Estado de Israel; Transparencia de color</text:p>
          </table:table-cell>
          <table:table-cell office:value-type="string" calcext:value-type="string">
            <text:p>Casa Weizmann, Rehovot, Israel</text:p>
          </table:table-cell>
          <table:table-cell office:value-type="float" office:value="31.9125" calcext:value-type="float">
            <text:p>31.9125</text:p>
          </table:table-cell>
          <table:table-cell office:value-type="float" office:value="34.8058" calcext:value-type="float">
            <text:p>34.80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6.jpg</text:p>
          </table:table-cell>
          <table:table-cell office:value-type="string" calcext:value-type="string">
            <text:p>tpy8r8</text:p>
          </table:table-cell>
          <table:table-cell office:value-type="string" calcext:value-type="string">
            <text:p>image</text:p>
          </table:table-cell>
          <table:table-cell office:value-type="string" calcext:value-type="string">
            <text:p>/objects/transparencia_016.jpg</text:p>
          </table:table-cell>
          <table:table-cell office:value-type="string" calcext:value-type="string">
            <text:p>/objects/small/transparencia_016_sm.jpg</text:p>
          </table:table-cell>
          <table:table-cell office:value-type="string" calcext:value-type="string">
            <text:p>/objects/thumbs/transparencia_01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17</text:p>
          </table:table-cell>
          <table:table-cell office:value-type="string" calcext:value-type="string">
            <text:p>Mobiliario de oficina</text:p>
          </table:table-cell>
          <table:table-cell office:value-type="float" office:value="1945" calcext:value-type="float">
            <text:p>1945</text:p>
          </table:table-cell>
          <table:table-cell/>
          <table:table-cell office:value-type="string" calcext:value-type="string">
            <text:p>Theodore Horydczak</text:p>
          </table:table-cell>
          <table:table-cell/>
          <table:table-cell office:value-type="string" calcext:value-type="string">
            <text:p>Fotografía de estudio de un archivador de tres cajones fabricado en madera noble, probablemente cerezo o caoba, con detalles de ebanistería clásica y herrajes de latón. Sobre el mueble se encuentra un cuadro enmarcado que muestra una escena de caza con perros pointer, característica de la decoración de interiores de oficinas ejecutivas de mediados del siglo XX. La imagen presenta una iluminación controlada típica de la fotografía comercial de catálogo.</text:p>
          </table:table-cell>
          <table:table-cell/>
          <table:table-cell office:value-type="string" calcext:value-type="string">
            <text:p>Mobiliario de oficina; Ebanistería clásica; Fotografía comercial</text:p>
          </table:table-cell>
          <table:table-cell office:value-type="string" calcext:value-type="string">
            <text:p>Washington D.C., Estados Unidos</text:p>
          </table:table-cell>
          <table:table-cell office:value-type="float" office:value="38.8899" calcext:value-type="float">
            <text:p>38.8899</text:p>
          </table:table-cell>
          <table:table-cell office:value-type="float" office:value="-77.0091" calcext:value-type="float">
            <text:p>-77.00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7.jpg</text:p>
          </table:table-cell>
          <table:table-cell office:value-type="string" calcext:value-type="string">
            <text:p>kiwx3g</text:p>
          </table:table-cell>
          <table:table-cell office:value-type="string" calcext:value-type="string">
            <text:p>image</text:p>
          </table:table-cell>
          <table:table-cell office:value-type="string" calcext:value-type="string">
            <text:p>/objects/transparencia_017.jpg</text:p>
          </table:table-cell>
          <table:table-cell office:value-type="string" calcext:value-type="string">
            <text:p>/objects/small/transparencia_017_sm.jpg</text:p>
          </table:table-cell>
          <table:table-cell office:value-type="string" calcext:value-type="string">
            <text:p>/objects/thumbs/transparencia_017_th.jpg</text:p>
          </table:table-cell>
          <table:table-cell table:number-columns-repeated="2"/>
          <table:table-cell office:value-type="string" calcext:value-type="string">
            <text:p>Placa de película de seguridad (Safety Film) de color</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8</text:p>
          </table:table-cell>
          <table:table-cell office:value-type="string" calcext:value-type="string">
            <text:p>Mobiliario de oficina</text:p>
          </table:table-cell>
          <table:table-cell office:value-type="float" office:value="1960" calcext:value-type="float">
            <text:p>1960</text:p>
          </table:table-cell>
          <table:table-cell/>
          <table:table-cell office:value-type="string" calcext:value-type="string">
            <text:p>Charles y Ray Eames (Eames Office)</text:p>
          </table:table-cell>
          <table:table-cell/>
          <table:table-cell office:value-type="string" calcext:value-type="string">
            <text:p>Fotografía a color de formato grande que retrata un sillón de oficina ejecutivo de cuero oscuro con acabado capitoné (tufted), dispuesto sobre el césped en un entorno de jardín. La imagen es una toma de documentación de producto o mobiliario, capturada bajo luz natural, característica del estilo de registro visual de la oficina de diseño de Charles y Ray Eames.</text:p>
          </table:table-cell>
          <table:table-cell/>
          <table:table-cell office:value-type="string" calcext:value-type="string">
            <text:p>Mobiliario de oficina; Ektachrome; Diseño industrial</text:p>
          </table:table-cell>
          <table:table-cell office:value-type="string" calcext:value-type="string">
            <text:p>Eames House, Pacific Palisades, California, Estados Unidos.</text:p>
          </table:table-cell>
          <table:table-cell office:value-type="float" office:value="34.0298" calcext:value-type="float">
            <text:p>34.0298</text:p>
          </table:table-cell>
          <table:table-cell office:value-type="float" office:value="-118.5196" calcext:value-type="float">
            <text:p>-118.519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8.jpg</text:p>
          </table:table-cell>
          <table:table-cell office:value-type="string" calcext:value-type="string">
            <text:p>aqtka</text:p>
          </table:table-cell>
          <table:table-cell office:value-type="string" calcext:value-type="string">
            <text:p>image</text:p>
          </table:table-cell>
          <table:table-cell office:value-type="string" calcext:value-type="string">
            <text:p>/objects/transparencia_018.jpg</text:p>
          </table:table-cell>
          <table:table-cell office:value-type="string" calcext:value-type="string">
            <text:p>/objects/small/transparencia_018_sm.jpg</text:p>
          </table:table-cell>
          <table:table-cell office:value-type="string" calcext:value-type="string">
            <text:p>/objects/thumbs/transparencia_01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9</text:p>
          </table:table-cell>
          <table:table-cell office:value-type="string" calcext:value-type="string">
            <text:p>Retrato</text:p>
          </table:table-cell>
          <table:table-cell office:value-type="float" office:value="1950" calcext:value-type="float">
            <text:p>1950</text:p>
          </table:table-cell>
          <table:table-cell/>
          <table:table-cell office:value-type="string" calcext:value-type="string">
            <text:p>Nacho López</text:p>
          </table:table-cell>
          <table:table-cell/>
          <table:table-cell office:value-type="string" calcext:value-type="string">
            <text:p>Un retrato de estudio o interior de una joven con una trenza característica y un vestido estampado, iluminada lateralmente por luz natural. La imagen presenta una marcada dominante cromática rojiza debido al deterioro químico de las capas de color de la película original a lo largo del tiempo.</text:p>
          </table:table-cell>
          <table:table-cell/>
          <table:table-cell office:value-type="string" calcext:value-type="string">
            <text:p>Retrato; México; Años 195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9.JPG</text:p>
          </table:table-cell>
          <table:table-cell office:value-type="string" calcext:value-type="string">
            <text:p>evm0k</text:p>
          </table:table-cell>
          <table:table-cell office:value-type="string" calcext:value-type="string">
            <text:p>image</text:p>
          </table:table-cell>
          <table:table-cell office:value-type="string" calcext:value-type="string">
            <text:p>/objects/transparencia_019.JPG</text:p>
          </table:table-cell>
          <table:table-cell office:value-type="string" calcext:value-type="string">
            <text:p>/objects/small/transparencia_019_sm.jpg</text:p>
          </table:table-cell>
          <table:table-cell office:value-type="string" calcext:value-type="string">
            <text:p>/objects/thumbs/transparencia_01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transparencia_020</text:p>
          </table:table-cell>
          <table:table-cell office:value-type="string" calcext:value-type="string">
            <text:p>Retrato femenin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Retrato formal de estudio de una mujer madura que posa con un vestido oscuro de media manga, posiblemente de terciopelo o seda pesada, complementado con un collar de perlas y un abanico plegable en su mano derecha. La fotografía muestra una degradación cromática severa hacia tonos magentas, característica del envejecimiento de las películas de color de mediados del siglo XX.</text:p>
          </table:table-cell>
          <table:table-cell/>
          <table:table-cell office:value-type="string" calcext:value-type="string">
            <text:p>Retrato femenino; Moda años 50; Degradación cromátic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0.JPG</text:p>
          </table:table-cell>
          <table:table-cell office:value-type="string" calcext:value-type="string">
            <text:p>6l41zl</text:p>
          </table:table-cell>
          <table:table-cell office:value-type="string" calcext:value-type="string">
            <text:p>image</text:p>
          </table:table-cell>
          <table:table-cell office:value-type="string" calcext:value-type="string">
            <text:p>/objects/transparencia_020.JPG</text:p>
          </table:table-cell>
          <table:table-cell office:value-type="string" calcext:value-type="string">
            <text:p>/objects/small/transparencia_020_sm.jpg</text:p>
          </table:table-cell>
          <table:table-cell office:value-type="string" calcext:value-type="string">
            <text:p>/objects/thumbs/transparencia_02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1</text:p>
          </table:table-cell>
          <table:table-cell office:value-type="string" calcext:value-type="string">
            <text:p>Mobiliario de lujo</text:p>
          </table:table-cell>
          <table:table-cell office:value-type="float" office:value="1946" calcext:value-type="float">
            <text:p>1946</text:p>
          </table:table-cell>
          <table:table-cell/>
          <table:table-cell office:value-type="string" calcext:value-type="string">
            <text:p>Gottscho-Schleisner</text:p>
          </table:table-cell>
          <table:table-cell/>
          <table:table-cell office:value-type="string" calcext:value-type="string">
            <text:p>Estudio fotográfico de una silla de estilo Neoclásico con influencias del diseño Klismos, tapizada en cuero rojo intenso con remaches de latón y regatones metálicos. La imagen forma parte de un registro comercial de mobiliario de alta gama para catálogos de diseño de interiores o decoración de residencias de lujo de la época.</text:p>
          </table:table-cell>
          <table:table-cell/>
          <table:table-cell office:value-type="string" calcext:value-type="string">
            <text:p>Mobiliario de lujo; Estilo Klismos; Diseño de Interiores</text:p>
          </table:table-cell>
          <table:table-cell office:value-type="string" calcext:value-type="string">
            <text:p>Nueva York, Estados Unidos</text:p>
          </table:table-cell>
          <table:table-cell office:value-type="float" office:value="40.7484" calcext:value-type="float">
            <text:p>40.7484</text:p>
          </table:table-cell>
          <table:table-cell office:value-type="float" office:value="-73.9857" calcext:value-type="float">
            <text:p>-73.985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1.jpg</text:p>
          </table:table-cell>
          <table:table-cell office:value-type="string" calcext:value-type="string">
            <text:p>1r6w2t</text:p>
          </table:table-cell>
          <table:table-cell office:value-type="string" calcext:value-type="string">
            <text:p>image</text:p>
          </table:table-cell>
          <table:table-cell office:value-type="string" calcext:value-type="string">
            <text:p>/objects/transparencia_021.jpg</text:p>
          </table:table-cell>
          <table:table-cell office:value-type="string" calcext:value-type="string">
            <text:p>/objects/small/transparencia_021_sm.jpg</text:p>
          </table:table-cell>
          <table:table-cell office:value-type="string" calcext:value-type="string">
            <text:p>/objects/thumbs/transparencia_0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2</text:p>
          </table:table-cell>
          <table:table-cell office:value-type="string" calcext:value-type="string">
            <text:p>Retrato</text:p>
          </table:table-cell>
          <table:table-cell office:value-type="float" office:value="1955" calcext:value-type="float">
            <text:p>1955</text:p>
          </table:table-cell>
          <table:table-cell/>
          <table:table-cell office:value-type="string" calcext:value-type="string">
            <text:p>Charles 'Teenie' Harris</text:p>
          </table:table-cell>
          <table:table-cell/>
          <table:table-cell office:value-type="string" calcext:value-type="string">
            <text:p>Retrato en color de una joven, identificada en los archivos del Carnegie Museum of Art como una de las modelos capturadas por el fotógrafo Charles 'Teenie' Harris en Pittsburgh. La imagen destaca por su enfoque íntimo y el uso de color a mediados del siglo XX, documentando la vida social y la moda de la comunidad afroamericana en el barrio de Hill District.</text:p>
          </table:table-cell>
          <table:table-cell/>
          <table:table-cell office:value-type="string" calcext:value-type="string">
            <text:p>Retrato; Hill District; Comunidad Afroamericana</text:p>
          </table:table-cell>
          <table:table-cell office:value-type="string" calcext:value-type="string">
            <text:p>Pittsburgh, Pennsylvania, Estados Unidos</text:p>
          </table:table-cell>
          <table:table-cell office:value-type="float" office:value="40.4406" calcext:value-type="float">
            <text:p>40.4406</text:p>
          </table:table-cell>
          <table:table-cell office:value-type="float" office:value="-79.9959" calcext:value-type="float">
            <text:p>-79.99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2.jpg</text:p>
          </table:table-cell>
          <table:table-cell office:value-type="string" calcext:value-type="string">
            <text:p>6rk5sc</text:p>
          </table:table-cell>
          <table:table-cell office:value-type="string" calcext:value-type="string">
            <text:p>image</text:p>
          </table:table-cell>
          <table:table-cell office:value-type="string" calcext:value-type="string">
            <text:p>/objects/transparencia_022.jpg</text:p>
          </table:table-cell>
          <table:table-cell office:value-type="string" calcext:value-type="string">
            <text:p>/objects/small/transparencia_022_sm.jpg</text:p>
          </table:table-cell>
          <table:table-cell office:value-type="string" calcext:value-type="string">
            <text:p>/objects/thumbs/transparencia_0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3</text:p>
          </table:table-cell>
          <table:table-cell office:value-type="string" calcext:value-type="string">
            <text:p>Turismo costero</text:p>
          </table:table-cell>
          <table:table-cell office:value-type="float" office:value="1958" calcext:value-type="float">
            <text:p>1958</text:p>
          </table:table-cell>
          <table:table-cell/>
          <table:table-cell office:value-type="string" calcext:value-type="string">
            <text:p>Anónimo</text:p>
          </table:table-cell>
          <table:table-cell/>
          <table:table-cell office:value-type="string" calcext:value-type="string">
            <text:p>Retrato familiar capturado en el litoral central de Venezuela, específicamente en la zona de Macuto o Caraballeda, mostrando el auge del turismo costero y la estética de la clase media durante la transición hacia la democracia a finales de la década de 1950.</text:p>
          </table:table-cell>
          <table:table-cell/>
          <table:table-cell office:value-type="string" calcext:value-type="string">
            <text:p>Turismo costero; Venezuela años 50; Moda de baño retro</text:p>
          </table:table-cell>
          <table:table-cell office:value-type="string" calcext:value-type="string">
            <text:p>Macuto, Estado La Guaira, Venezuela</text:p>
          </table:table-cell>
          <table:table-cell office:value-type="float" office:value="10.6136" calcext:value-type="float">
            <text:p>10.6136</text:p>
          </table:table-cell>
          <table:table-cell office:value-type="float" office:value="-66.8856" calcext:value-type="float">
            <text:p>-66.885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3.jpg</text:p>
          </table:table-cell>
          <table:table-cell office:value-type="string" calcext:value-type="string">
            <text:p>4mlqll</text:p>
          </table:table-cell>
          <table:table-cell office:value-type="string" calcext:value-type="string">
            <text:p>image</text:p>
          </table:table-cell>
          <table:table-cell office:value-type="string" calcext:value-type="string">
            <text:p>/objects/transparencia_023.jpg</text:p>
          </table:table-cell>
          <table:table-cell office:value-type="string" calcext:value-type="string">
            <text:p>/objects/small/transparencia_023_sm.jpg</text:p>
          </table:table-cell>
          <table:table-cell office:value-type="string" calcext:value-type="string">
            <text:p>/objects/thumbs/transparencia_02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4</text:p>
          </table:table-cell>
          <table:table-cell office:value-type="string" calcext:value-type="string">
            <text:p>Turismo de masas</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Escena estival en la playa de Westerland, en la isla de Sylt (Alemania), que captura el auge del turismo de masas a finales de los años 60. En el fondo destaca el edificio 'Appartementhaus Metropol', un exponente de la arquitectura modernista de centros vacacionales finalizado en 1967. En primer plano se observan bañistas descansando junto a los tradicionales 'Strandkörbe' (sillones de mimbre techados), característicos de las costas del Mar del Norte.</text:p>
          </table:table-cell>
          <table:table-cell/>
          <table:table-cell office:value-type="string" calcext:value-type="string">
            <text:p>Turismo de masas; Arquitectura modernista; Strandkorb</text:p>
          </table:table-cell>
          <table:table-cell office:value-type="string" calcext:value-type="string">
            <text:p>Playa de Westerland (Brandenburger Strand), Isla de Sylt, Alemania</text:p>
          </table:table-cell>
          <table:table-cell office:value-type="float" office:value="54.9083" calcext:value-type="float">
            <text:p>54.9083</text:p>
          </table:table-cell>
          <table:table-cell office:value-type="float" office:value="8.2986" calcext:value-type="float">
            <text:p>8.29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4.jpg</text:p>
          </table:table-cell>
          <table:table-cell office:value-type="string" calcext:value-type="string">
            <text:p>9jj4nt</text:p>
          </table:table-cell>
          <table:table-cell office:value-type="string" calcext:value-type="string">
            <text:p>image</text:p>
          </table:table-cell>
          <table:table-cell office:value-type="string" calcext:value-type="string">
            <text:p>/objects/transparencia_024.jpg</text:p>
          </table:table-cell>
          <table:table-cell office:value-type="string" calcext:value-type="string">
            <text:p>/objects/small/transparencia_024_sm.jpg</text:p>
          </table:table-cell>
          <table:table-cell office:value-type="string" calcext:value-type="string">
            <text:p>/objects/thumbs/transparencia_024_th.jpg</text:p>
          </table:table-cell>
          <table:table-cell table:number-columns-repeated="2"/>
          <table:table-cell office:value-type="string" calcext:value-type="string">
            <text:p>Fotografía en color de formato medio (6x6 c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5</text:p>
          </table:table-cell>
          <table:table-cell office:value-type="string" calcext:value-type="string">
            <text:p>Tianguis</text:p>
          </table:table-cell>
          <table:table-cell office:value-type="float" office:value="1910" calcext:value-type="float">
            <text:p>1910</text:p>
          </table:table-cell>
          <table:table-cell/>
          <table:table-cell office:value-type="string" calcext:value-type="string">
            <text:p>Gabriel Garduño</text:p>
          </table:table-cell>
          <table:table-cell/>
          <table:table-cell office:value-type="string" calcext:value-type="string">
            <text:p>Fotografía histórica que captura un mercado tradicional o tianguis frente a la Parroquia de la Asunción en Amecameca, Estado de México. La escena muestra una gran concurrencia de personas vestidas con ropa tradicional de manta y sombreros de ala ancha, bajo puestos improvisados con lonas blancas, reflejando la vida cotidiana rural y el comercio local a principios del siglo XX.</text:p>
          </table:table-cell>
          <table:table-cell/>
          <table:table-cell office:value-type="string" calcext:value-type="string">
            <text:p>Tianguis; Porfiriato; Arquitectura Colonial</text:p>
          </table:table-cell>
          <table:table-cell office:value-type="string" calcext:value-type="string">
            <text:p>Amecameca de Juárez, Estado de México</text:p>
          </table:table-cell>
          <table:table-cell office:value-type="float" office:value="19.1212" calcext:value-type="float">
            <text:p>19.1212</text:p>
          </table:table-cell>
          <table:table-cell office:value-type="float" office:value="-98.7618" calcext:value-type="float">
            <text:p>-98.761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5.jpg</text:p>
          </table:table-cell>
          <table:table-cell office:value-type="string" calcext:value-type="string">
            <text:p>mh7j5r</text:p>
          </table:table-cell>
          <table:table-cell office:value-type="string" calcext:value-type="string">
            <text:p>image</text:p>
          </table:table-cell>
          <table:table-cell office:value-type="string" calcext:value-type="string">
            <text:p>/objects/transparencia_025.jpg</text:p>
          </table:table-cell>
          <table:table-cell office:value-type="string" calcext:value-type="string">
            <text:p>/objects/small/transparencia_025_sm.jpg</text:p>
          </table:table-cell>
          <table:table-cell office:value-type="string" calcext:value-type="string">
            <text:p>/objects/thumbs/transparencia_02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Negativo</text:p>
          </table:table-cell>
        </table:table-row>
        <table:table-row table:style-name="ro1">
          <table:table-cell office:value-type="string" calcext:value-type="string">
            <text:p>transparencia_026</text:p>
          </table:table-cell>
          <table:table-cell office:value-type="string" calcext:value-type="string">
            <text:p>Lienzo de Tlaxcala</text:p>
          </table:table-cell>
          <table:table-cell office:value-type="float" office:value="1550" calcext:value-type="float">
            <text:p>1550</text:p>
          </table:table-cell>
          <table:table-cell/>
          <table:table-cell office:value-type="string" calcext:value-type="string">
            <text:p>Fotógrafo del Archivo de la Biblioteca Nacional de Antropología e Historia (BNAH)</text:p>
          </table:table-cell>
          <table:table-cell/>
          <table:table-cell office:value-type="string" calcext:value-type="string">
            <text:p>Fotografía de archivo de un fragmento del Lienzo de Tlaxcala, un códice colonial que documenta la participación de los tlaxcaltecas en la conquista de Mesoamérica junto a los españoles. La imagen muestra cuatro paneles (marcados H, G, O, N) con escenas de batallas en regiones identificadas por glifos y topónimos como Quauhtemalan (Guatemala), Ytzquintepec (Escuintla), Quechulan y Acatepec.</text:p>
          </table:table-cell>
          <table:table-cell/>
          <table:table-cell office:value-type="string" calcext:value-type="string">
            <text:p>Lienzo de Tlaxcala; Conquista de México; Códice colonial</text:p>
          </table:table-cell>
          <table:table-cell office:value-type="string" calcext:value-type="string">
            <text:p>Tlaxcala, México</text:p>
          </table:table-cell>
          <table:table-cell office:value-type="float" office:value="19.313333" calcext:value-type="float">
            <text:p>19.313333</text:p>
          </table:table-cell>
          <table:table-cell office:value-type="float" office:value="-98.24" calcext:value-type="float">
            <text:p>-98.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6.jpg</text:p>
          </table:table-cell>
          <table:table-cell office:value-type="string" calcext:value-type="string">
            <text:p>hhvxog</text:p>
          </table:table-cell>
          <table:table-cell office:value-type="string" calcext:value-type="string">
            <text:p>image</text:p>
          </table:table-cell>
          <table:table-cell office:value-type="string" calcext:value-type="string">
            <text:p>/objects/transparencia_026.jpg</text:p>
          </table:table-cell>
          <table:table-cell office:value-type="string" calcext:value-type="string">
            <text:p>/objects/small/transparencia_026_sm.jpg</text:p>
          </table:table-cell>
          <table:table-cell office:value-type="string" calcext:value-type="string">
            <text:p>/objects/thumbs/transparencia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7</text:p>
          </table:table-cell>
          <table:table-cell office:value-type="string" calcext:value-type="string">
            <text:p>Mobiliario Mid-Century Modern</text:p>
          </table:table-cell>
          <table:table-cell office:value-type="float" office:value="1955" calcext:value-type="float">
            <text:p>1955</text:p>
          </table:table-cell>
          <table:table-cell/>
          <table:table-cell office:value-type="string" calcext:value-type="string">
            <text:p>Anónimo / Estudio de fotografía comercial (posiblemente Gottscho-Schleisner)</text:p>
          </table:table-cell>
          <table:table-cell/>
          <table:table-cell office:value-type="string" calcext:value-type="string">
            <text:p>Fotografía publicitaria de estudio que muestra un conjunto de sala de estar de estilo Mid-Century Modern. La composición incluye un sofá de tres plazas y un sillón individual tapizados en cuero de color rojo o burdeos, situados sobre una alfombra de diseño oriental con un medallón central. La decoración se completa con una mesa auxiliar de madera que sostiene una lámpara con pantalla negra y bordes dorados, y dos grabados enmarcados en la pared que representan barcos de vapor del siglo XIX, probablemente inspirados en la estética de Currier &amp; Ives.</text:p>
          </table:table-cell>
          <table:table-cell/>
          <table:table-cell office:value-type="string" calcext:value-type="string">
            <text:p>Mobiliario Mid-Century Modern; Fotografía comercial de catálogo; Diseño de interiores estadounidense</text:p>
          </table:table-cell>
          <table:table-cell office:value-type="string" calcext:value-type="string">
            <text:p>Estados Unidos, probablemente High Point, Carolina del Norte</text:p>
          </table:table-cell>
          <table:table-cell office:value-type="float" office:value="35.9556" calcext:value-type="float">
            <text:p>35.9556</text:p>
          </table:table-cell>
          <table:table-cell office:value-type="float" office:value="-80.0053" calcext:value-type="float">
            <text:p>-80.00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7.jpg</text:p>
          </table:table-cell>
          <table:table-cell office:value-type="string" calcext:value-type="string">
            <text:p>9i21x1</text:p>
          </table:table-cell>
          <table:table-cell office:value-type="string" calcext:value-type="string">
            <text:p>image</text:p>
          </table:table-cell>
          <table:table-cell office:value-type="string" calcext:value-type="string">
            <text:p>/objects/transparencia_027.jpg</text:p>
          </table:table-cell>
          <table:table-cell office:value-type="string" calcext:value-type="string">
            <text:p>/objects/small/transparencia_027_sm.jpg</text:p>
          </table:table-cell>
          <table:table-cell office:value-type="string" calcext:value-type="string">
            <text:p>/objects/thumbs/transparencia_02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8</text:p>
          </table:table-cell>
          <table:table-cell office:value-type="string" calcext:value-type="string">
            <text:p>Glamour</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Retrato de estudio en formato de transparencia a color de una modelo o actriz en pose de glamour, característico de la estética de las revistas de entretenimiento para adultos y el cine de explotación de mediados de los años 70. La imagen muestra a una mujer joven con un peinado y maquillaje (cejas finas y arqueadas, sombras marcadas) típicos de la década, posando frente a un fondo monocromático ocre.</text:p>
          </table:table-cell>
          <table:table-cell/>
          <table:table-cell office:value-type="string" calcext:value-type="string">
            <text:p>Glamour; Transparencia; Erotism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8.jpg</text:p>
          </table:table-cell>
          <table:table-cell office:value-type="string" calcext:value-type="string">
            <text:p>r92j1h</text:p>
          </table:table-cell>
          <table:table-cell office:value-type="string" calcext:value-type="string">
            <text:p>image</text:p>
          </table:table-cell>
          <table:table-cell office:value-type="string" calcext:value-type="string">
            <text:p>/objects/transparencia_028.jpg</text:p>
          </table:table-cell>
          <table:table-cell office:value-type="string" calcext:value-type="string">
            <text:p>/objects/small/transparencia_028_sm.jpg</text:p>
          </table:table-cell>
          <table:table-cell office:value-type="string" calcext:value-type="string">
            <text:p>/objects/thumbs/transparencia_028_th.jpg</text:p>
          </table:table-cell>
          <table:table-cell table:number-columns-repeated="2"/>
          <table:table-cell office:value-type="string" calcext:value-type="string">
            <text:p>Se trata de una transparencia a color (diapositiva) montad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9</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Anónimo (Fotógrafo aficionado)</text:p>
          </table:table-cell>
          <table:table-cell/>
          <table:table-cell office:value-type="string" calcext:value-type="string">
            <text:p>Fotografía estereoscópica en color que captura a dos niñas pequeñas, posiblemente gemelas, sentadas en un sillón doméstico. Visten trajes blancos clásicos de mediados de siglo y juegan con bloques de madera. La imagen está montada en un soporte metálico especializado para visión en 3D.</text:p>
          </table:table-cell>
          <table:table-cell/>
          <table:table-cell office:value-type="string" calcext:value-type="string">
            <text:p>Estereoscopía; Vida cotidiana; Kodachrome</text:p>
          </table:table-cell>
          <table:table-cell office:value-type="string" calcext:value-type="string">
            <text:p>Estados Unidos (Probablemente entorno doméstico suburbano)</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9.jpg</text:p>
          </table:table-cell>
          <table:table-cell office:value-type="string" calcext:value-type="string">
            <text:p>nii15w</text:p>
          </table:table-cell>
          <table:table-cell office:value-type="string" calcext:value-type="string">
            <text:p>image</text:p>
          </table:table-cell>
          <table:table-cell office:value-type="string" calcext:value-type="string">
            <text:p>/objects/transparencia_029.jpg</text:p>
          </table:table-cell>
          <table:table-cell office:value-type="string" calcext:value-type="string">
            <text:p>/objects/small/transparencia_029_sm.jpg</text:p>
          </table:table-cell>
          <table:table-cell office:value-type="string" calcext:value-type="string">
            <text:p>/objects/thumbs/transparencia_029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0</text:p>
          </table:table-cell>
          <table:table-cell office:value-type="string" calcext:value-type="string">
            <text:p>Celebración familiar</text:p>
          </table:table-cell>
          <table:table-cell office:value-type="float" office:value="1964" calcext:value-type="float">
            <text:p>1964</text:p>
          </table:table-cell>
          <table:table-cell/>
          <table:table-cell office:value-type="string" calcext:value-type="string">
            <text:p>Anónimo</text:p>
          </table:table-cell>
          <table:table-cell/>
          <table:table-cell office:value-type="string" calcext:value-type="string">
            <text:p>Una escena doméstica privada que captura a tres niñas celebrando un cumpleaños o evento familiar especial frente a un gran pastel decorado. La imagen muestra la estética de la clase media de mediados del siglo XX, con las niñas vestidas con atuendos formales de fiesta en un entorno interior típicamente hogareño.</text:p>
          </table:table-cell>
          <table:table-cell/>
          <table:table-cell office:value-type="string" calcext:value-type="string">
            <text:p>Celebración familiar; Moda infantil años 60; Diapositiva de color</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0.jpg</text:p>
          </table:table-cell>
          <table:table-cell office:value-type="string" calcext:value-type="string">
            <text:p>h0fex</text:p>
          </table:table-cell>
          <table:table-cell office:value-type="string" calcext:value-type="string">
            <text:p>image</text:p>
          </table:table-cell>
          <table:table-cell office:value-type="string" calcext:value-type="string">
            <text:p>/objects/transparencia_030.jpg</text:p>
          </table:table-cell>
          <table:table-cell office:value-type="string" calcext:value-type="string">
            <text:p>/objects/small/transparencia_030_sm.jpg</text:p>
          </table:table-cell>
          <table:table-cell office:value-type="string" calcext:value-type="string">
            <text:p>/objects/thumbs/transparencia_03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1</text:p>
          </table:table-cell>
          <table:table-cell office:value-type="string" calcext:value-type="string">
            <text:p>Vida familiar</text:p>
          </table:table-cell>
          <table:table-cell office:value-type="float" office:value="1962" calcext:value-type="float">
            <text:p>1962</text:p>
          </table:table-cell>
          <table:table-cell/>
          <table:table-cell office:value-type="string" calcext:value-type="string">
            <text:p>Anónimo</text:p>
          </table:table-cell>
          <table:table-cell/>
          <table:table-cell office:value-type="string" calcext:value-type="string">
            <text:p>Retrato familiar de carácter doméstico que muestra a una mujer joven sentada en un jardín junto a dos niños pequeños, probablemente hermanos. La escena captura la estética de la vida suburbana de clase media durante la posguerra, destacando un entorno privado con vegetación cuidada y arquitectura funcionalista característica de la reconstrucción europea.</text:p>
          </table:table-cell>
          <table:table-cell/>
          <table:table-cell office:value-type="string" calcext:value-type="string">
            <text:p>Vida familiar; Agfacolor; Retrato de posguerra</text:p>
          </table:table-cell>
          <table:table-cell office:value-type="string" calcext:value-type="string">
            <text:p>Alemania Occidental (posiblemente Leverkusen o región del Rin)</text:p>
          </table:table-cell>
          <table:table-cell office:value-type="float" office:value="51.0303" calcext:value-type="float">
            <text:p>51.0303</text:p>
          </table:table-cell>
          <table:table-cell office:value-type="float" office:value="7.0041" calcext:value-type="float">
            <text:p>7.004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1.jpg</text:p>
          </table:table-cell>
          <table:table-cell office:value-type="string" calcext:value-type="string">
            <text:p>66l26e</text:p>
          </table:table-cell>
          <table:table-cell office:value-type="string" calcext:value-type="string">
            <text:p>image</text:p>
          </table:table-cell>
          <table:table-cell office:value-type="string" calcext:value-type="string">
            <text:p>/objects/transparencia_031.jpg</text:p>
          </table:table-cell>
          <table:table-cell office:value-type="string" calcext:value-type="string">
            <text:p>/objects/small/transparencia_031_sm.jpg</text:p>
          </table:table-cell>
          <table:table-cell office:value-type="string" calcext:value-type="string">
            <text:p>/objects/thumbs/transparencia_03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2</text:p>
          </table:table-cell>
          <table:table-cell office:value-type="string" calcext:value-type="string">
            <text:p>Quinceañera</text:p>
          </table:table-cell>
          <table:table-cell office:value-type="float" office:value="1955" calcext:value-type="float">
            <text:p>1955</text:p>
          </table:table-cell>
          <table:table-cell/>
          <table:table-cell office:value-type="string" calcext:value-type="string">
            <text:p>Estudio Fotos Sociales</text:p>
          </table:table-cell>
          <table:table-cell/>
          <table:table-cell office:value-type="string" calcext:value-type="string">
            <text:p>Fotografía estereoscópica en color que muestra a una joven con un vestido de gala blanco, posiblemente una Quinceañera, caminando por el pasillo central de una iglesia en la Ciudad de México, acompañada por un hombre en traje formal.</text:p>
          </table:table-cell>
          <table:table-cell/>
          <table:table-cell office:value-type="string" calcext:value-type="string">
            <text:p>Quinceañera; Estereoscopía; México Moderno</text:p>
          </table:table-cell>
          <table:table-cell office:value-type="string" calcext:value-type="string">
            <text:p>Luis Moya 112, Colonia Centro, Ciudad de México</text:p>
          </table:table-cell>
          <table:table-cell office:value-type="float" office:value="19.4316" calcext:value-type="float">
            <text:p>19.4316</text:p>
          </table:table-cell>
          <table:table-cell office:value-type="float" office:value="-99.1436" calcext:value-type="float">
            <text:p>-99.143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2.jpg</text:p>
          </table:table-cell>
          <table:table-cell office:value-type="string" calcext:value-type="string">
            <text:p>nu25h</text:p>
          </table:table-cell>
          <table:table-cell office:value-type="string" calcext:value-type="string">
            <text:p>image</text:p>
          </table:table-cell>
          <table:table-cell office:value-type="string" calcext:value-type="string">
            <text:p>/objects/transparencia_032.jpg</text:p>
          </table:table-cell>
          <table:table-cell office:value-type="string" calcext:value-type="string">
            <text:p>/objects/small/transparencia_032_sm.jpg</text:p>
          </table:table-cell>
          <table:table-cell office:value-type="string" calcext:value-type="string">
            <text:p>/objects/thumbs/transparencia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3</text:p>
          </table:table-cell>
          <table:table-cell office:value-type="string" calcext:value-type="string">
            <text:p>Celebración infantil</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Fotografía vernácula a color que captura una celebración infantil, probablemente un cumpleaños, en el interior de una vivienda de clase media. Un grupo de niños rodea una mesa con un pastel de varios niveles decorado con glaseado blanco. La imagen muestra una notable degradación cromática hacia tonos magentas y rojos, característica del envejecimiento químico de ciertas películas de transparencia de mediados del siglo XX.</text:p>
          </table:table-cell>
          <table:table-cell/>
          <table:table-cell office:value-type="string" calcext:value-type="string">
            <text:p>Celebración infantil; Fotografía vernácula; México años 6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3.jpg</text:p>
          </table:table-cell>
          <table:table-cell office:value-type="string" calcext:value-type="string">
            <text:p>gha874</text:p>
          </table:table-cell>
          <table:table-cell office:value-type="string" calcext:value-type="string">
            <text:p>image</text:p>
          </table:table-cell>
          <table:table-cell office:value-type="string" calcext:value-type="string">
            <text:p>/objects/transparencia_033.jpg</text:p>
          </table:table-cell>
          <table:table-cell office:value-type="string" calcext:value-type="string">
            <text:p>/objects/small/transparencia_033_sm.jpg</text:p>
          </table:table-cell>
          <table:table-cell office:value-type="string" calcext:value-type="string">
            <text:p>/objects/thumbs/transparencia_03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4</text:p>
          </table:table-cell>
          <table:table-cell office:value-type="string" calcext:value-type="string">
            <text:p>Música mexican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diapositiva estereoscópica a color que captura a un director de orquesta de espaldas dirigiendo a una agrupación musical en un espacio abierto en México. Los músicos en primer plano tocan instrumentos de viento madera (clarinetes y saxofones) vistiendo trajes oscuros, mientras que al fondo se observan integrantes con sombreros de charro, lo que sugiere una banda sinfónica o militar interpretando música tradicional mexicana.</text:p>
          </table:table-cell>
          <table:table-cell/>
          <table:table-cell office:value-type="string" calcext:value-type="string">
            <text:p>Música mexicana; Fotografía estereoscópica; Banda de alientos</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4.jpg</text:p>
          </table:table-cell>
          <table:table-cell office:value-type="string" calcext:value-type="string">
            <text:p>cfuepb</text:p>
          </table:table-cell>
          <table:table-cell office:value-type="string" calcext:value-type="string">
            <text:p>image</text:p>
          </table:table-cell>
          <table:table-cell office:value-type="string" calcext:value-type="string">
            <text:p>/objects/transparencia_034.jpg</text:p>
          </table:table-cell>
          <table:table-cell office:value-type="string" calcext:value-type="string">
            <text:p>/objects/small/transparencia_034_sm.jpg</text:p>
          </table:table-cell>
          <table:table-cell office:value-type="string" calcext:value-type="string">
            <text:p>/objects/thumbs/transparencia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5</text:p>
          </table:table-cell>
          <table:table-cell office:value-type="string" calcext:value-type="string">
            <text:p>Claudia Conti</text:p>
          </table:table-cell>
          <table:table-cell office:value-type="float" office:value="1974" calcext:value-type="float">
            <text:p>1974</text:p>
          </table:table-cell>
          <table:table-cell/>
          <table:table-cell office:value-type="string" calcext:value-type="string">
            <text:p>Anónimo (Estudio fotográfico comercial)</text:p>
          </table:table-cell>
          <table:table-cell/>
          <table:table-cell office:value-type="string" calcext:value-type="string">
            <text:p>Fotografía de estudio en formato de diapositiva a color que muestra a la modelo Claudia Conti posando de espaldas, semidesnuda, en una composición temática navideña. La escena incluye elementos decorativos como esferas de cristal, guirnaldas y pequeños árboles sintéticos sobre una alfombra de color naranja vibrante, con un fondo de cortinas blancas plisadas que sugieren un entorno de producción profesional de mediados de la década de 1970.</text:p>
          </table:table-cell>
          <table:table-cell/>
          <table:table-cell office:value-type="string" calcext:value-type="string">
            <text:p>Claudia Conti; Ektachrome; Fotografía erótica retro</text:p>
          </table:table-cell>
          <table:table-cell office:value-type="string" calcext:value-type="string">
            <text:p>Los Ángeles, California, Estados Unidos</text:p>
          </table:table-cell>
          <table:table-cell office:value-type="float" office:value="34.052235" calcext:value-type="float">
            <text:p>34.052235</text:p>
          </table:table-cell>
          <table:table-cell office:value-type="float" office:value="-118.243683" calcext:value-type="float">
            <text:p>-118.2436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5.jpg</text:p>
          </table:table-cell>
          <table:table-cell office:value-type="string" calcext:value-type="string">
            <text:p>9gslxk</text:p>
          </table:table-cell>
          <table:table-cell office:value-type="string" calcext:value-type="string">
            <text:p>image</text:p>
          </table:table-cell>
          <table:table-cell office:value-type="string" calcext:value-type="string">
            <text:p>/objects/transparencia_035.jpg</text:p>
          </table:table-cell>
          <table:table-cell office:value-type="string" calcext:value-type="string">
            <text:p>/objects/small/transparencia_035_sm.jpg</text:p>
          </table:table-cell>
          <table:table-cell office:value-type="string" calcext:value-type="string">
            <text:p>/objects/thumbs/transparencia_03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6</text:p>
          </table:table-cell>
          <table:table-cell office:value-type="string" calcext:value-type="string">
            <text:p>Celebración familiar</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Fotografía en formato cuadrado que captura una celebración familiar, posiblemente un cumpleaños o evento social significativo, en un entorno doméstico de clase media. Un grupo de niños y adultos posan frente a un gran pastel decorado de varios pisos; en primer plano se distinguen claramente vasos con el logotipo de la marca Bacardí, lo que sitúa la escena en un contexto cultural latinoamericano, probablemente mexicano.</text:p>
          </table:table-cell>
          <table:table-cell/>
          <table:table-cell office:value-type="string" calcext:value-type="string">
            <text:p>Celebración familiar; México años 60; Cultura doméstic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6.jpg</text:p>
          </table:table-cell>
          <table:table-cell office:value-type="string" calcext:value-type="string">
            <text:p>1p191u</text:p>
          </table:table-cell>
          <table:table-cell office:value-type="string" calcext:value-type="string">
            <text:p>image</text:p>
          </table:table-cell>
          <table:table-cell office:value-type="string" calcext:value-type="string">
            <text:p>/objects/transparencia_036.jpg</text:p>
          </table:table-cell>
          <table:table-cell office:value-type="string" calcext:value-type="string">
            <text:p>/objects/small/transparencia_036_sm.jpg</text:p>
          </table:table-cell>
          <table:table-cell office:value-type="string" calcext:value-type="string">
            <text:p>/objects/thumbs/transparencia_03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7</text:p>
          </table:table-cell>
          <table:table-cell office:value-type="string" calcext:value-type="string">
            <text:p>Turismo de masas</text:p>
          </table:table-cell>
          <table:table-cell office:value-type="float" office:value="1974" calcext:value-type="float">
            <text:p>1974</text:p>
          </table:table-cell>
          <table:table-cell/>
          <table:table-cell office:value-type="string" calcext:value-type="string">
            <text:p>Anónimo</text:p>
          </table:table-cell>
          <table:table-cell/>
          <table:table-cell office:value-type="string" calcext:value-type="string">
            <text:p>Retrato grupal de una familia o grupo de amigos en una playa urbana durante la época del desarrollismo turístico en España. La imagen captura el auge del turismo de masas, mostrando a doce personas de diversas edades posando en bañadores de estilo setentero, con una línea de edificios residenciales y palmeras al fondo, característicos de la urbanización costera mediterránea de la época.</text:p>
          </table:table-cell>
          <table:table-cell/>
          <table:table-cell office:value-type="string" calcext:value-type="string">
            <text:p>Turismo de masas; España franquista; Diapositiva familiar</text:p>
          </table:table-cell>
          <table:table-cell office:value-type="string" calcext:value-type="string">
            <text:p>Costa Blanca, Benidorm, España</text:p>
          </table:table-cell>
          <table:table-cell office:value-type="float" office:value="38.5343" calcext:value-type="float">
            <text:p>38.5343</text:p>
          </table:table-cell>
          <table:table-cell office:value-type="float" office:value="-0.1291" calcext:value-type="float">
            <text:p>-0.12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7.jpg</text:p>
          </table:table-cell>
          <table:table-cell office:value-type="string" calcext:value-type="string">
            <text:p>gr4ut</text:p>
          </table:table-cell>
          <table:table-cell office:value-type="string" calcext:value-type="string">
            <text:p>image</text:p>
          </table:table-cell>
          <table:table-cell office:value-type="string" calcext:value-type="string">
            <text:p>/objects/transparencia_037.jpg</text:p>
          </table:table-cell>
          <table:table-cell office:value-type="string" calcext:value-type="string">
            <text:p>/objects/small/transparencia_037_sm.jpg</text:p>
          </table:table-cell>
          <table:table-cell office:value-type="string" calcext:value-type="string">
            <text:p>/objects/thumbs/transparencia_03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8</text:p>
          </table:table-cell>
          <table:table-cell office:value-type="string" calcext:value-type="string">
            <text:p>Balsas de totora</text:p>
          </table:table-cell>
          <table:table-cell office:value-type="float" office:value="1970" calcext:value-type="float">
            <text:p>1970</text:p>
          </table:table-cell>
          <table:table-cell/>
          <table:table-cell office:value-type="string" calcext:value-type="string">
            <text:p>Audiovisuales Claret (Editorial)</text:p>
          </table:table-cell>
          <table:table-cell/>
          <table:table-cell office:value-type="string" calcext:value-type="string">
            <text:p>Fotografía histórica que captura una escena cotidiana en el Lago Titicaca, mostrando las embarcaciones tradicionales conocidas como 'balsas de totora' y viviendas construidas con juncos. La imagen presenta a pobladores de la etnia Uros realizando actividades de navegación y mantenimiento de sus islas flotantes, bajo un paisaje de montañas andinas.</text:p>
          </table:table-cell>
          <table:table-cell/>
          <table:table-cell office:value-type="string" calcext:value-type="string">
            <text:p>Balsas de totora; Lago Titicaca; Cultura Uros</text:p>
          </table:table-cell>
          <table:table-cell office:value-type="string" calcext:value-type="string">
            <text:p>Islas Flotantes de los Uros, Puno, Perú</text:p>
          </table:table-cell>
          <table:table-cell office:value-type="float" office:value="-15.8242" calcext:value-type="float">
            <text:p>-15.8242</text:p>
          </table:table-cell>
          <table:table-cell office:value-type="float" office:value="-69.9542" calcext:value-type="float">
            <text:p>-69.95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8.jpg</text:p>
          </table:table-cell>
          <table:table-cell office:value-type="string" calcext:value-type="string">
            <text:p>oqmk9l</text:p>
          </table:table-cell>
          <table:table-cell office:value-type="string" calcext:value-type="string">
            <text:p>image</text:p>
          </table:table-cell>
          <table:table-cell office:value-type="string" calcext:value-type="string">
            <text:p>/objects/transparencia_038.jpg</text:p>
          </table:table-cell>
          <table:table-cell office:value-type="string" calcext:value-type="string">
            <text:p>/objects/small/transparencia_038_sm.jpg</text:p>
          </table:table-cell>
          <table:table-cell office:value-type="string" calcext:value-type="string">
            <text:p>/objects/thumbs/transparencia_03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9</text:p>
          </table:table-cell>
          <table:table-cell office:value-type="string" calcext:value-type="string">
            <text:p>Turismo</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Una embarcación turística densamente poblada navegando en aguas tropicales, capturada en una diapositiva Kodachrome de 35mm. La escena refleja el auge del turismo de masas en zonas costeras durante el último cuarto del siglo XX, posiblemente en una ruta de ferry o excursión costera.</text:p>
          </table:table-cell>
          <table:table-cell/>
          <table:table-cell office:value-type="string" calcext:value-type="string">
            <text:p>Turismo; Navegación; Kodachrome</text:p>
          </table:table-cell>
          <table:table-cell office:value-type="string" calcext:value-type="string">
            <text:p>Cozumel, Quintana Roo, México</text:p>
          </table:table-cell>
          <table:table-cell office:value-type="float" office:value="20.423" calcext:value-type="float">
            <text:p>20.423</text:p>
          </table:table-cell>
          <table:table-cell office:value-type="float" office:value="-86.9228" calcext:value-type="float">
            <text:p>-86.922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9.jpg</text:p>
          </table:table-cell>
          <table:table-cell office:value-type="string" calcext:value-type="string">
            <text:p>v49nda</text:p>
          </table:table-cell>
          <table:table-cell office:value-type="string" calcext:value-type="string">
            <text:p>image</text:p>
          </table:table-cell>
          <table:table-cell office:value-type="string" calcext:value-type="string">
            <text:p>/objects/transparencia_039.jpg</text:p>
          </table:table-cell>
          <table:table-cell office:value-type="string" calcext:value-type="string">
            <text:p>/objects/small/transparencia_039_sm.jpg</text:p>
          </table:table-cell>
          <table:table-cell office:value-type="string" calcext:value-type="string">
            <text:p>/objects/thumbs/transparencia_039_th.jpg</text:p>
          </table:table-cell>
          <table:table-cell table:number-columns-repeated="2"/>
          <table:table-cell office:value-type="string" calcext:value-type="string">
            <text:p>Diapositiva de 35mm en montura de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0</text:p>
          </table:table-cell>
          <table:table-cell office:value-type="string" calcext:value-type="string">
            <text:p>Barroco Novohispano</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Vista frontal del Santuario de Nuestra Señora de Ocotlán en Tlaxcala, México. La imagen captura la fachada principal de estilo barroco churrigueresco (o estípite) caracterizada por su intensa ornamentación en argamasa blanca que contrasta con el ladrillo rojo de las torres, un estilo conocido localmente como 'alfeñique'.</text:p>
          </table:table-cell>
          <table:table-cell/>
          <table:table-cell office:value-type="string" calcext:value-type="string">
            <text:p>Barroco Novohispano; Arquitectura Religiosa; Tlaxcala</text:p>
          </table:table-cell>
          <table:table-cell office:value-type="string" calcext:value-type="string">
            <text:p>Santuario de Nuestra Señora de Ocotlán, Tlaxcala de Xicohténcatl, México</text:p>
          </table:table-cell>
          <table:table-cell office:value-type="float" office:value="19.3235" calcext:value-type="float">
            <text:p>19.3235</text:p>
          </table:table-cell>
          <table:table-cell office:value-type="float" office:value="-98.2323" calcext:value-type="float">
            <text:p>-98.232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0.jpg</text:p>
          </table:table-cell>
          <table:table-cell office:value-type="string" calcext:value-type="string">
            <text:p>4wvpc8</text:p>
          </table:table-cell>
          <table:table-cell office:value-type="string" calcext:value-type="string">
            <text:p>image</text:p>
          </table:table-cell>
          <table:table-cell office:value-type="string" calcext:value-type="string">
            <text:p>/objects/transparencia_040.jpg</text:p>
          </table:table-cell>
          <table:table-cell office:value-type="string" calcext:value-type="string">
            <text:p>/objects/small/transparencia_040_sm.jpg</text:p>
          </table:table-cell>
          <table:table-cell office:value-type="string" calcext:value-type="string">
            <text:p>/objects/thumbs/transparencia_04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1</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Estudio Fotos Sociales</text:p>
          </table:table-cell>
          <table:table-cell/>
          <table:table-cell office:value-type="string" calcext:value-type="string">
            <text:p>Pareja de adultos en un evento social formal, posiblemente una boda o recepción, capturada en un formato de fotografía estereoscópica a color. El hombre viste un traje oscuro clásico con corbata estampada y la mujer un vestido blanco de encaje con un adorno floral en el hombro y el cabello, característico de la moda de mediados del siglo XX en México.</text:p>
          </table:table-cell>
          <table:table-cell/>
          <table:table-cell office:value-type="string" calcext:value-type="string">
            <text:p>Estereoscopía; Fotografía social; México años 50</text:p>
          </table:table-cell>
          <table:table-cell office:value-type="string" calcext:value-type="string">
            <text:p>Luis Moya 112, Centro Histórico, Ciudad de México, México</text:p>
          </table:table-cell>
          <table:table-cell office:value-type="float" office:value="19.431667" calcext:value-type="float">
            <text:p>19.431667</text:p>
          </table:table-cell>
          <table:table-cell office:value-type="float" office:value="-99.144444" calcext:value-type="float">
            <text:p>-99.1444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1.jpg</text:p>
          </table:table-cell>
          <table:table-cell office:value-type="string" calcext:value-type="string">
            <text:p>nku7b</text:p>
          </table:table-cell>
          <table:table-cell office:value-type="string" calcext:value-type="string">
            <text:p>image</text:p>
          </table:table-cell>
          <table:table-cell office:value-type="string" calcext:value-type="string">
            <text:p>/objects/transparencia_041.jpg</text:p>
          </table:table-cell>
          <table:table-cell office:value-type="string" calcext:value-type="string">
            <text:p>/objects/small/transparencia_041_sm.jpg</text:p>
          </table:table-cell>
          <table:table-cell office:value-type="string" calcext:value-type="string">
            <text:p>/objects/thumbs/transparencia_04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2</text:p>
          </table:table-cell>
          <table:table-cell office:value-type="string" calcext:value-type="string">
            <text:p>Volkswagen Beetle</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Fotografía nocturna estereoscópica que muestra un automóvil Volkswagen Beetle (Vocho) decorado con inscripciones pintadas a mano que dicen 'DE COLORES Nº 23 TAMPICO'. Varios hombres vestidos formalmente con traje oscuro se encuentran junto al vehículo, uno de ellos aparentemente empujándolo o posando frente a una estructura arquitectónica de estilo modernista con un volado de concreto. La escena sugiere un evento relacionado con el movimiento católico Cursillos de Cristiandad.</text:p>
          </table:table-cell>
          <table:table-cell/>
          <table:table-cell office:value-type="string" calcext:value-type="string">
            <text:p>Volkswagen Beetle; Cursillos de Cristiandad; Tampico</text:p>
          </table:table-cell>
          <table:table-cell office:value-type="string" calcext:value-type="string">
            <text:p>Tampico, Tamaulipas, México</text:p>
          </table:table-cell>
          <table:table-cell office:value-type="float" office:value="22.226" calcext:value-type="float">
            <text:p>22.226</text:p>
          </table:table-cell>
          <table:table-cell office:value-type="float" office:value="-97.856" calcext:value-type="float">
            <text:p>-97.85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2.jpg</text:p>
          </table:table-cell>
          <table:table-cell office:value-type="string" calcext:value-type="string">
            <text:p>peviw9</text:p>
          </table:table-cell>
          <table:table-cell office:value-type="string" calcext:value-type="string">
            <text:p>image</text:p>
          </table:table-cell>
          <table:table-cell office:value-type="string" calcext:value-type="string">
            <text:p>/objects/transparencia_042.jpg</text:p>
          </table:table-cell>
          <table:table-cell office:value-type="string" calcext:value-type="string">
            <text:p>/objects/small/transparencia_042_sm.jpg</text:p>
          </table:table-cell>
          <table:table-cell office:value-type="string" calcext:value-type="string">
            <text:p>/objects/thumbs/transparencia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3</text:p>
          </table:table-cell>
          <table:table-cell office:value-type="string" calcext:value-type="string">
            <text:p>Cumpleaños infanti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Escena de una celebración de cumpleaños familiar en un entorno doméstico de clase media. Se observa a un grupo de niños y adultos rodeando una mesa con un pastel y vasos de refresco, capturando un momento íntimo de la vida cotidiana urbana de mediados del siglo XX.</text:p>
          </table:table-cell>
          <table:table-cell/>
          <table:table-cell office:value-type="string" calcext:value-type="string">
            <text:p>Cumpleaños infantil; Vida cotidiana; Clase medi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3.jpg</text:p>
          </table:table-cell>
          <table:table-cell office:value-type="string" calcext:value-type="string">
            <text:p>51w05q</text:p>
          </table:table-cell>
          <table:table-cell office:value-type="string" calcext:value-type="string">
            <text:p>image</text:p>
          </table:table-cell>
          <table:table-cell office:value-type="string" calcext:value-type="string">
            <text:p>/objects/transparencia_043.jpg</text:p>
          </table:table-cell>
          <table:table-cell office:value-type="string" calcext:value-type="string">
            <text:p>/objects/small/transparencia_043_sm.jpg</text:p>
          </table:table-cell>
          <table:table-cell office:value-type="string" calcext:value-type="string">
            <text:p>/objects/thumbs/transparencia_043_th.jpg</text:p>
          </table:table-cell>
          <table:table-cell table:number-columns-repeated="2"/>
          <table:table-cell office:value-type="string" calcext:value-type="string">
            <text:p>Diapositiva en color (transparencia)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4</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Estudio Fotos Sociales</text:p>
          </table:table-cell>
          <table:table-cell/>
          <table:table-cell office:value-type="string" calcext:value-type="string">
            <text:p>Retrato estereoscópico de una niña vestida para una ceremonia religiosa, probablemente su Primera Comunión, sosteniendo un ramo de flores. La imagen fue producida por un estudio fotográfico comercial especializado en eventos sociales en la Ciudad de México durante la mitad del siglo XX.</text:p>
          </table:table-cell>
          <table:table-cell/>
          <table:table-cell office:value-type="string" calcext:value-type="string">
            <text:p>Estereoscopía; Primera Comunión; México, D.F.</text:p>
          </table:table-cell>
          <table:table-cell office:value-type="string" calcext:value-type="string">
            <text:p>Calle Luis Moya 112, Centro Histórico, Ciudad de México</text:p>
          </table:table-cell>
          <table:table-cell office:value-type="float" office:value="19.431268" calcext:value-type="float">
            <text:p>19.431268</text:p>
          </table:table-cell>
          <table:table-cell office:value-type="float" office:value="-99.144372" calcext:value-type="float">
            <text:p>-99.1443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4.jpg</text:p>
          </table:table-cell>
          <table:table-cell office:value-type="string" calcext:value-type="string">
            <text:p>99xp6p</text:p>
          </table:table-cell>
          <table:table-cell office:value-type="string" calcext:value-type="string">
            <text:p>image</text:p>
          </table:table-cell>
          <table:table-cell office:value-type="string" calcext:value-type="string">
            <text:p>/objects/transparencia_044.jpg</text:p>
          </table:table-cell>
          <table:table-cell office:value-type="string" calcext:value-type="string">
            <text:p>/objects/small/transparencia_044_sm.jpg</text:p>
          </table:table-cell>
          <table:table-cell office:value-type="string" calcext:value-type="string">
            <text:p>/objects/thumbs/transparencia_04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45</text:p>
          </table:table-cell>
          <table:table-cell office:value-type="string" calcext:value-type="string">
            <text:p>Estereoscopía</text:p>
          </table:table-cell>
          <table:table-cell office:value-type="float" office:value="1955" calcext:value-type="float">
            <text:p>1955</text:p>
          </table:table-cell>
          <table:table-cell/>
          <table:table-cell office:value-type="string" calcext:value-type="string">
            <text:p>Estudio Fotos Sociales</text:p>
          </table:table-cell>
          <table:table-cell/>
          <table:table-cell office:value-type="string" calcext:value-type="string">
            <text:p>Fotografía esteroscópica a color que captura un evento social de gala en la Ciudad de México, probablemente una graduación o una celebración de quince años. Se observa a una joven con un vestido de tul blanco y flores, flanqueada por adultos vestidos formalmente con trajes y abrigos de época, característica de la burguesía mexicana de mediados de siglo.</text:p>
          </table:table-cell>
          <table:table-cell/>
          <table:table-cell office:value-type="string" calcext:value-type="string">
            <text:p>Estereoscopía; Sociedad mexicana; Transparencia en color</text:p>
          </table:table-cell>
          <table:table-cell office:value-type="string" calcext:value-type="string">
            <text:p>Ciudad de México, Calle Luis Moya 112, Centro Histórico</text:p>
          </table:table-cell>
          <table:table-cell office:value-type="float" office:value="19.4312" calcext:value-type="float">
            <text:p>19.4312</text:p>
          </table:table-cell>
          <table:table-cell office:value-type="float" office:value="-99.1444" calcext:value-type="float">
            <text:p>-99.14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5.jpg</text:p>
          </table:table-cell>
          <table:table-cell office:value-type="string" calcext:value-type="string">
            <text:p>tgc7im</text:p>
          </table:table-cell>
          <table:table-cell office:value-type="string" calcext:value-type="string">
            <text:p>image</text:p>
          </table:table-cell>
          <table:table-cell office:value-type="string" calcext:value-type="string">
            <text:p>/objects/transparencia_045.jpg</text:p>
          </table:table-cell>
          <table:table-cell office:value-type="string" calcext:value-type="string">
            <text:p>/objects/small/transparencia_045_sm.jpg</text:p>
          </table:table-cell>
          <table:table-cell office:value-type="string" calcext:value-type="string">
            <text:p>/objects/thumbs/transparencia_04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6</text:p>
          </table:table-cell>
          <table:table-cell office:value-type="string" calcext:value-type="string">
            <text:p>Kodachrome</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Fotografía tipo diapositiva que captura a un grupo de turistas, predominantemente mujeres de edad avanzada, posando frente a un puesto de flores en un mercado abierto. Se observan arreglos vibrantes de gladiolos y otras flores bajo un toldo metálico, con el suelo húmedo reflejando la luz, lo que sugiere una escena tras la lluvia o limpieza del área.</text:p>
          </table:table-cell>
          <table:table-cell/>
          <table:table-cell office:value-type="string" calcext:value-type="string">
            <text:p>Kodachrome; Turismo; Mercado de flores</text:p>
          </table:table-cell>
          <table:table-cell office:value-type="string" calcext:value-type="string">
            <text:p>Mercado de Jamaica, Ciudad de México, México</text:p>
          </table:table-cell>
          <table:table-cell office:value-type="float" office:value="19.4093" calcext:value-type="float">
            <text:p>19.4093</text:p>
          </table:table-cell>
          <table:table-cell office:value-type="float" office:value="-99.1221" calcext:value-type="float">
            <text:p>-99.12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6.jpg</text:p>
          </table:table-cell>
          <table:table-cell office:value-type="string" calcext:value-type="string">
            <text:p>lnt19o</text:p>
          </table:table-cell>
          <table:table-cell office:value-type="string" calcext:value-type="string">
            <text:p>image</text:p>
          </table:table-cell>
          <table:table-cell office:value-type="string" calcext:value-type="string">
            <text:p>/objects/transparencia_046.jpg</text:p>
          </table:table-cell>
          <table:table-cell office:value-type="string" calcext:value-type="string">
            <text:p>/objects/small/transparencia_046_sm.jpg</text:p>
          </table:table-cell>
          <table:table-cell office:value-type="string" calcext:value-type="string">
            <text:p>/objects/thumbs/transparencia_046_th.jpg</text:p>
          </table:table-cell>
          <table:table-cell table:number-columns-repeated="2"/>
          <table:table-cell office:value-type="string" calcext:value-type="string">
            <text:p>Diapositiva en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7</text:p>
          </table:table-cell>
          <table:table-cell office:value-type="string" calcext:value-type="string">
            <text:p>Arquitectura Mexicana</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Hoja de contactos de película diapositiva que documenta la arquitectura del Centro Cultural Universitario (CCU) de la UNAM. Las imágenes muestran el contraste entre el paisaje natural de roca volcánica del Pedregal de San Ángel y las estructuras modernistas, incluyendo detalles de la Biblioteca Nacional de México y vistas panorámicas que integran el horizonte urbano del sur de la Ciudad de México.</text:p>
          </table:table-cell>
          <table:table-cell/>
          <table:table-cell office:value-type="string" calcext:value-type="string">
            <text:p>Arquitectura Mexicana; Ciudad Universitaria; Modernismo</text:p>
          </table:table-cell>
          <table:table-cell office:value-type="string" calcext:value-type="string">
            <text:p>Centro Cultural Universitario, UNAM, Ciudad de México</text:p>
          </table:table-cell>
          <table:table-cell office:value-type="float" office:value="19.3142" calcext:value-type="float">
            <text:p>19.3142</text:p>
          </table:table-cell>
          <table:table-cell office:value-type="float" office:value="-99.1848" calcext:value-type="float">
            <text:p>-99.18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7.jpg</text:p>
          </table:table-cell>
          <table:table-cell office:value-type="string" calcext:value-type="string">
            <text:p>oec1ak</text:p>
          </table:table-cell>
          <table:table-cell office:value-type="string" calcext:value-type="string">
            <text:p>image</text:p>
          </table:table-cell>
          <table:table-cell office:value-type="string" calcext:value-type="string">
            <text:p>/objects/transparencia_047.jpg</text:p>
          </table:table-cell>
          <table:table-cell office:value-type="string" calcext:value-type="string">
            <text:p>/objects/small/transparencia_047_sm.jpg</text:p>
          </table:table-cell>
          <table:table-cell office:value-type="string" calcext:value-type="string">
            <text:p>/objects/thumbs/transparencia_047_th.jpg</text:p>
          </table:table-cell>
          <table:table-cell table:number-columns-repeated="2"/>
          <table:table-cell office:value-type="string" calcext:value-type="string">
            <text:p>Tira de película positiva en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8</text:p>
          </table:table-cell>
          <table:table-cell office:value-type="string" calcext:value-type="string">
            <text:p>Teotihuacán</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Vista panorámica de la zona arqueológica de Teotihuacán, México, capturada en una transparencia a color. La imagen muestra la extensión de las estructuras monumentales bajo un cielo nublado, con un visitante solitario en el plano medio izquierdo, reflejando el auge del turismo arqueológico masivo en la segunda mitad del siglo XX.</text:p>
          </table:table-cell>
          <table:table-cell/>
          <table:table-cell office:value-type="string" calcext:value-type="string">
            <text:p>Teotihuacán; Arqueología; Kodachrome</text:p>
          </table:table-cell>
          <table:table-cell office:value-type="string" calcext:value-type="string">
            <text:p>Zona Arqueológica de Teotihuacán, Estado de México, México</text:p>
          </table:table-cell>
          <table:table-cell office:value-type="float" office:value="19.6925" calcext:value-type="float">
            <text:p>19.6925</text:p>
          </table:table-cell>
          <table:table-cell office:value-type="float" office:value="-98.8436" calcext:value-type="float">
            <text:p>-98.843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8.jpg</text:p>
          </table:table-cell>
          <table:table-cell office:value-type="string" calcext:value-type="string">
            <text:p>zqidhi5</text:p>
          </table:table-cell>
          <table:table-cell office:value-type="string" calcext:value-type="string">
            <text:p>image</text:p>
          </table:table-cell>
          <table:table-cell office:value-type="string" calcext:value-type="string">
            <text:p>/objects/transparencia_048.jpg</text:p>
          </table:table-cell>
          <table:table-cell office:value-type="string" calcext:value-type="string">
            <text:p>/objects/small/transparencia_048_sm.jpg</text:p>
          </table:table-cell>
          <table:table-cell office:value-type="string" calcext:value-type="string">
            <text:p>/objects/thumbs/transparencia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9</text:p>
          </table:table-cell>
          <table:table-cell office:value-type="string" calcext:value-type="string">
            <text:p>Naciones Unidas</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Escena cotidiana en la plaza de la Sede de las Naciones Unidas en Nueva York durante finales de los años 60. Se observa a diversos visitantes transitando por la explanada, con la destacada escultura ecuestre 'La Paz' de Antun Augustin?i? en el centro y el puente Queensboro visible al fondo cruzando el East River.</text:p>
          </table:table-cell>
          <table:table-cell/>
          <table:table-cell office:value-type="string" calcext:value-type="string">
            <text:p>Naciones Unidas; Estatua de la Paz; Manhattan</text:p>
          </table:table-cell>
          <table:table-cell office:value-type="string" calcext:value-type="string">
            <text:p>Sede de las Naciones Unidas, Nueva York, EE. UU.</text:p>
          </table:table-cell>
          <table:table-cell office:value-type="float" office:value="40.7489" calcext:value-type="float">
            <text:p>40.7489</text:p>
          </table:table-cell>
          <table:table-cell office:value-type="float" office:value="-73.968" calcext:value-type="float">
            <text:p>-73.96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9.jpg</text:p>
          </table:table-cell>
          <table:table-cell office:value-type="string" calcext:value-type="string">
            <text:p>f1p9q7</text:p>
          </table:table-cell>
          <table:table-cell office:value-type="string" calcext:value-type="string">
            <text:p>image</text:p>
          </table:table-cell>
          <table:table-cell office:value-type="string" calcext:value-type="string">
            <text:p>/objects/transparencia_049.jpg</text:p>
          </table:table-cell>
          <table:table-cell office:value-type="string" calcext:value-type="string">
            <text:p>/objects/small/transparencia_049_sm.jpg</text:p>
          </table:table-cell>
          <table:table-cell office:value-type="string" calcext:value-type="string">
            <text:p>/objects/thumbs/transparencia_04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0</text:p>
          </table:table-cell>
          <table:table-cell office:value-type="string" calcext:value-type="string">
            <text:p>Arquitectura vernácul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Una escena de la vida cotidiana en la Península de Yucatán, México, capturada en una diapositiva Kodachrome. Se observa una vivienda tradicional maya (palapa) con techo de paja junto a una construcción de mampostería más moderna, reflejando la transición arquitectónica y social de mediados del siglo XX. Dos mujeres vestidas con huipiles caminan por una calle pavimentada en una zona rural o semi-urbana.</text:p>
          </table:table-cell>
          <table:table-cell/>
          <table:table-cell office:value-type="string" calcext:value-type="string">
            <text:p>Arquitectura vernácula; Yucatán; Kodachrome</text:p>
          </table:table-cell>
          <table:table-cell office:value-type="string" calcext:value-type="string">
            <text:p>Pisté, Yucatán, México</text:p>
          </table:table-cell>
          <table:table-cell office:value-type="float" office:value="20.6947" calcext:value-type="float">
            <text:p>20.6947</text:p>
          </table:table-cell>
          <table:table-cell office:value-type="float" office:value="-88.5916" calcext:value-type="float">
            <text:p>-88.59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0.jpg</text:p>
          </table:table-cell>
          <table:table-cell office:value-type="string" calcext:value-type="string">
            <text:p>ih9ey</text:p>
          </table:table-cell>
          <table:table-cell office:value-type="string" calcext:value-type="string">
            <text:p>image</text:p>
          </table:table-cell>
          <table:table-cell office:value-type="string" calcext:value-type="string">
            <text:p>/objects/transparencia_050.jpg</text:p>
          </table:table-cell>
          <table:table-cell office:value-type="string" calcext:value-type="string">
            <text:p>/objects/small/transparencia_050_sm.jpg</text:p>
          </table:table-cell>
          <table:table-cell office:value-type="string" calcext:value-type="string">
            <text:p>/objects/thumbs/transparencia_050_th.jpg</text:p>
          </table:table-cell>
          <table:table-cell table:number-columns-repeated="2"/>
          <table:table-cell office:value-type="string" calcext:value-type="string">
            <text:p>Transparencia a color positiva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1</text:p>
          </table:table-cell>
          <table:table-cell office:value-type="string" calcext:value-type="string">
            <text:p>ARM Quetzalcóatl (D-18)</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Fotografía de la embarcación ARM Quetzalcóatl (D-18), un destructor de la Armada de México que anteriormente sirvió como el USS Harrison (DD-573) de la clase Fletcher. La imagen captura al buque navegando en aguas tranquilas, destacando su numeral de casco y su superestructura característica de los destructores estadounidenses de la Segunda Guerra Mundial transferidos a marinas latinoamericanas.</text:p>
          </table:table-cell>
          <table:table-cell/>
          <table:table-cell office:value-type="string" calcext:value-type="string">
            <text:p>ARM Quetzalcóatl (D-18); Armada de México; Destructor clase Fletcher</text:p>
          </table:table-cell>
          <table:table-cell office:value-type="string" calcext:value-type="string">
            <text:p>Cerca del Puerto de Veracruz, México</text:p>
          </table:table-cell>
          <table:table-cell office:value-type="float" office:value="19.1738" calcext:value-type="float">
            <text:p>19.1738</text:p>
          </table:table-cell>
          <table:table-cell office:value-type="float" office:value="-96.1342" calcext:value-type="float">
            <text:p>-96.13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1.jpg</text:p>
          </table:table-cell>
          <table:table-cell office:value-type="string" calcext:value-type="string">
            <text:p>46sybi</text:p>
          </table:table-cell>
          <table:table-cell office:value-type="string" calcext:value-type="string">
            <text:p>image</text:p>
          </table:table-cell>
          <table:table-cell office:value-type="string" calcext:value-type="string">
            <text:p>/objects/transparencia_051.jpg</text:p>
          </table:table-cell>
          <table:table-cell office:value-type="string" calcext:value-type="string">
            <text:p>/objects/small/transparencia_051_sm.jpg</text:p>
          </table:table-cell>
          <table:table-cell office:value-type="string" calcext:value-type="string">
            <text:p>/objects/thumbs/transparencia_05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2</text:p>
          </table:table-cell>
          <table:table-cell office:value-type="string" calcext:value-type="string">
            <text:p>Turismo de montaña</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Retrato de una mujer de mediana edad sosteniendo un caniche blanco frente a un paisaje de alta montaña nevada. La fotografía captura una escena de turismo de invierno típica de las clases medias-altas europeas en la segunda mitad del siglo XX, destacando la moda y los accesorios de la época en un entorno natural.</text:p>
          </table:table-cell>
          <table:table-cell/>
          <table:table-cell office:value-type="string" calcext:value-type="string">
            <text:p>Turismo de montaña; Retrato con mascota; Diapositiva en color</text:p>
          </table:table-cell>
          <table:table-cell office:value-type="string" calcext:value-type="string">
            <text:p>Sierra Nevada, Granada, España</text:p>
          </table:table-cell>
          <table:table-cell office:value-type="float" office:value="37.0955" calcext:value-type="float">
            <text:p>37.0955</text:p>
          </table:table-cell>
          <table:table-cell office:value-type="float" office:value="-3.3855" calcext:value-type="float">
            <text:p>-3.38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2.jpg</text:p>
          </table:table-cell>
          <table:table-cell office:value-type="string" calcext:value-type="string">
            <text:p>npf0p</text:p>
          </table:table-cell>
          <table:table-cell office:value-type="string" calcext:value-type="string">
            <text:p>image</text:p>
          </table:table-cell>
          <table:table-cell office:value-type="string" calcext:value-type="string">
            <text:p>/objects/transparencia_052.jpg</text:p>
          </table:table-cell>
          <table:table-cell office:value-type="string" calcext:value-type="string">
            <text:p>/objects/small/transparencia_052_sm.jpg</text:p>
          </table:table-cell>
          <table:table-cell office:value-type="string" calcext:value-type="string">
            <text:p>/objects/thumbs/transparencia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3</text:p>
          </table:table-cell>
          <table:table-cell office:value-type="string" calcext:value-type="string">
            <text:p>Audiovisuales Claret</text:p>
          </table:table-cell>
          <table:table-cell office:value-type="float" office:value="1970" calcext:value-type="float">
            <text:p>1970</text:p>
          </table:table-cell>
          <table:table-cell/>
          <table:table-cell office:value-type="string" calcext:value-type="string">
            <text:p>Editorial Claret (Audiovisuales Claret)</text:p>
          </table:table-cell>
          <table:table-cell/>
          <table:table-cell office:value-type="string" calcext:value-type="string">
            <text:p>Primer plano de un calzado antiguo y deteriorado, posiblemente una bota de cuero con restos de barro o concreciones minerales, siendo sostenida y analizada por una persona. La imagen forma parte de una serie de diapositivas producidas por Audiovisuales Claret para fines pedagógicos, religiosos o documentales.</text:p>
          </table:table-cell>
          <table:table-cell/>
          <table:table-cell office:value-type="string" calcext:value-type="string">
            <text:p>Audiovisuales Claret; Reliquia; Arqueología</text:p>
          </table:table-cell>
          <table:table-cell office:value-type="string" calcext:value-type="string">
            <text:p>Barcelona, España</text:p>
          </table:table-cell>
          <table:table-cell office:value-type="float" office:value="41.3934" calcext:value-type="float">
            <text:p>41.3934</text:p>
          </table:table-cell>
          <table:table-cell office:value-type="float" office:value="2.1691" calcext:value-type="float">
            <text:p>2.16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3.jpg</text:p>
          </table:table-cell>
          <table:table-cell office:value-type="string" calcext:value-type="string">
            <text:p>qor3q9</text:p>
          </table:table-cell>
          <table:table-cell office:value-type="string" calcext:value-type="string">
            <text:p>image</text:p>
          </table:table-cell>
          <table:table-cell office:value-type="string" calcext:value-type="string">
            <text:p>/objects/transparencia_053.jpg</text:p>
          </table:table-cell>
          <table:table-cell office:value-type="string" calcext:value-type="string">
            <text:p>/objects/small/transparencia_053_sm.jpg</text:p>
          </table:table-cell>
          <table:table-cell office:value-type="string" calcext:value-type="string">
            <text:p>/objects/thumbs/transparencia_05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4</text:p>
          </table:table-cell>
          <table:table-cell office:value-type="string" calcext:value-type="string">
            <text:p>Audiovisuales Claret</text:p>
          </table:table-cell>
          <table:table-cell office:value-type="float" office:value="1972" calcext:value-type="float">
            <text:p>1972</text:p>
          </table:table-cell>
          <table:table-cell/>
          <table:table-cell office:value-type="string" calcext:value-type="string">
            <text:p>Equipo técnico de Editorial Claret</text:p>
          </table:table-cell>
          <table:table-cell/>
          <table:table-cell office:value-type="string" calcext:value-type="string">
            <text:p>Diapositiva educativa de la colección de Audiovisuales Claret, producida por los Misioneros Claretianos en España. La imagen captura una escena de la vida cotidiana, probablemente con fines didácticos o catequéticos, mostrando a un hombre dirigiéndose hacia una vivienda unifamiliar de arquitectura típica de la clase media durante el periodo del tardofranquismo.</text:p>
          </table:table-cell>
          <table:table-cell/>
          <table:table-cell office:value-type="string" calcext:value-type="string">
            <text:p>Audiovisuales Claret; Catequesis audiovisual; España años 70</text:p>
          </table:table-cell>
          <table:table-cell office:value-type="string" calcext:value-type="string">
            <text:p>Barcelona, España</text:p>
          </table:table-cell>
          <table:table-cell office:value-type="float" office:value="41.4036" calcext:value-type="float">
            <text:p>41.4036</text:p>
          </table:table-cell>
          <table:table-cell office:value-type="float" office:value="2.1744" calcext:value-type="float">
            <text:p>2.17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4.jpg</text:p>
          </table:table-cell>
          <table:table-cell office:value-type="string" calcext:value-type="string">
            <text:p>ixs30f</text:p>
          </table:table-cell>
          <table:table-cell office:value-type="string" calcext:value-type="string">
            <text:p>image</text:p>
          </table:table-cell>
          <table:table-cell office:value-type="string" calcext:value-type="string">
            <text:p>/objects/transparencia_054.jpg</text:p>
          </table:table-cell>
          <table:table-cell office:value-type="string" calcext:value-type="string">
            <text:p>/objects/small/transparencia_054_sm.jpg</text:p>
          </table:table-cell>
          <table:table-cell office:value-type="string" calcext:value-type="string">
            <text:p>/objects/thumbs/transparencia_05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5</text:p>
          </table:table-cell>
          <table:table-cell office:value-type="string" calcext:value-type="string">
            <text:p>Cortina d'Ampezz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Vista a nivel de calle en el centro histórico de Cortina d'Ampezzo, Italia, durante la posguerra. La imagen captura la vida cotidiana con un hombre conduciendo una motoneta Vespa, arquitectura alpina tradicional con balcones de madera y el distintivo campanario de la Basílica de los Santos Felipe y Santiago al fondo. El letrero 'BARBIERE' en uno de los edificios refuerza la ubicación en territorio italiano.</text:p>
          </table:table-cell>
          <table:table-cell/>
          <table:table-cell office:value-type="string" calcext:value-type="string">
            <text:p>Cortina d'Ampezzo; Vespa; Alpes Dolomitas</text:p>
          </table:table-cell>
          <table:table-cell office:value-type="string" calcext:value-type="string">
            <text:p>Cortina d'Ampezzo, Belluno, Italia</text:p>
          </table:table-cell>
          <table:table-cell office:value-type="float" office:value="46.5383" calcext:value-type="float">
            <text:p>46.5383</text:p>
          </table:table-cell>
          <table:table-cell office:value-type="float" office:value="12.1372" calcext:value-type="float">
            <text:p>12.13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5.jpg</text:p>
          </table:table-cell>
          <table:table-cell office:value-type="string" calcext:value-type="string">
            <text:p>s88e5x</text:p>
          </table:table-cell>
          <table:table-cell office:value-type="string" calcext:value-type="string">
            <text:p>image</text:p>
          </table:table-cell>
          <table:table-cell office:value-type="string" calcext:value-type="string">
            <text:p>/objects/transparencia_055.jpg</text:p>
          </table:table-cell>
          <table:table-cell office:value-type="string" calcext:value-type="string">
            <text:p>/objects/small/transparencia_055_sm.jpg</text:p>
          </table:table-cell>
          <table:table-cell office:value-type="string" calcext:value-type="string">
            <text:p>/objects/thumbs/transparencia_05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6</text:p>
          </table:table-cell>
          <table:table-cell office:value-type="string" calcext:value-type="string">
            <text:p>Bundesgartenschau</text:p>
          </table:table-cell>
          <table:table-cell office:value-type="float" office:value="1969" calcext:value-type="float">
            <text:p>1969</text:p>
          </table:table-cell>
          <table:table-cell/>
          <table:table-cell office:value-type="string" calcext:value-type="string">
            <text:p>Anónimo</text:p>
          </table:table-cell>
          <table:table-cell/>
          <table:table-cell office:value-type="string" calcext:value-type="string">
            <text:p>Esta diapositiva a color captura una escena costumbrista en un parque público alemán, probablemente durante una de las exposiciones federales de jardinería (Bundesgartenschau). En la imagen se observa un grupo de visitantes con vestimenta de finales de los años 60, junto a parterres de flores y bajo el recorrido de un telesilla (Sesselbahn), un elemento recreativo icónico de estos eventos en la Alemania Occidental de la posguerra.</text:p>
          </table:table-cell>
          <table:table-cell/>
          <table:table-cell office:value-type="string" calcext:value-type="string">
            <text:p>Bundesgartenschau; Sesselbahn; Agfachrome</text:p>
          </table:table-cell>
          <table:table-cell office:value-type="string" calcext:value-type="string">
            <text:p>Westfalenpark, Dortmund, Alemania</text:p>
          </table:table-cell>
          <table:table-cell office:value-type="float" office:value="51.4965" calcext:value-type="float">
            <text:p>51.4965</text:p>
          </table:table-cell>
          <table:table-cell office:value-type="float" office:value="7.477" calcext:value-type="float">
            <text:p>7.47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6.jpg</text:p>
          </table:table-cell>
          <table:table-cell office:value-type="string" calcext:value-type="string">
            <text:p>bdlkdqn</text:p>
          </table:table-cell>
          <table:table-cell office:value-type="string" calcext:value-type="string">
            <text:p>image</text:p>
          </table:table-cell>
          <table:table-cell office:value-type="string" calcext:value-type="string">
            <text:p>/objects/transparencia_056.jpg</text:p>
          </table:table-cell>
          <table:table-cell office:value-type="string" calcext:value-type="string">
            <text:p>/objects/small/transparencia_056_sm.jpg</text:p>
          </table:table-cell>
          <table:table-cell office:value-type="string" calcext:value-type="string">
            <text:p>/objects/thumbs/transparencia_05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7</text:p>
          </table:table-cell>
          <table:table-cell office:value-type="string" calcext:value-type="string">
            <text:p>Diapositiva Agfachrome</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Retrato grupal de cinco mujeres de pie en lo que parece ser un mirador o patio exterior adyacente a una estructura de piedra con un gran arco de medio punto. La escena captura un momento de ocio o turismo; las mujeres visten atuendos formales de estilo urbano de principios de la década de 1970, incluyendo vestidos de corte en A, bolsos de mano y peinados con volumen. El fondo muestra un paisaje montañoso con edificaciones blancas de techos rojos, característico de las zonas coloniales de montaña en México.</text:p>
          </table:table-cell>
          <table:table-cell/>
          <table:table-cell office:value-type="string" calcext:value-type="string">
            <text:p>Diapositiva Agfachrome; Moda femenina 1970s; Turismo en México</text:p>
          </table:table-cell>
          <table:table-cell office:value-type="string" calcext:value-type="string">
            <text:p>Taxco de Alarcón, Guerrero, México</text:p>
          </table:table-cell>
          <table:table-cell office:value-type="float" office:value="18.5562" calcext:value-type="float">
            <text:p>18.5562</text:p>
          </table:table-cell>
          <table:table-cell office:value-type="float" office:value="-99.6048" calcext:value-type="float">
            <text:p>-99.60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7.jpg</text:p>
          </table:table-cell>
          <table:table-cell office:value-type="string" calcext:value-type="string">
            <text:p>81juh</text:p>
          </table:table-cell>
          <table:table-cell office:value-type="string" calcext:value-type="string">
            <text:p>image</text:p>
          </table:table-cell>
          <table:table-cell office:value-type="string" calcext:value-type="string">
            <text:p>/objects/transparencia_057.jpg</text:p>
          </table:table-cell>
          <table:table-cell office:value-type="string" calcext:value-type="string">
            <text:p>/objects/small/transparencia_057_sm.jpg</text:p>
          </table:table-cell>
          <table:table-cell office:value-type="string" calcext:value-type="string">
            <text:p>/objects/thumbs/transparencia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8</text:p>
          </table:table-cell>
          <table:table-cell office:value-type="string" calcext:value-type="string">
            <text:p>Agfacolor</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Fotografía a color de una pareja posando sobre una embarcación en un entorno costero tropical, sosteniendo cuatro grandes ejemplares de caracol reina (Aliger gigas). El hombre viste una polo oscura, bañador y porta una máscara de buceo circular clásica sobre su frente, mientras que la mujer viste un traje de baño rojo con patrones. La imagen está enmarcada en una montura original de diapositiva Agfacolor.</text:p>
          </table:table-cell>
          <table:table-cell/>
          <table:table-cell office:value-type="string" calcext:value-type="string">
            <text:p>Agfacolor; Caracol Reina; Turismo Caribeño</text:p>
          </table:table-cell>
          <table:table-cell office:value-type="string" calcext:value-type="string">
            <text:p>Nassau, Bahamas</text:p>
          </table:table-cell>
          <table:table-cell office:value-type="float" office:value="25.0443" calcext:value-type="float">
            <text:p>25.0443</text:p>
          </table:table-cell>
          <table:table-cell office:value-type="float" office:value="-77.3504" calcext:value-type="float">
            <text:p>-77.350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8.jpg</text:p>
          </table:table-cell>
          <table:table-cell office:value-type="string" calcext:value-type="string">
            <text:p>d43dcb</text:p>
          </table:table-cell>
          <table:table-cell office:value-type="string" calcext:value-type="string">
            <text:p>image</text:p>
          </table:table-cell>
          <table:table-cell office:value-type="string" calcext:value-type="string">
            <text:p>/objects/transparencia_058.jpg</text:p>
          </table:table-cell>
          <table:table-cell office:value-type="string" calcext:value-type="string">
            <text:p>/objects/small/transparencia_058_sm.jpg</text:p>
          </table:table-cell>
          <table:table-cell office:value-type="string" calcext:value-type="string">
            <text:p>/objects/thumbs/transparencia_058_th.jpg</text:p>
          </table:table-cell>
          <table:table-cell table:number-columns-repeated="2"/>
          <table:table-cell office:value-type="string" calcext:value-type="string">
            <text:p>Transparencia a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9</text:p>
          </table:table-cell>
          <table:table-cell office:value-type="string" calcext:value-type="string">
            <text:p>Cataratas del Niágar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Fotografía tipo diapositiva que captura a un grupo de turistas a bordo del barco 'Maid of the Mist' en las Cataratas del Niágara. En el centro, una mujer joven sonríe a la cámara mientras viste un impermeable negro de vinilo con capucha, típico de la atracción durante mediados del siglo XX, con la densa bruma de la caída de agua (Horseshoe Falls) de fondo.</text:p>
          </table:table-cell>
          <table:table-cell/>
          <table:table-cell office:value-type="string" calcext:value-type="string">
            <text:p>Cataratas del Niágara; Maid of the Mist; Agfacolor</text:p>
          </table:table-cell>
          <table:table-cell office:value-type="string" calcext:value-type="string">
            <text:p>Cataratas del Niágara, Ontario, Canadá / Nueva York, EE.UU.</text:p>
          </table:table-cell>
          <table:table-cell office:value-type="float" office:value="43.0799" calcext:value-type="float">
            <text:p>43.0799</text:p>
          </table:table-cell>
          <table:table-cell office:value-type="float" office:value="-79.0763" calcext:value-type="float">
            <text:p>-79.076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9.jpg</text:p>
          </table:table-cell>
          <table:table-cell office:value-type="string" calcext:value-type="string">
            <text:p>i22kj</text:p>
          </table:table-cell>
          <table:table-cell office:value-type="string" calcext:value-type="string">
            <text:p>image</text:p>
          </table:table-cell>
          <table:table-cell office:value-type="string" calcext:value-type="string">
            <text:p>/objects/transparencia_059.jpg</text:p>
          </table:table-cell>
          <table:table-cell office:value-type="string" calcext:value-type="string">
            <text:p>/objects/small/transparencia_059_sm.jpg</text:p>
          </table:table-cell>
          <table:table-cell office:value-type="string" calcext:value-type="string">
            <text:p>/objects/thumbs/transparencia_059_th.jpg</text:p>
          </table:table-cell>
          <table:table-cell table:number-columns-repeated="2"/>
          <table:table-cell office:value-type="string" calcext:value-type="string">
            <text:p>Diapositiva en color (transparenci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0</text:p>
          </table:table-cell>
          <table:table-cell office:value-type="string" calcext:value-type="string">
            <text:p>Traje tradicional griego</text:p>
          </table:table-cell>
          <table:table-cell office:value-type="float" office:value="1960" calcext:value-type="float">
            <text:p>1960</text:p>
          </table:table-cell>
          <table:table-cell/>
          <table:table-cell office:value-type="string" calcext:value-type="string">
            <text:p>Foto Olympic (Estudio fotográfico)</text:p>
          </table:table-cell>
          <table:table-cell/>
          <table:table-cell office:value-type="string" calcext:value-type="string">
            <text:p>Retrato de una mujer joven ataviada con un traje tradicional griego de gala, probablemente el estilo de Amalia o regional de Ática. La fotografía está capturada en una diapositiva de 35 mm producida por el estudio 'Foto Olympic' en Atenas. La mujer posa sentada frente a un entorno natural con vegetación difuminada al fondo. El traje incluye un 'fermeli' (chaqueta bordada) de color granate y una falda amplia de seda clara, elementos típicos de la indumentaria folclórica helénica utilizada en festividades o retratos de estudio de mediados del siglo XX.</text:p>
          </table:table-cell>
          <table:table-cell/>
          <table:table-cell office:value-type="string" calcext:value-type="string">
            <text:p>Traje tradicional griego; Estudio Foto Olympic; Diapositiva Kodachrome</text:p>
          </table:table-cell>
          <table:table-cell office:value-type="string" calcext:value-type="string">
            <text:p>Avenida Vouliagmenis 65, Atenas, Grecia</text:p>
          </table:table-cell>
          <table:table-cell office:value-type="float" office:value="37.9576" calcext:value-type="float">
            <text:p>37.9576</text:p>
          </table:table-cell>
          <table:table-cell office:value-type="float" office:value="23.7385" calcext:value-type="float">
            <text:p>23.738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0.jpg</text:p>
          </table:table-cell>
          <table:table-cell office:value-type="string" calcext:value-type="string">
            <text:p>ic3klu</text:p>
          </table:table-cell>
          <table:table-cell office:value-type="string" calcext:value-type="string">
            <text:p>image</text:p>
          </table:table-cell>
          <table:table-cell office:value-type="string" calcext:value-type="string">
            <text:p>/objects/transparencia_060.jpg</text:p>
          </table:table-cell>
          <table:table-cell office:value-type="string" calcext:value-type="string">
            <text:p>/objects/small/transparencia_060_sm.jpg</text:p>
          </table:table-cell>
          <table:table-cell office:value-type="string" calcext:value-type="string">
            <text:p>/objects/thumbs/transparencia_06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1</text:p>
          </table:table-cell>
          <table:table-cell office:value-type="string" calcext:value-type="string">
            <text:p>Kotzebue</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Fotografía de un viajero posando frente a un cartel de bienvenida de Alaska Airlines en Kotzebue, Alaska. El cartel identifica a la ciudad como la 'Capital Mundial del Oso Polar', un eslogan turístico prominente antes de las restricciones de caza de 1972. La imagen está capturada en una diapositiva Kodachrome, lo que resalta los colores vibrantes del cielo ártico y la nieve.</text:p>
          </table:table-cell>
          <table:table-cell/>
          <table:table-cell office:value-type="string" calcext:value-type="string">
            <text:p>Kotzebue; Alaska Airlines; Ártico</text:p>
          </table:table-cell>
          <table:table-cell office:value-type="string" calcext:value-type="string">
            <text:p>Aeropuerto Ralph Wien Memorial (OTZ), Kotzebue, Alaska, Estados Unidos</text:p>
          </table:table-cell>
          <table:table-cell office:value-type="float" office:value="66.8847" calcext:value-type="float">
            <text:p>66.8847</text:p>
          </table:table-cell>
          <table:table-cell office:value-type="float" office:value="-162.5986" calcext:value-type="float">
            <text:p>-162.59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1.jpg</text:p>
          </table:table-cell>
          <table:table-cell office:value-type="string" calcext:value-type="string">
            <text:p>qnjjeh</text:p>
          </table:table-cell>
          <table:table-cell office:value-type="string" calcext:value-type="string">
            <text:p>image</text:p>
          </table:table-cell>
          <table:table-cell office:value-type="string" calcext:value-type="string">
            <text:p>/objects/transparencia_061.jpg</text:p>
          </table:table-cell>
          <table:table-cell office:value-type="string" calcext:value-type="string">
            <text:p>/objects/small/transparencia_061_sm.jpg</text:p>
          </table:table-cell>
          <table:table-cell office:value-type="string" calcext:value-type="string">
            <text:p>/objects/thumbs/transparencia_061_th.jpg</text:p>
          </table:table-cell>
          <table:table-cell table:number-columns-repeated="2"/>
          <table:table-cell office:value-type="string" calcext:value-type="string">
            <text:p>Diapositiva en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2</text:p>
          </table:table-cell>
          <table:table-cell office:value-type="string" calcext:value-type="string">
            <text:p>Paseo de la Reforma</text:p>
          </table:table-cell>
          <table:table-cell office:value-type="float" office:value="1960" calcext:value-type="float">
            <text:p>1960</text:p>
          </table:table-cell>
          <table:table-cell/>
          <table:table-cell office:value-type="string" calcext:value-type="string">
            <text:p>Anónimo (Fotografía producida para la serie comercial de GAF Pana-Vue)</text:p>
          </table:table-cell>
          <table:table-cell/>
          <table:table-cell office:value-type="string" calcext:value-type="string">
            <text:p>Vista nocturna histórica de la Glorieta del Caballito en la Ciudad de México, capturada desde una altura elevada que muestra la intersección del Paseo de la Reforma, la Avenida Juárez y la calle de Bucareli. La imagen destaca la estatua ecuestre de Carlos IV de Manuel Tolsá en su ubicación original, rodeada de luminosos letreros de neón publicitarios (como el de Cerveza Superior) y el flujo vehicular de la época. A la derecha sobresale la arquitectura del Edificio El Moro, sede de la Lotería Nacional.</text:p>
          </table:table-cell>
          <table:table-cell/>
          <table:table-cell office:value-type="string" calcext:value-type="string">
            <text:p>Paseo de la Reforma; Estatua de Carlos IV; Arquitectura Moderna</text:p>
          </table:table-cell>
          <table:table-cell office:value-type="string" calcext:value-type="string">
            <text:p>Glorieta de El Caballito, Ciudad de México, México</text:p>
          </table:table-cell>
          <table:table-cell office:value-type="float" office:value="19.4357" calcext:value-type="float">
            <text:p>19.4357</text:p>
          </table:table-cell>
          <table:table-cell office:value-type="float" office:value="-99.1488" calcext:value-type="float">
            <text:p>-99.14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2.jpg</text:p>
          </table:table-cell>
          <table:table-cell office:value-type="string" calcext:value-type="string">
            <text:p>1gq2qq</text:p>
          </table:table-cell>
          <table:table-cell office:value-type="string" calcext:value-type="string">
            <text:p>image</text:p>
          </table:table-cell>
          <table:table-cell office:value-type="string" calcext:value-type="string">
            <text:p>/objects/transparencia_062.jpg</text:p>
          </table:table-cell>
          <table:table-cell office:value-type="string" calcext:value-type="string">
            <text:p>/objects/small/transparencia_062_sm.jpg</text:p>
          </table:table-cell>
          <table:table-cell office:value-type="string" calcext:value-type="string">
            <text:p>/objects/thumbs/transparencia_062_th.jpg</text:p>
          </table:table-cell>
          <table:table-cell table:number-columns-repeated="2"/>
          <table:table-cell office:value-type="string" calcext:value-type="string">
            <text:p>Diapositiva a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3</text:p>
          </table:table-cell>
          <table:table-cell office:value-type="string" calcext:value-type="string">
            <text:p>Cebra de montaña</text:p>
          </table:table-cell>
          <table:table-cell office:value-type="float" office:value="1970" calcext:value-type="float">
            <text:p>1970</text:p>
          </table:table-cell>
          <table:table-cell/>
          <table:table-cell office:value-type="string" calcext:value-type="string">
            <text:p>GAF Corporation (Fotógrafo comercial no acreditado)</text:p>
          </table:table-cell>
          <table:table-cell/>
          <table:table-cell office:value-type="string" calcext:value-type="string">
            <text:p>Una diapositiva a color de 1970 que muestra una cebra de montaña de Hartmann (Equus zebra hartmannae) en su recinto del Zoológico de San Diego. La imagen captura al animal de perfil en un entorno diseñado con rocas artificiales, típico de la museografía zoológica de mediados del siglo XX.</text:p>
          </table:table-cell>
          <table:table-cell/>
          <table:table-cell office:value-type="string" calcext:value-type="string">
            <text:p>Cebra de montaña; Zoológico de San Diego; Diapositiva Pana-Vue</text:p>
          </table:table-cell>
          <table:table-cell office:value-type="string" calcext:value-type="string">
            <text:p>San Diego Zoo, Balboa Park, San Diego, California, EE. UU.</text:p>
          </table:table-cell>
          <table:table-cell office:value-type="float" office:value="32.7353" calcext:value-type="float">
            <text:p>32.7353</text:p>
          </table:table-cell>
          <table:table-cell office:value-type="float" office:value="-117.149" calcext:value-type="float">
            <text:p>-117.14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3.jpg</text:p>
          </table:table-cell>
          <table:table-cell office:value-type="string" calcext:value-type="string">
            <text:p>xuq0z</text:p>
          </table:table-cell>
          <table:table-cell office:value-type="string" calcext:value-type="string">
            <text:p>image</text:p>
          </table:table-cell>
          <table:table-cell office:value-type="string" calcext:value-type="string">
            <text:p>/objects/transparencia_063.jpg</text:p>
          </table:table-cell>
          <table:table-cell office:value-type="string" calcext:value-type="string">
            <text:p>/objects/small/transparencia_063_sm.jpg</text:p>
          </table:table-cell>
          <table:table-cell office:value-type="string" calcext:value-type="string">
            <text:p>/objects/thumbs/transparencia_06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4</text:p>
          </table:table-cell>
          <table:table-cell office:value-type="string" calcext:value-type="string">
            <text:p>Feria Mundial de Nueva York 1964-1965</text:p>
          </table:table-cell>
          <table:table-cell office:value-type="float" office:value="1964" calcext:value-type="float">
            <text:p>1964</text:p>
          </table:table-cell>
          <table:table-cell/>
          <table:table-cell office:value-type="string" calcext:value-type="string">
            <text:p>Ludolf Burkhardt</text:p>
          </table:table-cell>
          <table:table-cell/>
          <table:table-cell office:value-type="string" calcext:value-type="string">
            <text:p>Vista nocturna del Pabellón de Hong Kong durante la Feria Mundial de Nueva York de 1964-1965, celebrada en Flushing Meadows-Corona Park. La imagen captura la fachada de arquitectura tradicional china profusamente iluminada, destacando el restaurante Crown Colony y el ambiente vibrante del sector internacional de la feria durante las horas de la noche.</text:p>
          </table:table-cell>
          <table:table-cell/>
          <table:table-cell office:value-type="string" calcext:value-type="string">
            <text:p>Feria Mundial de Nueva York 1964-1965; Pabellón de Hong Kong; Arquitectura efímera</text:p>
          </table:table-cell>
          <table:table-cell office:value-type="string" calcext:value-type="string">
            <text:p>Flushing Meadows-Corona Park, Queens, Nueva York</text:p>
          </table:table-cell>
          <table:table-cell office:value-type="float" office:value="40.745" calcext:value-type="float">
            <text:p>40.745</text:p>
          </table:table-cell>
          <table:table-cell office:value-type="float" office:value="-73.847" calcext:value-type="float">
            <text:p>-73.84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4.jpg</text:p>
          </table:table-cell>
          <table:table-cell office:value-type="string" calcext:value-type="string">
            <text:p>crw7uh</text:p>
          </table:table-cell>
          <table:table-cell office:value-type="string" calcext:value-type="string">
            <text:p>image</text:p>
          </table:table-cell>
          <table:table-cell office:value-type="string" calcext:value-type="string">
            <text:p>/objects/transparencia_064.jpg</text:p>
          </table:table-cell>
          <table:table-cell office:value-type="string" calcext:value-type="string">
            <text:p>/objects/small/transparencia_064_sm.jpg</text:p>
          </table:table-cell>
          <table:table-cell office:value-type="string" calcext:value-type="string">
            <text:p>/objects/thumbs/transparencia_06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5</text:p>
          </table:table-cell>
          <table:table-cell office:value-type="string" calcext:value-type="string">
            <text:p>Feria Mundial de Nueva York 1964-1965</text:p>
          </table:table-cell>
          <table:table-cell office:value-type="float" office:value="1964" calcext:value-type="float">
            <text:p>1964</text:p>
          </table:table-cell>
          <table:table-cell/>
          <table:table-cell office:value-type="string" calcext:value-type="string">
            <text:p>Ludolf Burkhardt</text:p>
          </table:table-cell>
          <table:table-cell/>
          <table:table-cell office:value-type="string" calcext:value-type="string">
            <text:p>Vista aérea capturada durante la Feria Mundial de Nueva York de 1964-1965, centrada en el Pabellón de Nueva Jersey con sus distintivos módulos de techo cuadrado y postes de soporte altos. En el plano medio destaca la Unisphere, el icono central de la feria, rodeada de sus fuentes. Al fondo es visible el Shea Stadium, inaugurado en 1964, subrayando el desarrollo urbano y tecnológico de la época del 'Space Age'.</text:p>
          </table:table-cell>
          <table:table-cell/>
          <table:table-cell office:value-type="string" calcext:value-type="string">
            <text:p>Feria Mundial de Nueva York 1964-1965; Unisphere; Arquitectura futurista</text:p>
          </table:table-cell>
          <table:table-cell office:value-type="string" calcext:value-type="string">
            <text:p>Flushing Meadows-Corona Park, Queens, Nueva York</text:p>
          </table:table-cell>
          <table:table-cell office:value-type="float" office:value="40.7461" calcext:value-type="float">
            <text:p>40.7461</text:p>
          </table:table-cell>
          <table:table-cell office:value-type="float" office:value="-73.8451" calcext:value-type="float">
            <text:p>-73.845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5.jpg</text:p>
          </table:table-cell>
          <table:table-cell office:value-type="string" calcext:value-type="string">
            <text:p>flccr</text:p>
          </table:table-cell>
          <table:table-cell office:value-type="string" calcext:value-type="string">
            <text:p>image</text:p>
          </table:table-cell>
          <table:table-cell office:value-type="string" calcext:value-type="string">
            <text:p>/objects/transparencia_065.jpg</text:p>
          </table:table-cell>
          <table:table-cell office:value-type="string" calcext:value-type="string">
            <text:p>/objects/small/transparencia_065_sm.jpg</text:p>
          </table:table-cell>
          <table:table-cell office:value-type="string" calcext:value-type="string">
            <text:p>/objects/thumbs/transparencia_06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6</text:p>
          </table:table-cell>
          <table:table-cell office:value-type="string" calcext:value-type="string">
            <text:p>Ektachrome</text:p>
          </table:table-cell>
          <table:table-cell office:value-type="float" office:value="1964" calcext:value-type="float">
            <text:p>1964</text:p>
          </table:table-cell>
          <table:table-cell/>
          <table:table-cell office:value-type="string" calcext:value-type="string">
            <text:p>Anónimo</text:p>
          </table:table-cell>
          <table:table-cell/>
          <table:table-cell office:value-type="string" calcext:value-type="string">
            <text:p>Retrato de estudio de una mujer joven que personifica la estética 'mod' de mediados de la década de 1960. La modelo viste un sombrero de ala ancha en color turquesa y posa con un maquillaje de ojos marcado (estilo 'cat-eye') frente a un fondo de cortinajes verdes texturizados, característicos de la fotografía comercial y de moda de la época.</text:p>
          </table:table-cell>
          <table:table-cell/>
          <table:table-cell office:value-type="string" calcext:value-type="string">
            <text:p>Ektachrome; Moda años 60; Retrato de estudio</text:p>
          </table:table-cell>
          <table:table-cell office:value-type="string" calcext:value-type="string">
            <text:p>Rochester, Nueva York (Sede de Eastman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6.jpg</text:p>
          </table:table-cell>
          <table:table-cell office:value-type="string" calcext:value-type="string">
            <text:p>khv47</text:p>
          </table:table-cell>
          <table:table-cell office:value-type="string" calcext:value-type="string">
            <text:p>image</text:p>
          </table:table-cell>
          <table:table-cell office:value-type="string" calcext:value-type="string">
            <text:p>/objects/transparencia_066.jpg</text:p>
          </table:table-cell>
          <table:table-cell office:value-type="string" calcext:value-type="string">
            <text:p>/objects/small/transparencia_066_sm.jpg</text:p>
          </table:table-cell>
          <table:table-cell office:value-type="string" calcext:value-type="string">
            <text:p>/objects/thumbs/transparencia_066_th.jpg</text:p>
          </table:table-cell>
          <table:table-cell table:number-columns-repeated="2"/>
          <table:table-cell office:value-type="string" calcext:value-type="string">
            <text:p>Transparencia de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7</text:p>
          </table:table-cell>
          <table:table-cell office:value-type="string" calcext:value-type="string">
            <text:p>Ektachrome</text:p>
          </table:table-cell>
          <table:table-cell office:value-type="float" office:value="1962" calcext:value-type="float">
            <text:p>1962</text:p>
          </table:table-cell>
          <table:table-cell/>
          <table:table-cell office:value-type="string" calcext:value-type="string">
            <text:p>Fotógrafo de planta de Eastman Kodak Company</text:p>
          </table:table-cell>
          <table:table-cell/>
          <table:table-cell office:value-type="string" calcext:value-type="string">
            <text:p>Retrato de estudio de una joven modelo con peinado estilo bouffant y maquillaje de ojos marcado, característico de principios de la década de 1960. La imagen está capturada en una transparencia de color Kodak Ektachrome, montada en su marco original de cartón de la época.</text:p>
          </table:table-cell>
          <table:table-cell/>
          <table:table-cell office:value-type="string" calcext:value-type="string">
            <text:p>Ektachrome; Moda años 60; Retrato de estudio</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7.jpg</text:p>
          </table:table-cell>
          <table:table-cell office:value-type="string" calcext:value-type="string">
            <text:p>l9cuwo</text:p>
          </table:table-cell>
          <table:table-cell office:value-type="string" calcext:value-type="string">
            <text:p>image</text:p>
          </table:table-cell>
          <table:table-cell office:value-type="string" calcext:value-type="string">
            <text:p>/objects/transparencia_067.jpg</text:p>
          </table:table-cell>
          <table:table-cell office:value-type="string" calcext:value-type="string">
            <text:p>/objects/small/transparencia_067_sm.jpg</text:p>
          </table:table-cell>
          <table:table-cell office:value-type="string" calcext:value-type="string">
            <text:p>/objects/thumbs/transparencia_067_th.jpg</text:p>
          </table:table-cell>
          <table:table-cell table:number-columns-repeated="2"/>
          <table:table-cell office:value-type="string" calcext:value-type="string">
            <text:p>Transparencia (diapositiva) en color de formato cuadr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8</text:p>
          </table:table-cell>
          <table:table-cell office:value-type="string" calcext:value-type="string">
            <text:p>Kodachrome</text:p>
          </table:table-cell>
          <table:table-cell office:value-type="float" office:value="1970" calcext:value-type="float">
            <text:p>1970</text:p>
          </table:table-cell>
          <table:table-cell/>
          <table:table-cell office:value-type="string" calcext:value-type="string">
            <text:p>Anónimo (Personal de archivo institucional)</text:p>
          </table:table-cell>
          <table:table-cell/>
          <table:table-cell office:value-type="string" calcext:value-type="string">
            <text:p>Reproducción fotográfica en formato de diapositiva de un retrato pictórico o litográfico del siglo XIX. La imagen captura a una mujer de la élite social sentada, ataviada con un vestido de crinolina oscura y detalles de encaje blanco en el cuello y puños, característico de la moda romántica. La presencia de un epígrafe bajo la imagen indica que se trata de un registro documental de una obra de arte, posiblemente para un catálogo institucional o educativo.</text:p>
          </table:table-cell>
          <table:table-cell/>
          <table:table-cell office:value-type="string" calcext:value-type="string">
            <text:p>Kodachrome; Retrato decimonónico; Archivo histórico</text:p>
          </table:table-cell>
          <table:table-cell office:value-type="string" calcext:value-type="string">
            <text:p>Ciudad de México, México</text:p>
          </table:table-cell>
          <table:table-cell office:value-type="float" office:value="19.4361" calcext:value-type="float">
            <text:p>19.4361</text:p>
          </table:table-cell>
          <table:table-cell office:value-type="float" office:value="-99.1319" calcext:value-type="float">
            <text:p>-99.131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8.jpg</text:p>
          </table:table-cell>
          <table:table-cell office:value-type="string" calcext:value-type="string">
            <text:p>fydnx9</text:p>
          </table:table-cell>
          <table:table-cell office:value-type="string" calcext:value-type="string">
            <text:p>image</text:p>
          </table:table-cell>
          <table:table-cell office:value-type="string" calcext:value-type="string">
            <text:p>/objects/transparencia_068.jpg</text:p>
          </table:table-cell>
          <table:table-cell office:value-type="string" calcext:value-type="string">
            <text:p>/objects/small/transparencia_068_sm.jpg</text:p>
          </table:table-cell>
          <table:table-cell office:value-type="string" calcext:value-type="string">
            <text:p>/objects/thumbs/transparencia_068_th.jpg</text:p>
          </table:table-cell>
          <table:table-cell table:number-columns-repeated="2"/>
          <table:table-cell office:value-type="string" calcext:value-type="string">
            <text:p>Diapositiva de 35mm montada en cartón de 5x5 c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9</text:p>
          </table:table-cell>
          <table:table-cell office:value-type="string" calcext:value-type="string">
            <text:p>Juan Cordero</text:p>
          </table:table-cell>
          <table:table-cell office:value-type="float" office:value="1847" calcext:value-type="float">
            <text:p>1847</text:p>
          </table:table-cell>
          <table:table-cell/>
          <table:table-cell office:value-type="string" calcext:value-type="string">
            <text:p>Juan Cordero (Pintor original)</text:p>
          </table:table-cell>
          <table:table-cell/>
          <table:table-cell office:value-type="string" calcext:value-type="string">
            <text:p>Diapositiva a color que reproduce el óleo 'Retrato de los arquitectos Juan y Ramón Agea', realizado por el pintor mexicano Juan Cordero en 1847 durante su estancia en Roma. La obra original muestra a los hermanos arquitectos, becarios de la Academia de San Carlos, sosteniendo un plano o libro, representando el ideal académico del siglo XIX.</text:p>
          </table:table-cell>
          <table:table-cell/>
          <table:table-cell office:value-type="string" calcext:value-type="string">
            <text:p>Juan Cordero; Arquitectos Agea; Pintura Académica Mexicana</text:p>
          </table:table-cell>
          <table:table-cell office:value-type="string" calcext:value-type="string">
            <text:p>Ciudad de México, México</text:p>
          </table:table-cell>
          <table:table-cell office:value-type="float" office:value="19.4361" calcext:value-type="float">
            <text:p>19.4361</text:p>
          </table:table-cell>
          <table:table-cell office:value-type="float" office:value="-99.1394" calcext:value-type="float">
            <text:p>-99.13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9.jpg</text:p>
          </table:table-cell>
          <table:table-cell office:value-type="string" calcext:value-type="string">
            <text:p>gu5wuo</text:p>
          </table:table-cell>
          <table:table-cell office:value-type="string" calcext:value-type="string">
            <text:p>image</text:p>
          </table:table-cell>
          <table:table-cell office:value-type="string" calcext:value-type="string">
            <text:p>/objects/transparencia_069.jpg</text:p>
          </table:table-cell>
          <table:table-cell office:value-type="string" calcext:value-type="string">
            <text:p>/objects/small/transparencia_069_sm.jpg</text:p>
          </table:table-cell>
          <table:table-cell office:value-type="string" calcext:value-type="string">
            <text:p>/objects/thumbs/transparencia_06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0</text:p>
          </table:table-cell>
          <table:table-cell office:value-type="string" calcext:value-type="string">
            <text:p>Kodachrome</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Reproducción fotográfica en diapositiva a color de un retrato pictórico femenino del siglo XIX. La imagen muestra a una mujer con vestimenta y peinado característicos de la época romántica, capturada probablemente de un catálogo de arte o una exhibición museística sobre soporte de película reversible.</text:p>
          </table:table-cell>
          <table:table-cell/>
          <table:table-cell office:value-type="string" calcext:value-type="string">
            <text:p>Kodachrome; Retrato romántico; Material de archivo</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0.jpg</text:p>
          </table:table-cell>
          <table:table-cell office:value-type="string" calcext:value-type="string">
            <text:p>ucajqh</text:p>
          </table:table-cell>
          <table:table-cell office:value-type="string" calcext:value-type="string">
            <text:p>image</text:p>
          </table:table-cell>
          <table:table-cell office:value-type="string" calcext:value-type="string">
            <text:p>/objects/transparencia_070.jpg</text:p>
          </table:table-cell>
          <table:table-cell office:value-type="string" calcext:value-type="string">
            <text:p>/objects/small/transparencia_070_sm.jpg</text:p>
          </table:table-cell>
          <table:table-cell office:value-type="string" calcext:value-type="string">
            <text:p>/objects/thumbs/transparencia_07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1</text:p>
          </table:table-cell>
          <table:table-cell office:value-type="string" calcext:value-type="string">
            <text:p>Guerra Fría</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Vista de la Puerta de Brandeburgo capturada desde la Pariser Platz en el sector oriental de Berlín (RDA). La imagen muestra la icónica estructura neoclásica con la bandera de la Alemania del Este ondeando sobre la cuadriga, en un entorno despejado de tráfico civil debido a su ubicación dentro de la zona de seguridad restringida durante la Guerra Fría.</text:p>
          </table:table-cell>
          <table:table-cell/>
          <table:table-cell office:value-type="string" calcext:value-type="string">
            <text:p>Guerra Fría; Puerta de Brandeburgo; República Democrática Alemana</text:p>
          </table:table-cell>
          <table:table-cell office:value-type="string" calcext:value-type="string">
            <text:p>Pariser Platz, Berlín, Alemania</text:p>
          </table:table-cell>
          <table:table-cell office:value-type="float" office:value="52.51627" calcext:value-type="float">
            <text:p>52.51627</text:p>
          </table:table-cell>
          <table:table-cell office:value-type="float" office:value="13.3777" calcext:value-type="float">
            <text:p>13.377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1.jpg</text:p>
          </table:table-cell>
          <table:table-cell office:value-type="string" calcext:value-type="string">
            <text:p>2xaxf6</text:p>
          </table:table-cell>
          <table:table-cell office:value-type="string" calcext:value-type="string">
            <text:p>image</text:p>
          </table:table-cell>
          <table:table-cell office:value-type="string" calcext:value-type="string">
            <text:p>/objects/transparencia_071.jpg</text:p>
          </table:table-cell>
          <table:table-cell office:value-type="string" calcext:value-type="string">
            <text:p>/objects/small/transparencia_071_sm.jpg</text:p>
          </table:table-cell>
          <table:table-cell office:value-type="string" calcext:value-type="string">
            <text:p>/objects/thumbs/transparencia_07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2</text:p>
          </table:table-cell>
          <table:table-cell office:value-type="string" calcext:value-type="string">
            <text:p>Turismo fluvial</text:p>
          </table:table-cell>
          <table:table-cell office:value-type="float" office:value="1925" calcext:value-type="float">
            <text:p>1925</text:p>
          </table:table-cell>
          <table:table-cell/>
          <table:table-cell office:value-type="string" calcext:value-type="string">
            <text:p>Arthur Frederick Dadson</text:p>
          </table:table-cell>
          <table:table-cell/>
          <table:table-cell office:value-type="string" calcext:value-type="string">
            <text:p>Una escena bucólica de ocio estival en los Norfolk Broads, Inglaterra, a mediados de la década de 1920. La imagen captura a dos mujeres con trajes de baño y gorros de natación de la época remando en un pequeño bote de madera ('dinghy') sobre un río tranquilo. Al fondo, se aprecia una embarcación de vela tipo 'Norfolk Wherry' y una caseta de madera junto a la orilla, elementos típicos del paisaje fluvial de la región.</text:p>
          </table:table-cell>
          <table:table-cell/>
          <table:table-cell office:value-type="string" calcext:value-type="string">
            <text:p>Turismo fluvial; Moda baño años 20; Autocromo</text:p>
          </table:table-cell>
          <table:table-cell office:value-type="string" calcext:value-type="string">
            <text:p>Norfolk Broads (río Bure o Thurne), Norfolk, Reino Unido</text:p>
          </table:table-cell>
          <table:table-cell office:value-type="float" office:value="52.6841" calcext:value-type="float">
            <text:p>52.6841</text:p>
          </table:table-cell>
          <table:table-cell office:value-type="float" office:value="1.5414" calcext:value-type="float">
            <text:p>1.54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2.jpg</text:p>
          </table:table-cell>
          <table:table-cell office:value-type="string" calcext:value-type="string">
            <text:p>gx118l</text:p>
          </table:table-cell>
          <table:table-cell office:value-type="string" calcext:value-type="string">
            <text:p>image</text:p>
          </table:table-cell>
          <table:table-cell office:value-type="string" calcext:value-type="string">
            <text:p>/objects/transparencia_072.jpg</text:p>
          </table:table-cell>
          <table:table-cell office:value-type="string" calcext:value-type="string">
            <text:p>/objects/small/transparencia_072_sm.jpg</text:p>
          </table:table-cell>
          <table:table-cell office:value-type="string" calcext:value-type="string">
            <text:p>/objects/thumbs/transparencia_07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3</text:p>
          </table:table-cell>
          <table:table-cell office:value-type="string" calcext:value-type="string">
            <text:p>Fascismo</text:p>
          </table:table-cell>
          <table:table-cell office:value-type="float" office:value="1937" calcext:value-type="float">
            <text:p>1937</text:p>
          </table:table-cell>
          <table:table-cell/>
          <table:table-cell office:value-type="string" calcext:value-type="string">
            <text:p>Istituto Luce (Fotógrafo oficial no acreditado)</text:p>
          </table:table-cell>
          <table:table-cell/>
          <table:table-cell office:value-type="string" calcext:value-type="string">
            <text:p>Fotografía de carácter propagandístico que muestra a Benito Mussolini junto a una acompañante femenina (posiblemente su hija Edda) en un bote de remos. La imagen pertenece a las famosas series de vacaciones veraniegas en el Adriático, diseñadas para proyectar una imagen de vigor físico y vitalidad del líder fascista como parte de su culto a la personalidad.</text:p>
          </table:table-cell>
          <table:table-cell/>
          <table:table-cell office:value-type="string" calcext:value-type="string">
            <text:p>Fascismo; Culto a la personalidad; Riccione</text:p>
          </table:table-cell>
          <table:table-cell office:value-type="string" calcext:value-type="string">
            <text:p>Playa de Riccione, Emilia-Romaña, Italia</text:p>
          </table:table-cell>
          <table:table-cell office:value-type="float" office:value="43.9991" calcext:value-type="float">
            <text:p>43.9991</text:p>
          </table:table-cell>
          <table:table-cell office:value-type="float" office:value="12.6565" calcext:value-type="float">
            <text:p>12.656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3.jpg</text:p>
          </table:table-cell>
          <table:table-cell office:value-type="string" calcext:value-type="string">
            <text:p>qqxbgs</text:p>
          </table:table-cell>
          <table:table-cell office:value-type="string" calcext:value-type="string">
            <text:p>image</text:p>
          </table:table-cell>
          <table:table-cell office:value-type="string" calcext:value-type="string">
            <text:p>/objects/transparencia_073.jpg</text:p>
          </table:table-cell>
          <table:table-cell office:value-type="string" calcext:value-type="string">
            <text:p>/objects/small/transparencia_073_sm.jpg</text:p>
          </table:table-cell>
          <table:table-cell office:value-type="string" calcext:value-type="string">
            <text:p>/objects/thumbs/transparencia_07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transparencia_074</text:p>
          </table:table-cell>
          <table:table-cell office:value-type="string" calcext:value-type="string">
            <text:p>Transatlántico</text:p>
          </table:table-cell>
          <table:table-cell office:value-type="float" office:value="1927" calcext:value-type="float">
            <text:p>1927</text:p>
          </table:table-cell>
          <table:table-cell/>
          <table:table-cell office:value-type="string" calcext:value-type="string">
            <text:p>Otto von Stetten</text:p>
          </table:table-cell>
          <table:table-cell/>
          <table:table-cell office:value-type="string" calcext:value-type="string">
            <text:p>Fotografía en color natural (proceso de placa autocroma o similar) que captura al transatlántico SS Resolute de la Hamburg-American Line atracado en los muelles de San Francisco. La imagen muestra la imponente escala del buque de dos chimeneas frente a la infraestructura portuaria de la época, con figuras humanas en el muelle que proporcionan una referencia de tamaño.</text:p>
          </table:table-cell>
          <table:table-cell/>
          <table:table-cell office:value-type="string" calcext:value-type="string">
            <text:p>Transatlántico; Autocromo; San Francisco</text:p>
          </table:table-cell>
          <table:table-cell office:value-type="string" calcext:value-type="string">
            <text:p>The Embarcadero, San Francisco, California, EE. UU.</text:p>
          </table:table-cell>
          <table:table-cell office:value-type="float" office:value="37.8072" calcext:value-type="float">
            <text:p>37.8072</text:p>
          </table:table-cell>
          <table:table-cell office:value-type="float" office:value="-122.4102" calcext:value-type="float">
            <text:p>-122.410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4.jpg</text:p>
          </table:table-cell>
          <table:table-cell office:value-type="string" calcext:value-type="string">
            <text:p>frukdh</text:p>
          </table:table-cell>
          <table:table-cell office:value-type="string" calcext:value-type="string">
            <text:p>image</text:p>
          </table:table-cell>
          <table:table-cell office:value-type="string" calcext:value-type="string">
            <text:p>/objects/transparencia_074.jpg</text:p>
          </table:table-cell>
          <table:table-cell office:value-type="string" calcext:value-type="string">
            <text:p>/objects/small/transparencia_074_sm.jpg</text:p>
          </table:table-cell>
          <table:table-cell office:value-type="string" calcext:value-type="string">
            <text:p>/objects/thumbs/transparencia_074_th.jpg</text:p>
          </table:table-cell>
          <table:table-cell table:number-columns-repeated="2"/>
          <table:table-cell office:value-type="string" calcext:value-type="string">
            <text:p>Placa de vidrio de color (proceso aditiv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75</text:p>
          </table:table-cell>
          <table:table-cell office:value-type="string" calcext:value-type="string">
            <text:p>Estereoscopía</text:p>
          </table:table-cell>
          <table:table-cell office:value-type="float" office:value="1910" calcext:value-type="float">
            <text:p>1910</text:p>
          </table:table-cell>
          <table:table-cell/>
          <table:table-cell office:value-type="string" calcext:value-type="string">
            <text:p>Anónimo</text:p>
          </table:table-cell>
          <table:table-cell/>
          <table:table-cell office:value-type="string" calcext:value-type="string">
            <text:p>Una placa de vidrio estereoscópica montada, que aparece completamente opaca o subexpuesta, característica de los archivos fotográficos de principios del siglo XX. El objeto presenta un marco protector de tela o papel engomado negro y una división central que separa los dos marcos de la imagen estereoscópica (formato 45x107mm o 6x13cm).</text:p>
          </table:table-cell>
          <table:table-cell/>
          <table:table-cell office:value-type="string" calcext:value-type="string">
            <text:p>Estereoscopía; Placa de vidrio; Archivo histórico</text:p>
          </table:table-cell>
          <table:table-cell office:value-type="string" calcext:value-type="string">
            <text:p>París, Francia</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5.jpg</text:p>
          </table:table-cell>
          <table:table-cell office:value-type="string" calcext:value-type="string">
            <text:p>8wpgcal</text:p>
          </table:table-cell>
          <table:table-cell office:value-type="string" calcext:value-type="string">
            <text:p>image</text:p>
          </table:table-cell>
          <table:table-cell office:value-type="string" calcext:value-type="string">
            <text:p>/objects/transparencia_075.jpg</text:p>
          </table:table-cell>
          <table:table-cell office:value-type="string" calcext:value-type="string">
            <text:p>/objects/small/transparencia_075_sm.jpg</text:p>
          </table:table-cell>
          <table:table-cell office:value-type="string" calcext:value-type="string">
            <text:p>/objects/thumbs/transparencia_075_th.jpg</text:p>
          </table:table-cell>
          <table:table-cell table:number-columns-repeated="2"/>
          <table:table-cell office:value-type="string" calcext:value-type="string">
            <text:p>Placa de vidrio de gelatina-bromuro de plat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76</text:p>
          </table:table-cell>
          <table:table-cell office:value-type="string" calcext:value-type="string">
            <text:p>Autocromo</text:p>
          </table:table-cell>
          <table:table-cell office:value-type="float" office:value="1910" calcext:value-type="float">
            <text:p>1910</text:p>
          </table:table-cell>
          <table:table-cell/>
          <table:table-cell office:value-type="string" calcext:value-type="string">
            <text:p>Auguste y Louis Lumière</text:p>
          </table:table-cell>
          <table:table-cell/>
          <table:table-cell office:value-type="string" calcext:value-type="string">
            <text:p>Una placa estereoscópica en autocromo que captura un paisaje boscoso durante el otoño. La imagen presenta dos encuadres casi idénticos diseñados para ser vistos a través de un estereoscopio, logrando un efecto de profundidad tridimensional. Destaca el follaje dorado de los árboles y un suelo densamente cubierto por hojas secas, característico de la estética pictórica de los primeros procesos de color.</text:p>
          </table:table-cell>
          <table:table-cell/>
          <table:table-cell office:value-type="string" calcext:value-type="string">
            <text:p>Autocromo; Estereoscopía; Paisaje</text:p>
          </table:table-cell>
          <table:table-cell office:value-type="string" calcext:value-type="string">
            <text:p>Francia (posiblemente la región de Lyon o Ródano-Alpes)</text:p>
          </table:table-cell>
          <table:table-cell office:value-type="float" office:value="45.764" calcext:value-type="float">
            <text:p>45.764</text:p>
          </table:table-cell>
          <table:table-cell office:value-type="float" office:value="4.835" calcext:value-type="float">
            <text:p>4.83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6.jpg</text:p>
          </table:table-cell>
          <table:table-cell office:value-type="string" calcext:value-type="string">
            <text:p>u7zw1h</text:p>
          </table:table-cell>
          <table:table-cell office:value-type="string" calcext:value-type="string">
            <text:p>image</text:p>
          </table:table-cell>
          <table:table-cell office:value-type="string" calcext:value-type="string">
            <text:p>/objects/transparencia_076.jpg</text:p>
          </table:table-cell>
          <table:table-cell office:value-type="string" calcext:value-type="string">
            <text:p>/objects/small/transparencia_076_sm.jpg</text:p>
          </table:table-cell>
          <table:table-cell office:value-type="string" calcext:value-type="string">
            <text:p>/objects/thumbs/transparencia_076_th.jpg</text:p>
          </table:table-cell>
          <table:table-cell table:number-columns-repeated="2"/>
          <table:table-cell office:value-type="string" calcext:value-type="string">
            <text:p>Placa de vidrio autocromo (Autochrome Lumièr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7021" meta:object-count="0"/>
    <meta:generator>LibreOffice/26.2.4.2$Windows_X86_64 LibreOffice_project/0229ac93fcf0d7cbc6376066c6f35021cef002dc</meta:generator>
  </office:meta>
</office:document-meta>
</file>